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44cm"/>
    </style:style>
    <style:style style:name="co2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455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1.667cm"/>
    </style:style>
    <style:style style:name="co15" style:family="table-column">
      <style:table-column-properties fo:break-before="auto" style:column-width="0.794cm"/>
    </style:style>
    <style:style style:name="co16" style:family="table-column">
      <style:table-column-properties fo:break-before="auto" style:column-width="1.005cm"/>
    </style:style>
    <style:style style:name="co17" style:family="table-column">
      <style:table-column-properties fo:break-before="auto" style:column-width="0.82cm"/>
    </style:style>
    <style:style style:name="co18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138cm"/>
    </style:style>
    <style:style style:name="co21" style:family="table-column">
      <style:table-column-properties fo:break-before="auto" style:column-width="0.9cm"/>
    </style:style>
    <style:style style:name="co22" style:family="table-column">
      <style:table-column-properties fo:break-before="auto" style:column-width="1.773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2.037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4.18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46.9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/>
      <style:map style:condition="cell-content()=[.$H2]" style:apply-style-name="cf1" style:base-cell-address="Hoja1.B2"/>
    </style:style>
    <style:style style:name="ce7" style:family="table-cell" style:parent-style-name="Default" style:data-style-name="N0">
      <style:text-properties style:font-name="Times New Roman" fo:font-weight="bold" style:font-name-asian="Times New Roman" style:font-weight-asian="bold" style:font-name-complex="Times New Roman" style:font-weight-complex="bold"/>
      <style:map style:condition="cell-content()=[.$H2]" style:apply-style-name="cf1" style:base-cell-address="Hoja1.B2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/>
      <style:map style:condition="cell-content()=[.$H2]" style:apply-style-name="cf1" style:base-cell-address="Hoja1.B2"/>
      <style:map style:condition="cell-content()=[.$H224]" style:apply-style-name="cf1" style:base-cell-address="Hoja1.B224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2f2f2"/>
    </style:style>
    <style:style style:name="ce11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99"/>
    </style:style>
    <style:style style:name="ce13" style:family="table-cell" style:parent-style-name="Default" style:data-style-name="N0">
      <style:table-cell-properties fo:background-color="#ffffcc"/>
    </style:style>
    <style:style style:name="ce14" style:family="table-cell" style:parent-style-name="Default" style:data-style-name="N0">
      <style:table-cell-properties fo:background-color="#ffcc99"/>
    </style:style>
    <style:style style:name="ce15" style:family="table-cell" style:parent-style-name="Default" style:data-style-name="N0">
      <style:table-cell-properties fo:background-color="#ccff00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table:table-column table:style-name="co1" table:default-cell-style-name="ce1"/>
        <table:table-column table:style-name="co2" table:number-columns-repeated="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" table:number-columns-repeated="1016" table:default-cell-style-name="ce1"/>
        <table:table-row table:style-name="ro2">
          <table:table-cell/>
          <table:table-cell office:value-type="string">
            <text:p>Opción 1</text:p>
          </table:table-cell>
          <table:table-cell office:value-type="string">
            <text:p>Opción 2</text:p>
          </table:table-cell>
          <table:table-cell office:value-type="string">
            <text:p>Opción 3</text:p>
          </table:table-cell>
          <table:table-cell office:value-type="string">
            <text:p>Opción 4</text:p>
          </table:table-cell>
          <table:table-cell office:value-type="string">
            <text:p>Correcta (1-4)</text:p>
          </table:table-cell>
          <table:table-cell office:value-type="string">
            <text:p>Ayuda</text:p>
          </table:table-cell>
          <table:table-cell office:value-type="string">
            <text:p>Correcto</text:p>
          </table:table-cell>
          <table:table-cell/>
          <table:table-cell table:style-name="ce10" office:value-type="string">
            <text:p>O1</text:p>
          </table:table-cell>
          <table:table-cell table:style-name="ce10" office:value-type="string">
            <text:p>O2</text:p>
          </table:table-cell>
          <table:table-cell table:style-name="ce10" office:value-type="string">
            <text:p>O3</text:p>
          </table:table-cell>
          <table:table-cell table:style-name="ce10" office:value-type="string">
            <text:p>O4</text:p>
          </table:table-cell>
          <table:table-cell table:style-name="ce10" office:value-type="string">
            <text:p>Correcto</text:p>
          </table:table-cell>
          <table:table-cell table:style-name="ce10" office:value-type="string">
            <text:p>Contar</text:p>
          </table:table-cell>
          <table:table-cell table:number-columns-repeated="1009"/>
        </table:table-row>
        <table:table-row table:style-name="ro2">
          <table:table-cell table:style-name="Default" office:value-type="string">
            <text:p>Observa el número 1514. Indica cuál es la cifra de las CENTENAS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];0;[.F2])" office:value-type="string" office:string-value="5">
            <text:p>5</text:p>
          </table:table-cell>
          <table:table-cell table:style-name="ce9"/>
          <table:table-cell table:style-name="ce11" table:formula="of:=VLOOKUP([.B2];[Listado.$A$2:.$D$19];4;0)" office:value-type="float" office:value="0">
            <text:p>#N/D</text:p>
          </table:table-cell>
          <table:table-cell table:style-name="ce11" table:formula="of:=VLOOKUP([.C2];[Listado.$A$2:.$D$19];4;0)" office:value-type="float" office:value="0">
            <text:p>#N/D</text:p>
          </table:table-cell>
          <table:table-cell table:style-name="ce11" table:formula="of:=VLOOKUP([.D2];[Listado.$A$2:.$D$19];4;0)" office:value-type="float" office:value="0">
            <text:p>#N/D</text:p>
          </table:table-cell>
          <table:table-cell table:style-name="ce11" table:formula="of:=VLOOKUP([.E2];[Listado.$A$2:.$D$19];4;0)" office:value-type="float" office:value="0">
            <text:p>#N/D</text:p>
          </table:table-cell>
          <table:table-cell table:style-name="ce11" table:formula="of:=VLOOKUP([.H2];[Listado.$A$2:.$D$19];4;0)" office:value-type="float" office:value="0">
            <text:p>#N/D</text:p>
          </table:table-cell>
          <table:table-cell table:style-name="ce11" table:formula="of:=COUNTIF([.J2:.M2];[.N2])" office:value-type="float" office:value="0">
            <text:p>#N/D</text:p>
          </table:table-cell>
          <table:table-cell table:style-name="ce9" table:number-columns-repeated="1009"/>
        </table:table-row>
        <table:table-row table:style-name="ro2">
          <table:table-cell table:style-name="Default" office:value-type="string">
            <text:p>Observa el número 6721. Indica cuál es la cifra de las CENTENAS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];0;[.F3])" office:value-type="string" office:string-value="7">
            <text:p>7</text:p>
          </table:table-cell>
          <table:table-cell table:style-name="ce9"/>
          <table:table-cell table:style-name="ce11" table:formula="of:=VLOOKUP([.B3];[Listado.$A$2:.$D$19];4;0)" office:value-type="float" office:value="0">
            <text:p>#N/D</text:p>
          </table:table-cell>
          <table:table-cell table:style-name="ce11" table:formula="of:=VLOOKUP([.C3];[Listado.$A$2:.$D$19];4;0)" office:value-type="float" office:value="0">
            <text:p>#N/D</text:p>
          </table:table-cell>
          <table:table-cell table:style-name="ce11" table:formula="of:=VLOOKUP([.D3];[Listado.$A$2:.$D$19];4;0)" office:value-type="float" office:value="0">
            <text:p>#N/D</text:p>
          </table:table-cell>
          <table:table-cell table:style-name="ce11" table:formula="of:=VLOOKUP([.E3];[Listado.$A$2:.$D$19];4;0)" office:value-type="float" office:value="0">
            <text:p>#N/D</text:p>
          </table:table-cell>
          <table:table-cell table:style-name="ce11" table:formula="of:=VLOOKUP([.H3];[Listado.$A$2:.$D$19];4;0)" office:value-type="float" office:value="0">
            <text:p>#N/D</text:p>
          </table:table-cell>
          <table:table-cell table:style-name="ce11" table:formula="of:=COUNTIF([.J3:.M3];[.N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863. Indica cuál es la cifra de las CENTENAS: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4];0;[.F4])" office:value-type="string" office:string-value="8">
            <text:p>8</text:p>
          </table:table-cell>
          <table:table-cell table:style-name="ce9"/>
          <table:table-cell table:style-name="ce11" table:formula="of:=VLOOKUP([.B4];[Listado.$A$2:.$D$19];4;0)" office:value-type="float" office:value="0">
            <text:p>#N/D</text:p>
          </table:table-cell>
          <table:table-cell table:style-name="ce11" table:formula="of:=VLOOKUP([.C4];[Listado.$A$2:.$D$19];4;0)" office:value-type="float" office:value="0">
            <text:p>#N/D</text:p>
          </table:table-cell>
          <table:table-cell table:style-name="ce11" table:formula="of:=VLOOKUP([.D4];[Listado.$A$2:.$D$19];4;0)" office:value-type="float" office:value="0">
            <text:p>#N/D</text:p>
          </table:table-cell>
          <table:table-cell table:style-name="ce11" table:formula="of:=VLOOKUP([.E4];[Listado.$A$2:.$D$19];4;0)" office:value-type="float" office:value="0">
            <text:p>#N/D</text:p>
          </table:table-cell>
          <table:table-cell table:style-name="ce11" table:formula="of:=VLOOKUP([.H4];[Listado.$A$2:.$D$19];4;0)" office:value-type="float" office:value="0">
            <text:p>#N/D</text:p>
          </table:table-cell>
          <table:table-cell table:style-name="ce11" table:formula="of:=COUNTIF([.J4:.M4];[.N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296. Indica cuál es la cifra de las CENT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5];0;[.F5])" office:value-type="string" office:string-value="2">
            <text:p>2</text:p>
          </table:table-cell>
          <table:table-cell table:style-name="ce9"/>
          <table:table-cell table:style-name="ce11" table:formula="of:=VLOOKUP([.B5];[Listado.$A$2:.$D$19];4;0)" office:value-type="float" office:value="0">
            <text:p>#N/D</text:p>
          </table:table-cell>
          <table:table-cell table:style-name="ce11" table:formula="of:=VLOOKUP([.C5];[Listado.$A$2:.$D$19];4;0)" office:value-type="float" office:value="0">
            <text:p>#N/D</text:p>
          </table:table-cell>
          <table:table-cell table:style-name="ce11" table:formula="of:=VLOOKUP([.D5];[Listado.$A$2:.$D$19];4;0)" office:value-type="float" office:value="0">
            <text:p>#N/D</text:p>
          </table:table-cell>
          <table:table-cell table:style-name="ce11" table:formula="of:=VLOOKUP([.E5];[Listado.$A$2:.$D$19];4;0)" office:value-type="float" office:value="0">
            <text:p>#N/D</text:p>
          </table:table-cell>
          <table:table-cell table:style-name="ce11" table:formula="of:=VLOOKUP([.H5];[Listado.$A$2:.$D$19];4;0)" office:value-type="float" office:value="0">
            <text:p>#N/D</text:p>
          </table:table-cell>
          <table:table-cell table:style-name="ce11" table:formula="of:=COUNTIF([.J5:.M5];[.N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751. Indica cuál es la cifra de las CENT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formula="of:=OFFSET([.A6];0;[.F6])" office:value-type="string" office:string-value="7">
            <text:p>7</text:p>
          </table:table-cell>
          <table:table-cell/>
          <table:table-cell table:style-name="ce10" table:formula="of:=VLOOKUP([.B6];[Listado.$A$2:.$D$19];4;0)" office:value-type="float" office:value="0">
            <text:p>#N/D</text:p>
          </table:table-cell>
          <table:table-cell table:style-name="ce10" table:formula="of:=VLOOKUP([.C6];[Listado.$A$2:.$D$19];4;0)" office:value-type="float" office:value="0">
            <text:p>#N/D</text:p>
          </table:table-cell>
          <table:table-cell table:style-name="ce10" table:formula="of:=VLOOKUP([.D6];[Listado.$A$2:.$D$19];4;0)" office:value-type="float" office:value="0">
            <text:p>#N/D</text:p>
          </table:table-cell>
          <table:table-cell table:style-name="ce10" table:formula="of:=VLOOKUP([.E6];[Listado.$A$2:.$D$19];4;0)" office:value-type="float" office:value="0">
            <text:p>#N/D</text:p>
          </table:table-cell>
          <table:table-cell table:style-name="ce10" table:formula="of:=VLOOKUP([.H6];[Listado.$A$2:.$D$19];4;0)" office:value-type="float" office:value="0">
            <text:p>#N/D</text:p>
          </table:table-cell>
          <table:table-cell table:style-name="ce10" table:formula="of:=COUNTIF([.J6:.M6];[.N6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2781. Indica cuál es la cifra de las CENT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7];0;[.F7])" office:value-type="string" office:string-value="7">
            <text:p>7</text:p>
          </table:table-cell>
          <table:table-cell table:style-name="ce9"/>
          <table:table-cell table:style-name="ce11" table:formula="of:=VLOOKUP([.B7];[Listado.$A$2:.$D$19];4;0)" office:value-type="float" office:value="0">
            <text:p>#N/D</text:p>
          </table:table-cell>
          <table:table-cell table:style-name="ce11" table:formula="of:=VLOOKUP([.C7];[Listado.$A$2:.$D$19];4;0)" office:value-type="float" office:value="0">
            <text:p>#N/D</text:p>
          </table:table-cell>
          <table:table-cell table:style-name="ce11" table:formula="of:=VLOOKUP([.D7];[Listado.$A$2:.$D$19];4;0)" office:value-type="float" office:value="0">
            <text:p>#N/D</text:p>
          </table:table-cell>
          <table:table-cell table:style-name="ce11" table:formula="of:=VLOOKUP([.E7];[Listado.$A$2:.$D$19];4;0)" office:value-type="float" office:value="0">
            <text:p>#N/D</text:p>
          </table:table-cell>
          <table:table-cell table:style-name="ce11" table:formula="of:=VLOOKUP([.H7];[Listado.$A$2:.$D$19];4;0)" office:value-type="float" office:value="0">
            <text:p>#N/D</text:p>
          </table:table-cell>
          <table:table-cell table:style-name="ce11" table:formula="of:=COUNTIF([.J7:.M7];[.N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586. Indica cuál es la cifra de las CENTENAS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8];0;[.F8])" office:value-type="string" office:string-value="5">
            <text:p>5</text:p>
          </table:table-cell>
          <table:table-cell table:style-name="ce9"/>
          <table:table-cell table:style-name="ce11" table:formula="of:=VLOOKUP([.B8];[Listado.$A$2:.$D$19];4;0)" office:value-type="float" office:value="0">
            <text:p>#N/D</text:p>
          </table:table-cell>
          <table:table-cell table:style-name="ce11" table:formula="of:=VLOOKUP([.C8];[Listado.$A$2:.$D$19];4;0)" office:value-type="float" office:value="0">
            <text:p>#N/D</text:p>
          </table:table-cell>
          <table:table-cell table:style-name="ce11" table:formula="of:=VLOOKUP([.D8];[Listado.$A$2:.$D$19];4;0)" office:value-type="float" office:value="0">
            <text:p>#N/D</text:p>
          </table:table-cell>
          <table:table-cell table:style-name="ce11" table:formula="of:=VLOOKUP([.E8];[Listado.$A$2:.$D$19];4;0)" office:value-type="float" office:value="0">
            <text:p>#N/D</text:p>
          </table:table-cell>
          <table:table-cell table:style-name="ce11" table:formula="of:=VLOOKUP([.H8];[Listado.$A$2:.$D$19];4;0)" office:value-type="float" office:value="0">
            <text:p>#N/D</text:p>
          </table:table-cell>
          <table:table-cell table:style-name="ce11" table:formula="of:=COUNTIF([.J8:.M8];[.N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024. Indica cuál es la cifra de las CENTENA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3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9];0;[.F9])" office:value-type="string" office:string-value="0">
            <text:p>0</text:p>
          </table:table-cell>
          <table:table-cell table:style-name="ce9"/>
          <table:table-cell table:style-name="ce11" table:formula="of:=VLOOKUP([.B9];[Listado.$A$2:.$D$19];4;0)" office:value-type="float" office:value="0">
            <text:p>#N/D</text:p>
          </table:table-cell>
          <table:table-cell table:style-name="ce11" table:formula="of:=VLOOKUP([.C9];[Listado.$A$2:.$D$19];4;0)" office:value-type="float" office:value="0">
            <text:p>#N/D</text:p>
          </table:table-cell>
          <table:table-cell table:style-name="ce11" table:formula="of:=VLOOKUP([.D9];[Listado.$A$2:.$D$19];4;0)" office:value-type="float" office:value="0">
            <text:p>#N/D</text:p>
          </table:table-cell>
          <table:table-cell table:style-name="ce11" table:formula="of:=VLOOKUP([.E9];[Listado.$A$2:.$D$19];4;0)" office:value-type="float" office:value="0">
            <text:p>#N/D</text:p>
          </table:table-cell>
          <table:table-cell table:style-name="ce11" table:formula="of:=VLOOKUP([.H9];[Listado.$A$2:.$D$19];4;0)" office:value-type="float" office:value="0">
            <text:p>#N/D</text:p>
          </table:table-cell>
          <table:table-cell table:style-name="ce11" table:formula="of:=COUNTIF([.J9:.M9];[.N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815. Indica cuál es la cifra de las CENTENA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0];0;[.F10])" office:value-type="string" office:string-value="8">
            <text:p>8</text:p>
          </table:table-cell>
          <table:table-cell table:style-name="ce9"/>
          <table:table-cell table:style-name="ce11" table:formula="of:=VLOOKUP([.B10];[Listado.$A$2:.$D$19];4;0)" office:value-type="float" office:value="0">
            <text:p>#N/D</text:p>
          </table:table-cell>
          <table:table-cell table:style-name="ce11" table:formula="of:=VLOOKUP([.C10];[Listado.$A$2:.$D$19];4;0)" office:value-type="float" office:value="0">
            <text:p>#N/D</text:p>
          </table:table-cell>
          <table:table-cell table:style-name="ce11" table:formula="of:=VLOOKUP([.D10];[Listado.$A$2:.$D$19];4;0)" office:value-type="float" office:value="0">
            <text:p>#N/D</text:p>
          </table:table-cell>
          <table:table-cell table:style-name="ce11" table:formula="of:=VLOOKUP([.E10];[Listado.$A$2:.$D$19];4;0)" office:value-type="float" office:value="0">
            <text:p>#N/D</text:p>
          </table:table-cell>
          <table:table-cell table:style-name="ce11" table:formula="of:=VLOOKUP([.H10];[Listado.$A$2:.$D$19];4;0)" office:value-type="float" office:value="0">
            <text:p>#N/D</text:p>
          </table:table-cell>
          <table:table-cell table:style-name="ce11" table:formula="of:=COUNTIF([.J10:.M10];[.N1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852. Indica cuál es la cifra de las CENT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1];0;[.F11])" office:value-type="string" office:string-value="8">
            <text:p>8</text:p>
          </table:table-cell>
          <table:table-cell table:style-name="ce9"/>
          <table:table-cell table:style-name="ce11" table:formula="of:=VLOOKUP([.B11];[Listado.$A$2:.$D$19];4;0)" office:value-type="float" office:value="0">
            <text:p>#N/D</text:p>
          </table:table-cell>
          <table:table-cell table:style-name="ce11" table:formula="of:=VLOOKUP([.C11];[Listado.$A$2:.$D$19];4;0)" office:value-type="float" office:value="0">
            <text:p>#N/D</text:p>
          </table:table-cell>
          <table:table-cell table:style-name="ce11" table:formula="of:=VLOOKUP([.D11];[Listado.$A$2:.$D$19];4;0)" office:value-type="float" office:value="0">
            <text:p>#N/D</text:p>
          </table:table-cell>
          <table:table-cell table:style-name="ce11" table:formula="of:=VLOOKUP([.E11];[Listado.$A$2:.$D$19];4;0)" office:value-type="float" office:value="0">
            <text:p>#N/D</text:p>
          </table:table-cell>
          <table:table-cell table:style-name="ce11" table:formula="of:=VLOOKUP([.H11];[Listado.$A$2:.$D$19];4;0)" office:value-type="float" office:value="0">
            <text:p>#N/D</text:p>
          </table:table-cell>
          <table:table-cell table:style-name="ce11" table:formula="of:=COUNTIF([.J11:.M11];[.N1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2835. Indica cuál es la cifra de las CENTENA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2];0;[.F12])" office:value-type="string" office:string-value="8">
            <text:p>8</text:p>
          </table:table-cell>
          <table:table-cell table:style-name="ce9"/>
          <table:table-cell table:style-name="ce11" table:formula="of:=VLOOKUP([.B12];[Listado.$A$2:.$D$19];4;0)" office:value-type="float" office:value="0">
            <text:p>#N/D</text:p>
          </table:table-cell>
          <table:table-cell table:style-name="ce11" table:formula="of:=VLOOKUP([.C12];[Listado.$A$2:.$D$19];4;0)" office:value-type="float" office:value="0">
            <text:p>#N/D</text:p>
          </table:table-cell>
          <table:table-cell table:style-name="ce11" table:formula="of:=VLOOKUP([.D12];[Listado.$A$2:.$D$19];4;0)" office:value-type="float" office:value="0">
            <text:p>#N/D</text:p>
          </table:table-cell>
          <table:table-cell table:style-name="ce11" table:formula="of:=VLOOKUP([.E12];[Listado.$A$2:.$D$19];4;0)" office:value-type="float" office:value="0">
            <text:p>#N/D</text:p>
          </table:table-cell>
          <table:table-cell table:style-name="ce11" table:formula="of:=VLOOKUP([.H12];[Listado.$A$2:.$D$19];4;0)" office:value-type="float" office:value="0">
            <text:p>#N/D</text:p>
          </table:table-cell>
          <table:table-cell table:style-name="ce11" table:formula="of:=COUNTIF([.J12:.M12];[.N1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125. Indica cuál es la cifra de las CENTENAS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8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3];0;[.F13])" office:value-type="string" office:string-value="1">
            <text:p>1</text:p>
          </table:table-cell>
          <table:table-cell table:style-name="ce9"/>
          <table:table-cell table:style-name="ce11" table:formula="of:=VLOOKUP([.B13];[Listado.$A$2:.$D$19];4;0)" office:value-type="float" office:value="0">
            <text:p>#N/D</text:p>
          </table:table-cell>
          <table:table-cell table:style-name="ce11" table:formula="of:=VLOOKUP([.C13];[Listado.$A$2:.$D$19];4;0)" office:value-type="float" office:value="0">
            <text:p>#N/D</text:p>
          </table:table-cell>
          <table:table-cell table:style-name="ce11" table:formula="of:=VLOOKUP([.D13];[Listado.$A$2:.$D$19];4;0)" office:value-type="float" office:value="0">
            <text:p>#N/D</text:p>
          </table:table-cell>
          <table:table-cell table:style-name="ce11" table:formula="of:=VLOOKUP([.E13];[Listado.$A$2:.$D$19];4;0)" office:value-type="float" office:value="0">
            <text:p>#N/D</text:p>
          </table:table-cell>
          <table:table-cell table:style-name="ce11" table:formula="of:=VLOOKUP([.H13];[Listado.$A$2:.$D$19];4;0)" office:value-type="float" office:value="0">
            <text:p>#N/D</text:p>
          </table:table-cell>
          <table:table-cell table:style-name="ce11" table:formula="of:=COUNTIF([.J13:.M13];[.N1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029. Indica cuál es la cifra de las CENT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4];0;[.F14])" office:value-type="string" office:string-value="0">
            <text:p>0</text:p>
          </table:table-cell>
          <table:table-cell table:style-name="ce9"/>
          <table:table-cell table:style-name="ce11" table:formula="of:=VLOOKUP([.B14];[Listado.$A$2:.$D$19];4;0)" office:value-type="float" office:value="0">
            <text:p>#N/D</text:p>
          </table:table-cell>
          <table:table-cell table:style-name="ce11" table:formula="of:=VLOOKUP([.C14];[Listado.$A$2:.$D$19];4;0)" office:value-type="float" office:value="0">
            <text:p>#N/D</text:p>
          </table:table-cell>
          <table:table-cell table:style-name="ce11" table:formula="of:=VLOOKUP([.D14];[Listado.$A$2:.$D$19];4;0)" office:value-type="float" office:value="0">
            <text:p>#N/D</text:p>
          </table:table-cell>
          <table:table-cell table:style-name="ce11" table:formula="of:=VLOOKUP([.E14];[Listado.$A$2:.$D$19];4;0)" office:value-type="float" office:value="0">
            <text:p>#N/D</text:p>
          </table:table-cell>
          <table:table-cell table:style-name="ce11" table:formula="of:=VLOOKUP([.H14];[Listado.$A$2:.$D$19];4;0)" office:value-type="float" office:value="0">
            <text:p>#N/D</text:p>
          </table:table-cell>
          <table:table-cell table:style-name="ce11" table:formula="of:=COUNTIF([.J14:.M14];[.N1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8973. Indica cuál es la cifra de las CENT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5];0;[.F15])" office:value-type="string" office:string-value="9">
            <text:p>9</text:p>
          </table:table-cell>
          <table:table-cell table:style-name="ce9"/>
          <table:table-cell table:style-name="ce11" table:formula="of:=VLOOKUP([.B15];[Listado.$A$2:.$D$19];4;0)" office:value-type="float" office:value="0">
            <text:p>#N/D</text:p>
          </table:table-cell>
          <table:table-cell table:style-name="ce11" table:formula="of:=VLOOKUP([.C15];[Listado.$A$2:.$D$19];4;0)" office:value-type="float" office:value="0">
            <text:p>#N/D</text:p>
          </table:table-cell>
          <table:table-cell table:style-name="ce11" table:formula="of:=VLOOKUP([.D15];[Listado.$A$2:.$D$19];4;0)" office:value-type="float" office:value="0">
            <text:p>#N/D</text:p>
          </table:table-cell>
          <table:table-cell table:style-name="ce11" table:formula="of:=VLOOKUP([.E15];[Listado.$A$2:.$D$19];4;0)" office:value-type="float" office:value="0">
            <text:p>#N/D</text:p>
          </table:table-cell>
          <table:table-cell table:style-name="ce11" table:formula="of:=VLOOKUP([.H15];[Listado.$A$2:.$D$19];4;0)" office:value-type="float" office:value="0">
            <text:p>#N/D</text:p>
          </table:table-cell>
          <table:table-cell table:style-name="ce11" table:formula="of:=COUNTIF([.J15:.M15];[.N1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279. Indica cuál es la cifra de las CENTENA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6];0;[.F16])" office:value-type="string" office:string-value="2">
            <text:p>2</text:p>
          </table:table-cell>
          <table:table-cell table:style-name="ce9"/>
          <table:table-cell table:style-name="ce11" table:formula="of:=VLOOKUP([.B16];[Listado.$A$2:.$D$19];4;0)" office:value-type="float" office:value="0">
            <text:p>#N/D</text:p>
          </table:table-cell>
          <table:table-cell table:style-name="ce11" table:formula="of:=VLOOKUP([.C16];[Listado.$A$2:.$D$19];4;0)" office:value-type="float" office:value="0">
            <text:p>#N/D</text:p>
          </table:table-cell>
          <table:table-cell table:style-name="ce11" table:formula="of:=VLOOKUP([.D16];[Listado.$A$2:.$D$19];4;0)" office:value-type="float" office:value="0">
            <text:p>#N/D</text:p>
          </table:table-cell>
          <table:table-cell table:style-name="ce11" table:formula="of:=VLOOKUP([.E16];[Listado.$A$2:.$D$19];4;0)" office:value-type="float" office:value="0">
            <text:p>#N/D</text:p>
          </table:table-cell>
          <table:table-cell table:style-name="ce11" table:formula="of:=VLOOKUP([.H16];[Listado.$A$2:.$D$19];4;0)" office:value-type="float" office:value="0">
            <text:p>#N/D</text:p>
          </table:table-cell>
          <table:table-cell table:style-name="ce11" table:formula="of:=COUNTIF([.J16:.M16];[.N1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603. Indica cuál es la cifra de las CENT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7];0;[.F17])" office:value-type="string" office:string-value="6">
            <text:p>6</text:p>
          </table:table-cell>
          <table:table-cell table:style-name="ce9"/>
          <table:table-cell table:style-name="ce11" table:formula="of:=VLOOKUP([.B17];[Listado.$A$2:.$D$19];4;0)" office:value-type="float" office:value="0">
            <text:p>#N/D</text:p>
          </table:table-cell>
          <table:table-cell table:style-name="ce11" table:formula="of:=VLOOKUP([.C17];[Listado.$A$2:.$D$19];4;0)" office:value-type="float" office:value="0">
            <text:p>#N/D</text:p>
          </table:table-cell>
          <table:table-cell table:style-name="ce11" table:formula="of:=VLOOKUP([.D17];[Listado.$A$2:.$D$19];4;0)" office:value-type="float" office:value="0">
            <text:p>#N/D</text:p>
          </table:table-cell>
          <table:table-cell table:style-name="ce11" table:formula="of:=VLOOKUP([.E17];[Listado.$A$2:.$D$19];4;0)" office:value-type="float" office:value="0">
            <text:p>#N/D</text:p>
          </table:table-cell>
          <table:table-cell table:style-name="ce11" table:formula="of:=VLOOKUP([.H17];[Listado.$A$2:.$D$19];4;0)" office:value-type="float" office:value="0">
            <text:p>#N/D</text:p>
          </table:table-cell>
          <table:table-cell table:style-name="ce11" table:formula="of:=COUNTIF([.J17:.M17];[.N1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247. Indica cuál es la cifra de las CENT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8];0;[.F18])" office:value-type="string" office:string-value="2">
            <text:p>2</text:p>
          </table:table-cell>
          <table:table-cell table:style-name="ce9"/>
          <table:table-cell table:style-name="ce11" table:formula="of:=VLOOKUP([.B18];[Listado.$A$2:.$D$19];4;0)" office:value-type="float" office:value="0">
            <text:p>#N/D</text:p>
          </table:table-cell>
          <table:table-cell table:style-name="ce11" table:formula="of:=VLOOKUP([.C18];[Listado.$A$2:.$D$19];4;0)" office:value-type="float" office:value="0">
            <text:p>#N/D</text:p>
          </table:table-cell>
          <table:table-cell table:style-name="ce11" table:formula="of:=VLOOKUP([.D18];[Listado.$A$2:.$D$19];4;0)" office:value-type="float" office:value="0">
            <text:p>#N/D</text:p>
          </table:table-cell>
          <table:table-cell table:style-name="ce11" table:formula="of:=VLOOKUP([.E18];[Listado.$A$2:.$D$19];4;0)" office:value-type="float" office:value="0">
            <text:p>#N/D</text:p>
          </table:table-cell>
          <table:table-cell table:style-name="ce11" table:formula="of:=VLOOKUP([.H18];[Listado.$A$2:.$D$19];4;0)" office:value-type="float" office:value="0">
            <text:p>#N/D</text:p>
          </table:table-cell>
          <table:table-cell table:style-name="ce11" table:formula="of:=COUNTIF([.J18:.M18];[.N1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386. Indica cuál es la cifra de las CENTENA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19];0;[.F19])" office:value-type="string" office:string-value="3">
            <text:p>3</text:p>
          </table:table-cell>
          <table:table-cell table:style-name="ce9"/>
          <table:table-cell table:style-name="ce11" table:formula="of:=VLOOKUP([.B19];[Listado.$A$2:.$D$19];4;0)" office:value-type="float" office:value="0">
            <text:p>#N/D</text:p>
          </table:table-cell>
          <table:table-cell table:style-name="ce11" table:formula="of:=VLOOKUP([.C19];[Listado.$A$2:.$D$19];4;0)" office:value-type="float" office:value="0">
            <text:p>#N/D</text:p>
          </table:table-cell>
          <table:table-cell table:style-name="ce11" table:formula="of:=VLOOKUP([.D19];[Listado.$A$2:.$D$19];4;0)" office:value-type="float" office:value="0">
            <text:p>#N/D</text:p>
          </table:table-cell>
          <table:table-cell table:style-name="ce11" table:formula="of:=VLOOKUP([.E19];[Listado.$A$2:.$D$19];4;0)" office:value-type="float" office:value="0">
            <text:p>#N/D</text:p>
          </table:table-cell>
          <table:table-cell table:style-name="ce11" table:formula="of:=VLOOKUP([.H19];[Listado.$A$2:.$D$19];4;0)" office:value-type="float" office:value="0">
            <text:p>#N/D</text:p>
          </table:table-cell>
          <table:table-cell table:style-name="ce11" table:formula="of:=COUNTIF([.J19:.M19];[.N1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248. Indica cuál es la cifra de las CENTENAS: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0];0;[.F20])" office:value-type="string" office:string-value="2">
            <text:p>2</text:p>
          </table:table-cell>
          <table:table-cell table:style-name="ce9"/>
          <table:table-cell table:style-name="ce11" table:formula="of:=VLOOKUP([.B20];[Listado.$A$2:.$D$19];4;0)" office:value-type="float" office:value="0">
            <text:p>#N/D</text:p>
          </table:table-cell>
          <table:table-cell table:style-name="ce11" table:formula="of:=VLOOKUP([.C20];[Listado.$A$2:.$D$19];4;0)" office:value-type="float" office:value="0">
            <text:p>#N/D</text:p>
          </table:table-cell>
          <table:table-cell table:style-name="ce11" table:formula="of:=VLOOKUP([.D20];[Listado.$A$2:.$D$19];4;0)" office:value-type="float" office:value="0">
            <text:p>#N/D</text:p>
          </table:table-cell>
          <table:table-cell table:style-name="ce11" table:formula="of:=VLOOKUP([.E20];[Listado.$A$2:.$D$19];4;0)" office:value-type="float" office:value="0">
            <text:p>#N/D</text:p>
          </table:table-cell>
          <table:table-cell table:style-name="ce11" table:formula="of:=VLOOKUP([.H20];[Listado.$A$2:.$D$19];4;0)" office:value-type="float" office:value="0">
            <text:p>#N/D</text:p>
          </table:table-cell>
          <table:table-cell table:style-name="ce11" table:formula="of:=COUNTIF([.J20:.M20];[.N2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287. Indica cuál es la cifra de las CENTENAS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9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1];0;[.F21])" office:value-type="string" office:string-value="2">
            <text:p>2</text:p>
          </table:table-cell>
          <table:table-cell table:style-name="ce9"/>
          <table:table-cell table:style-name="ce11" table:formula="of:=VLOOKUP([.B21];[Listado.$A$2:.$D$19];4;0)" office:value-type="float" office:value="0">
            <text:p>#N/D</text:p>
          </table:table-cell>
          <table:table-cell table:style-name="ce11" table:formula="of:=VLOOKUP([.C21];[Listado.$A$2:.$D$19];4;0)" office:value-type="float" office:value="0">
            <text:p>#N/D</text:p>
          </table:table-cell>
          <table:table-cell table:style-name="ce11" table:formula="of:=VLOOKUP([.D21];[Listado.$A$2:.$D$19];4;0)" office:value-type="float" office:value="0">
            <text:p>#N/D</text:p>
          </table:table-cell>
          <table:table-cell table:style-name="ce11" table:formula="of:=VLOOKUP([.E21];[Listado.$A$2:.$D$19];4;0)" office:value-type="float" office:value="0">
            <text:p>#N/D</text:p>
          </table:table-cell>
          <table:table-cell table:style-name="ce11" table:formula="of:=VLOOKUP([.H21];[Listado.$A$2:.$D$19];4;0)" office:value-type="float" office:value="0">
            <text:p>#N/D</text:p>
          </table:table-cell>
          <table:table-cell table:style-name="ce11" table:formula="of:=COUNTIF([.J21:.M21];[.N2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971. Indica cuál es la cifra de las CENTENAS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9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2];0;[.F22])" office:value-type="string" office:string-value="9">
            <text:p>9</text:p>
          </table:table-cell>
          <table:table-cell table:style-name="ce9"/>
          <table:table-cell table:style-name="ce11" table:formula="of:=VLOOKUP([.B22];[Listado.$A$2:.$D$19];4;0)" office:value-type="float" office:value="0">
            <text:p>#N/D</text:p>
          </table:table-cell>
          <table:table-cell table:style-name="ce11" table:formula="of:=VLOOKUP([.C22];[Listado.$A$2:.$D$19];4;0)" office:value-type="float" office:value="0">
            <text:p>#N/D</text:p>
          </table:table-cell>
          <table:table-cell table:style-name="ce11" table:formula="of:=VLOOKUP([.D22];[Listado.$A$2:.$D$19];4;0)" office:value-type="float" office:value="0">
            <text:p>#N/D</text:p>
          </table:table-cell>
          <table:table-cell table:style-name="ce11" table:formula="of:=VLOOKUP([.E22];[Listado.$A$2:.$D$19];4;0)" office:value-type="float" office:value="0">
            <text:p>#N/D</text:p>
          </table:table-cell>
          <table:table-cell table:style-name="ce11" table:formula="of:=VLOOKUP([.H22];[Listado.$A$2:.$D$19];4;0)" office:value-type="float" office:value="0">
            <text:p>#N/D</text:p>
          </table:table-cell>
          <table:table-cell table:style-name="ce11" table:formula="of:=COUNTIF([.J22:.M22];[.N2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063. Indica cuál es la cifra de las CENT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3];0;[.F23])" office:value-type="string" office:string-value="0">
            <text:p>0</text:p>
          </table:table-cell>
          <table:table-cell table:style-name="ce9"/>
          <table:table-cell table:style-name="ce11" table:formula="of:=VLOOKUP([.B23];[Listado.$A$2:.$D$19];4;0)" office:value-type="float" office:value="0">
            <text:p>#N/D</text:p>
          </table:table-cell>
          <table:table-cell table:style-name="ce11" table:formula="of:=VLOOKUP([.C23];[Listado.$A$2:.$D$19];4;0)" office:value-type="float" office:value="0">
            <text:p>#N/D</text:p>
          </table:table-cell>
          <table:table-cell table:style-name="ce11" table:formula="of:=VLOOKUP([.D23];[Listado.$A$2:.$D$19];4;0)" office:value-type="float" office:value="0">
            <text:p>#N/D</text:p>
          </table:table-cell>
          <table:table-cell table:style-name="ce11" table:formula="of:=VLOOKUP([.E23];[Listado.$A$2:.$D$19];4;0)" office:value-type="float" office:value="0">
            <text:p>#N/D</text:p>
          </table:table-cell>
          <table:table-cell table:style-name="ce11" table:formula="of:=VLOOKUP([.H23];[Listado.$A$2:.$D$19];4;0)" office:value-type="float" office:value="0">
            <text:p>#N/D</text:p>
          </table:table-cell>
          <table:table-cell table:style-name="ce11" table:formula="of:=COUNTIF([.J23:.M23];[.N2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8136. Indica cuál es la cifra de las CENT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4];0;[.F24])" office:value-type="string" office:string-value="1">
            <text:p>1</text:p>
          </table:table-cell>
          <table:table-cell table:style-name="ce9"/>
          <table:table-cell table:style-name="ce11" table:formula="of:=VLOOKUP([.B24];[Listado.$A$2:.$D$19];4;0)" office:value-type="float" office:value="0">
            <text:p>#N/D</text:p>
          </table:table-cell>
          <table:table-cell table:style-name="ce11" table:formula="of:=VLOOKUP([.C24];[Listado.$A$2:.$D$19];4;0)" office:value-type="float" office:value="0">
            <text:p>#N/D</text:p>
          </table:table-cell>
          <table:table-cell table:style-name="ce11" table:formula="of:=VLOOKUP([.D24];[Listado.$A$2:.$D$19];4;0)" office:value-type="float" office:value="0">
            <text:p>#N/D</text:p>
          </table:table-cell>
          <table:table-cell table:style-name="ce11" table:formula="of:=VLOOKUP([.E24];[Listado.$A$2:.$D$19];4;0)" office:value-type="float" office:value="0">
            <text:p>#N/D</text:p>
          </table:table-cell>
          <table:table-cell table:style-name="ce11" table:formula="of:=VLOOKUP([.H24];[Listado.$A$2:.$D$19];4;0)" office:value-type="float" office:value="0">
            <text:p>#N/D</text:p>
          </table:table-cell>
          <table:table-cell table:style-name="ce11" table:formula="of:=COUNTIF([.J24:.M24];[.N2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2130. Indica cuál es la cifra de las CENT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5];0;[.F25])" office:value-type="string" office:string-value="1">
            <text:p>1</text:p>
          </table:table-cell>
          <table:table-cell table:style-name="ce9"/>
          <table:table-cell table:style-name="ce11" table:formula="of:=VLOOKUP([.B25];[Listado.$A$2:.$D$19];4;0)" office:value-type="float" office:value="0">
            <text:p>#N/D</text:p>
          </table:table-cell>
          <table:table-cell table:style-name="ce11" table:formula="of:=VLOOKUP([.C25];[Listado.$A$2:.$D$19];4;0)" office:value-type="float" office:value="0">
            <text:p>#N/D</text:p>
          </table:table-cell>
          <table:table-cell table:style-name="ce11" table:formula="of:=VLOOKUP([.D25];[Listado.$A$2:.$D$19];4;0)" office:value-type="float" office:value="0">
            <text:p>#N/D</text:p>
          </table:table-cell>
          <table:table-cell table:style-name="ce11" table:formula="of:=VLOOKUP([.E25];[Listado.$A$2:.$D$19];4;0)" office:value-type="float" office:value="0">
            <text:p>#N/D</text:p>
          </table:table-cell>
          <table:table-cell table:style-name="ce11" table:formula="of:=VLOOKUP([.H25];[Listado.$A$2:.$D$19];4;0)" office:value-type="float" office:value="0">
            <text:p>#N/D</text:p>
          </table:table-cell>
          <table:table-cell table:style-name="ce11" table:formula="of:=COUNTIF([.J25:.M25];[.N2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251. Indica cuál es la cifra de las CENT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6];0;[.F26])" office:value-type="string" office:string-value="2">
            <text:p>2</text:p>
          </table:table-cell>
          <table:table-cell table:style-name="ce9"/>
          <table:table-cell table:style-name="ce11" table:formula="of:=VLOOKUP([.B26];[Listado.$A$2:.$D$19];4;0)" office:value-type="float" office:value="0">
            <text:p>#N/D</text:p>
          </table:table-cell>
          <table:table-cell table:style-name="ce11" table:formula="of:=VLOOKUP([.C26];[Listado.$A$2:.$D$19];4;0)" office:value-type="float" office:value="0">
            <text:p>#N/D</text:p>
          </table:table-cell>
          <table:table-cell table:style-name="ce11" table:formula="of:=VLOOKUP([.D26];[Listado.$A$2:.$D$19];4;0)" office:value-type="float" office:value="0">
            <text:p>#N/D</text:p>
          </table:table-cell>
          <table:table-cell table:style-name="ce11" table:formula="of:=VLOOKUP([.E26];[Listado.$A$2:.$D$19];4;0)" office:value-type="float" office:value="0">
            <text:p>#N/D</text:p>
          </table:table-cell>
          <table:table-cell table:style-name="ce11" table:formula="of:=VLOOKUP([.H26];[Listado.$A$2:.$D$19];4;0)" office:value-type="float" office:value="0">
            <text:p>#N/D</text:p>
          </table:table-cell>
          <table:table-cell table:style-name="ce11" table:formula="of:=COUNTIF([.J26:.M26];[.N2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278. Indica cuál es la cifra de las CENT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7];0;[.F27])" office:value-type="string" office:string-value="2">
            <text:p>2</text:p>
          </table:table-cell>
          <table:table-cell table:style-name="ce9"/>
          <table:table-cell table:style-name="ce11" table:formula="of:=VLOOKUP([.B27];[Listado.$A$2:.$D$19];4;0)" office:value-type="float" office:value="0">
            <text:p>#N/D</text:p>
          </table:table-cell>
          <table:table-cell table:style-name="ce11" table:formula="of:=VLOOKUP([.C27];[Listado.$A$2:.$D$19];4;0)" office:value-type="float" office:value="0">
            <text:p>#N/D</text:p>
          </table:table-cell>
          <table:table-cell table:style-name="ce11" table:formula="of:=VLOOKUP([.D27];[Listado.$A$2:.$D$19];4;0)" office:value-type="float" office:value="0">
            <text:p>#N/D</text:p>
          </table:table-cell>
          <table:table-cell table:style-name="ce11" table:formula="of:=VLOOKUP([.E27];[Listado.$A$2:.$D$19];4;0)" office:value-type="float" office:value="0">
            <text:p>#N/D</text:p>
          </table:table-cell>
          <table:table-cell table:style-name="ce11" table:formula="of:=VLOOKUP([.H27];[Listado.$A$2:.$D$19];4;0)" office:value-type="float" office:value="0">
            <text:p>#N/D</text:p>
          </table:table-cell>
          <table:table-cell table:style-name="ce11" table:formula="of:=COUNTIF([.J27:.M27];[.N2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548. Indica cuál es la cifra de las CENTENAS: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8];0;[.F28])" office:value-type="string" office:string-value="5">
            <text:p>5</text:p>
          </table:table-cell>
          <table:table-cell table:style-name="ce9"/>
          <table:table-cell table:style-name="ce11" table:formula="of:=VLOOKUP([.B28];[Listado.$A$2:.$D$19];4;0)" office:value-type="float" office:value="0">
            <text:p>#N/D</text:p>
          </table:table-cell>
          <table:table-cell table:style-name="ce11" table:formula="of:=VLOOKUP([.C28];[Listado.$A$2:.$D$19];4;0)" office:value-type="float" office:value="0">
            <text:p>#N/D</text:p>
          </table:table-cell>
          <table:table-cell table:style-name="ce11" table:formula="of:=VLOOKUP([.D28];[Listado.$A$2:.$D$19];4;0)" office:value-type="float" office:value="0">
            <text:p>#N/D</text:p>
          </table:table-cell>
          <table:table-cell table:style-name="ce11" table:formula="of:=VLOOKUP([.E28];[Listado.$A$2:.$D$19];4;0)" office:value-type="float" office:value="0">
            <text:p>#N/D</text:p>
          </table:table-cell>
          <table:table-cell table:style-name="ce11" table:formula="of:=VLOOKUP([.H28];[Listado.$A$2:.$D$19];4;0)" office:value-type="float" office:value="0">
            <text:p>#N/D</text:p>
          </table:table-cell>
          <table:table-cell table:style-name="ce11" table:formula="of:=COUNTIF([.J28:.M28];[.N2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720. Indica cuál es la cifra de las CENTENAS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29];0;[.F29])" office:value-type="string" office:string-value="7">
            <text:p>7</text:p>
          </table:table-cell>
          <table:table-cell table:style-name="ce9"/>
          <table:table-cell table:style-name="ce11" table:formula="of:=VLOOKUP([.B29];[Listado.$A$2:.$D$19];4;0)" office:value-type="float" office:value="0">
            <text:p>#N/D</text:p>
          </table:table-cell>
          <table:table-cell table:style-name="ce11" table:formula="of:=VLOOKUP([.C29];[Listado.$A$2:.$D$19];4;0)" office:value-type="float" office:value="0">
            <text:p>#N/D</text:p>
          </table:table-cell>
          <table:table-cell table:style-name="ce11" table:formula="of:=VLOOKUP([.D29];[Listado.$A$2:.$D$19];4;0)" office:value-type="float" office:value="0">
            <text:p>#N/D</text:p>
          </table:table-cell>
          <table:table-cell table:style-name="ce11" table:formula="of:=VLOOKUP([.E29];[Listado.$A$2:.$D$19];4;0)" office:value-type="float" office:value="0">
            <text:p>#N/D</text:p>
          </table:table-cell>
          <table:table-cell table:style-name="ce11" table:formula="of:=VLOOKUP([.H29];[Listado.$A$2:.$D$19];4;0)" office:value-type="float" office:value="0">
            <text:p>#N/D</text:p>
          </table:table-cell>
          <table:table-cell table:style-name="ce11" table:formula="of:=COUNTIF([.J29:.M29];[.N2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403. Indica cuál es la cifra de las CENTENA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0];0;[.F30])" office:value-type="string" office:string-value="4">
            <text:p>4</text:p>
          </table:table-cell>
          <table:table-cell table:style-name="ce9"/>
          <table:table-cell table:style-name="ce11" table:formula="of:=VLOOKUP([.B30];[Listado.$A$2:.$D$19];4;0)" office:value-type="float" office:value="0">
            <text:p>#N/D</text:p>
          </table:table-cell>
          <table:table-cell table:style-name="ce11" table:formula="of:=VLOOKUP([.C30];[Listado.$A$2:.$D$19];4;0)" office:value-type="float" office:value="0">
            <text:p>#N/D</text:p>
          </table:table-cell>
          <table:table-cell table:style-name="ce11" table:formula="of:=VLOOKUP([.D30];[Listado.$A$2:.$D$19];4;0)" office:value-type="float" office:value="0">
            <text:p>#N/D</text:p>
          </table:table-cell>
          <table:table-cell table:style-name="ce11" table:formula="of:=VLOOKUP([.E30];[Listado.$A$2:.$D$19];4;0)" office:value-type="float" office:value="0">
            <text:p>#N/D</text:p>
          </table:table-cell>
          <table:table-cell table:style-name="ce11" table:formula="of:=VLOOKUP([.H30];[Listado.$A$2:.$D$19];4;0)" office:value-type="float" office:value="0">
            <text:p>#N/D</text:p>
          </table:table-cell>
          <table:table-cell table:style-name="ce11" table:formula="of:=COUNTIF([.J30:.M30];[.N3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239. Indica cuál es la cifra de las CENT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1];0;[.F31])" office:value-type="string" office:string-value="2">
            <text:p>2</text:p>
          </table:table-cell>
          <table:table-cell table:style-name="ce9"/>
          <table:table-cell table:style-name="ce11" table:formula="of:=VLOOKUP([.B31];[Listado.$A$2:.$D$19];4;0)" office:value-type="float" office:value="0">
            <text:p>#N/D</text:p>
          </table:table-cell>
          <table:table-cell table:style-name="ce11" table:formula="of:=VLOOKUP([.C31];[Listado.$A$2:.$D$19];4;0)" office:value-type="float" office:value="0">
            <text:p>#N/D</text:p>
          </table:table-cell>
          <table:table-cell table:style-name="ce11" table:formula="of:=VLOOKUP([.D31];[Listado.$A$2:.$D$19];4;0)" office:value-type="float" office:value="0">
            <text:p>#N/D</text:p>
          </table:table-cell>
          <table:table-cell table:style-name="ce11" table:formula="of:=VLOOKUP([.E31];[Listado.$A$2:.$D$19];4;0)" office:value-type="float" office:value="0">
            <text:p>#N/D</text:p>
          </table:table-cell>
          <table:table-cell table:style-name="ce11" table:formula="of:=VLOOKUP([.H31];[Listado.$A$2:.$D$19];4;0)" office:value-type="float" office:value="0">
            <text:p>#N/D</text:p>
          </table:table-cell>
          <table:table-cell table:style-name="ce11" table:formula="of:=COUNTIF([.J31:.M31];[.N3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318. Indica cuál es la cifra de las CENT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2];0;[.F32])" office:value-type="string" office:string-value="3">
            <text:p>3</text:p>
          </table:table-cell>
          <table:table-cell table:style-name="ce9"/>
          <table:table-cell table:style-name="ce11" table:formula="of:=VLOOKUP([.B32];[Listado.$A$2:.$D$19];4;0)" office:value-type="float" office:value="0">
            <text:p>#N/D</text:p>
          </table:table-cell>
          <table:table-cell table:style-name="ce11" table:formula="of:=VLOOKUP([.C32];[Listado.$A$2:.$D$19];4;0)" office:value-type="float" office:value="0">
            <text:p>#N/D</text:p>
          </table:table-cell>
          <table:table-cell table:style-name="ce11" table:formula="of:=VLOOKUP([.D32];[Listado.$A$2:.$D$19];4;0)" office:value-type="float" office:value="0">
            <text:p>#N/D</text:p>
          </table:table-cell>
          <table:table-cell table:style-name="ce11" table:formula="of:=VLOOKUP([.E32];[Listado.$A$2:.$D$19];4;0)" office:value-type="float" office:value="0">
            <text:p>#N/D</text:p>
          </table:table-cell>
          <table:table-cell table:style-name="ce11" table:formula="of:=VLOOKUP([.H32];[Listado.$A$2:.$D$19];4;0)" office:value-type="float" office:value="0">
            <text:p>#N/D</text:p>
          </table:table-cell>
          <table:table-cell table:style-name="ce11" table:formula="of:=COUNTIF([.J32:.M32];[.N3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194. Indica cuál es la cifra de las CENT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3];0;[.F33])" office:value-type="string" office:string-value="1">
            <text:p>1</text:p>
          </table:table-cell>
          <table:table-cell table:style-name="ce9"/>
          <table:table-cell table:style-name="ce11" table:formula="of:=VLOOKUP([.B33];[Listado.$A$2:.$D$19];4;0)" office:value-type="float" office:value="0">
            <text:p>#N/D</text:p>
          </table:table-cell>
          <table:table-cell table:style-name="ce11" table:formula="of:=VLOOKUP([.C33];[Listado.$A$2:.$D$19];4;0)" office:value-type="float" office:value="0">
            <text:p>#N/D</text:p>
          </table:table-cell>
          <table:table-cell table:style-name="ce11" table:formula="of:=VLOOKUP([.D33];[Listado.$A$2:.$D$19];4;0)" office:value-type="float" office:value="0">
            <text:p>#N/D</text:p>
          </table:table-cell>
          <table:table-cell table:style-name="ce11" table:formula="of:=VLOOKUP([.E33];[Listado.$A$2:.$D$19];4;0)" office:value-type="float" office:value="0">
            <text:p>#N/D</text:p>
          </table:table-cell>
          <table:table-cell table:style-name="ce11" table:formula="of:=VLOOKUP([.H33];[Listado.$A$2:.$D$19];4;0)" office:value-type="float" office:value="0">
            <text:p>#N/D</text:p>
          </table:table-cell>
          <table:table-cell table:style-name="ce11" table:formula="of:=COUNTIF([.J33:.M33];[.N3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976. Indica cuál es la cifra de las CENT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4];0;[.F34])" office:value-type="string" office:string-value="9">
            <text:p>9</text:p>
          </table:table-cell>
          <table:table-cell table:style-name="ce9"/>
          <table:table-cell table:style-name="ce11" table:formula="of:=VLOOKUP([.B34];[Listado.$A$2:.$D$19];4;0)" office:value-type="float" office:value="0">
            <text:p>#N/D</text:p>
          </table:table-cell>
          <table:table-cell table:style-name="ce11" table:formula="of:=VLOOKUP([.C34];[Listado.$A$2:.$D$19];4;0)" office:value-type="float" office:value="0">
            <text:p>#N/D</text:p>
          </table:table-cell>
          <table:table-cell table:style-name="ce11" table:formula="of:=VLOOKUP([.D34];[Listado.$A$2:.$D$19];4;0)" office:value-type="float" office:value="0">
            <text:p>#N/D</text:p>
          </table:table-cell>
          <table:table-cell table:style-name="ce11" table:formula="of:=VLOOKUP([.E34];[Listado.$A$2:.$D$19];4;0)" office:value-type="float" office:value="0">
            <text:p>#N/D</text:p>
          </table:table-cell>
          <table:table-cell table:style-name="ce11" table:formula="of:=VLOOKUP([.H34];[Listado.$A$2:.$D$19];4;0)" office:value-type="float" office:value="0">
            <text:p>#N/D</text:p>
          </table:table-cell>
          <table:table-cell table:style-name="ce11" table:formula="of:=COUNTIF([.J34:.M34];[.N3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435. Indica cuál es la cifra de las CENTENAS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5];0;[.F35])" office:value-type="string" office:string-value="4">
            <text:p>4</text:p>
          </table:table-cell>
          <table:table-cell table:style-name="ce9"/>
          <table:table-cell table:style-name="ce11" table:formula="of:=VLOOKUP([.B35];[Listado.$A$2:.$D$19];4;0)" office:value-type="float" office:value="0">
            <text:p>#N/D</text:p>
          </table:table-cell>
          <table:table-cell table:style-name="ce11" table:formula="of:=VLOOKUP([.C35];[Listado.$A$2:.$D$19];4;0)" office:value-type="float" office:value="0">
            <text:p>#N/D</text:p>
          </table:table-cell>
          <table:table-cell table:style-name="ce11" table:formula="of:=VLOOKUP([.D35];[Listado.$A$2:.$D$19];4;0)" office:value-type="float" office:value="0">
            <text:p>#N/D</text:p>
          </table:table-cell>
          <table:table-cell table:style-name="ce11" table:formula="of:=VLOOKUP([.E35];[Listado.$A$2:.$D$19];4;0)" office:value-type="float" office:value="0">
            <text:p>#N/D</text:p>
          </table:table-cell>
          <table:table-cell table:style-name="ce11" table:formula="of:=VLOOKUP([.H35];[Listado.$A$2:.$D$19];4;0)" office:value-type="float" office:value="0">
            <text:p>#N/D</text:p>
          </table:table-cell>
          <table:table-cell table:style-name="ce11" table:formula="of:=COUNTIF([.J35:.M35];[.N3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925. Indica cuál es la cifra de las CENT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6];0;[.F36])" office:value-type="string" office:string-value="9">
            <text:p>9</text:p>
          </table:table-cell>
          <table:table-cell table:style-name="ce9"/>
          <table:table-cell table:style-name="ce11" table:formula="of:=VLOOKUP([.B36];[Listado.$A$2:.$D$19];4;0)" office:value-type="float" office:value="0">
            <text:p>#N/D</text:p>
          </table:table-cell>
          <table:table-cell table:style-name="ce11" table:formula="of:=VLOOKUP([.C36];[Listado.$A$2:.$D$19];4;0)" office:value-type="float" office:value="0">
            <text:p>#N/D</text:p>
          </table:table-cell>
          <table:table-cell table:style-name="ce11" table:formula="of:=VLOOKUP([.D36];[Listado.$A$2:.$D$19];4;0)" office:value-type="float" office:value="0">
            <text:p>#N/D</text:p>
          </table:table-cell>
          <table:table-cell table:style-name="ce11" table:formula="of:=VLOOKUP([.E36];[Listado.$A$2:.$D$19];4;0)" office:value-type="float" office:value="0">
            <text:p>#N/D</text:p>
          </table:table-cell>
          <table:table-cell table:style-name="ce11" table:formula="of:=VLOOKUP([.H36];[Listado.$A$2:.$D$19];4;0)" office:value-type="float" office:value="0">
            <text:p>#N/D</text:p>
          </table:table-cell>
          <table:table-cell table:style-name="ce11" table:formula="of:=COUNTIF([.J36:.M36];[.N3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8537. Indica cuál es la cifra de las CENTENA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7];0;[.F37])" office:value-type="string" office:string-value="5">
            <text:p>5</text:p>
          </table:table-cell>
          <table:table-cell table:style-name="ce9"/>
          <table:table-cell table:style-name="ce11" table:formula="of:=VLOOKUP([.B37];[Listado.$A$2:.$D$19];4;0)" office:value-type="float" office:value="0">
            <text:p>#N/D</text:p>
          </table:table-cell>
          <table:table-cell table:style-name="ce11" table:formula="of:=VLOOKUP([.C37];[Listado.$A$2:.$D$19];4;0)" office:value-type="float" office:value="0">
            <text:p>#N/D</text:p>
          </table:table-cell>
          <table:table-cell table:style-name="ce11" table:formula="of:=VLOOKUP([.D37];[Listado.$A$2:.$D$19];4;0)" office:value-type="float" office:value="0">
            <text:p>#N/D</text:p>
          </table:table-cell>
          <table:table-cell table:style-name="ce11" table:formula="of:=VLOOKUP([.E37];[Listado.$A$2:.$D$19];4;0)" office:value-type="float" office:value="0">
            <text:p>#N/D</text:p>
          </table:table-cell>
          <table:table-cell table:style-name="ce11" table:formula="of:=VLOOKUP([.H37];[Listado.$A$2:.$D$19];4;0)" office:value-type="float" office:value="0">
            <text:p>#N/D</text:p>
          </table:table-cell>
          <table:table-cell table:style-name="ce11" table:formula="of:=COUNTIF([.J37:.M37];[.N3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982. Indica cuál es la cifra de las CENT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8];0;[.F38])" office:value-type="string" office:string-value="9">
            <text:p>9</text:p>
          </table:table-cell>
          <table:table-cell table:style-name="ce9"/>
          <table:table-cell table:style-name="ce11" table:formula="of:=VLOOKUP([.B38];[Listado.$A$2:.$D$19];4;0)" office:value-type="float" office:value="0">
            <text:p>#N/D</text:p>
          </table:table-cell>
          <table:table-cell table:style-name="ce11" table:formula="of:=VLOOKUP([.C38];[Listado.$A$2:.$D$19];4;0)" office:value-type="float" office:value="0">
            <text:p>#N/D</text:p>
          </table:table-cell>
          <table:table-cell table:style-name="ce11" table:formula="of:=VLOOKUP([.D38];[Listado.$A$2:.$D$19];4;0)" office:value-type="float" office:value="0">
            <text:p>#N/D</text:p>
          </table:table-cell>
          <table:table-cell table:style-name="ce11" table:formula="of:=VLOOKUP([.E38];[Listado.$A$2:.$D$19];4;0)" office:value-type="float" office:value="0">
            <text:p>#N/D</text:p>
          </table:table-cell>
          <table:table-cell table:style-name="ce11" table:formula="of:=VLOOKUP([.H38];[Listado.$A$2:.$D$19];4;0)" office:value-type="float" office:value="0">
            <text:p>#N/D</text:p>
          </table:table-cell>
          <table:table-cell table:style-name="ce11" table:formula="of:=COUNTIF([.J38:.M38];[.N3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564. Indica cuál es la cifra de las CENTENA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centenas es la tercera de la parte entera contando desde la derecha.</text:p>
          </table:table-cell>
          <table:table-cell table:style-name="ce9" table:formula="of:=OFFSET([.A39];0;[.F39])" office:value-type="string" office:string-value="5">
            <text:p>5</text:p>
          </table:table-cell>
          <table:table-cell table:style-name="ce9"/>
          <table:table-cell table:style-name="ce11" table:formula="of:=VLOOKUP([.B39];[Listado.$A$2:.$D$19];4;0)" office:value-type="float" office:value="0">
            <text:p>#N/D</text:p>
          </table:table-cell>
          <table:table-cell table:style-name="ce11" table:formula="of:=VLOOKUP([.C39];[Listado.$A$2:.$D$19];4;0)" office:value-type="float" office:value="0">
            <text:p>#N/D</text:p>
          </table:table-cell>
          <table:table-cell table:style-name="ce11" table:formula="of:=VLOOKUP([.D39];[Listado.$A$2:.$D$19];4;0)" office:value-type="float" office:value="0">
            <text:p>#N/D</text:p>
          </table:table-cell>
          <table:table-cell table:style-name="ce11" table:formula="of:=VLOOKUP([.E39];[Listado.$A$2:.$D$19];4;0)" office:value-type="float" office:value="0">
            <text:p>#N/D</text:p>
          </table:table-cell>
          <table:table-cell table:style-name="ce11" table:formula="of:=VLOOKUP([.H39];[Listado.$A$2:.$D$19];4;0)" office:value-type="float" office:value="0">
            <text:p>#N/D</text:p>
          </table:table-cell>
          <table:table-cell table:style-name="ce11" table:formula="of:=COUNTIF([.J39:.M39];[.N3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2817. Indica cuál es la cifra de las DEC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7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0];0;[.F40])" office:value-type="string" office:string-value="1">
            <text:p>1</text:p>
          </table:table-cell>
          <table:table-cell table:style-name="ce9"/>
          <table:table-cell table:style-name="ce11" table:formula="of:=VLOOKUP([.B40];[Listado.$A$2:.$D$19];4;0)" office:value-type="float" office:value="0">
            <text:p>#N/D</text:p>
          </table:table-cell>
          <table:table-cell table:style-name="ce11" table:formula="of:=VLOOKUP([.C40];[Listado.$A$2:.$D$19];4;0)" office:value-type="float" office:value="0">
            <text:p>#N/D</text:p>
          </table:table-cell>
          <table:table-cell table:style-name="ce11" table:formula="of:=VLOOKUP([.D40];[Listado.$A$2:.$D$19];4;0)" office:value-type="float" office:value="0">
            <text:p>#N/D</text:p>
          </table:table-cell>
          <table:table-cell table:style-name="ce11" table:formula="of:=VLOOKUP([.E40];[Listado.$A$2:.$D$19];4;0)" office:value-type="float" office:value="0">
            <text:p>#N/D</text:p>
          </table:table-cell>
          <table:table-cell table:style-name="ce11" table:formula="of:=VLOOKUP([.H40];[Listado.$A$2:.$D$19];4;0)" office:value-type="float" office:value="0">
            <text:p>#N/D</text:p>
          </table:table-cell>
          <table:table-cell table:style-name="ce11" table:formula="of:=COUNTIF([.J40:.M40];[.N4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790. Indica cuál es la cifra de las DECENAS: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1];0;[.F41])" office:value-type="string" office:string-value="9">
            <text:p>9</text:p>
          </table:table-cell>
          <table:table-cell table:style-name="ce9"/>
          <table:table-cell table:style-name="ce11" table:formula="of:=VLOOKUP([.B41];[Listado.$A$2:.$D$19];4;0)" office:value-type="float" office:value="0">
            <text:p>#N/D</text:p>
          </table:table-cell>
          <table:table-cell table:style-name="ce11" table:formula="of:=VLOOKUP([.C41];[Listado.$A$2:.$D$19];4;0)" office:value-type="float" office:value="0">
            <text:p>#N/D</text:p>
          </table:table-cell>
          <table:table-cell table:style-name="ce11" table:formula="of:=VLOOKUP([.D41];[Listado.$A$2:.$D$19];4;0)" office:value-type="float" office:value="0">
            <text:p>#N/D</text:p>
          </table:table-cell>
          <table:table-cell table:style-name="ce11" table:formula="of:=VLOOKUP([.E41];[Listado.$A$2:.$D$19];4;0)" office:value-type="float" office:value="0">
            <text:p>#N/D</text:p>
          </table:table-cell>
          <table:table-cell table:style-name="ce11" table:formula="of:=VLOOKUP([.H41];[Listado.$A$2:.$D$19];4;0)" office:value-type="float" office:value="0">
            <text:p>#N/D</text:p>
          </table:table-cell>
          <table:table-cell table:style-name="ce11" table:formula="of:=COUNTIF([.J41:.M41];[.N4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916. Indica cuál es la cifra de las DEC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2];0;[.F42])" office:value-type="string" office:string-value="1">
            <text:p>1</text:p>
          </table:table-cell>
          <table:table-cell table:style-name="ce9"/>
          <table:table-cell table:style-name="ce11" table:formula="of:=VLOOKUP([.B42];[Listado.$A$2:.$D$19];4;0)" office:value-type="float" office:value="0">
            <text:p>#N/D</text:p>
          </table:table-cell>
          <table:table-cell table:style-name="ce11" table:formula="of:=VLOOKUP([.C42];[Listado.$A$2:.$D$19];4;0)" office:value-type="float" office:value="0">
            <text:p>#N/D</text:p>
          </table:table-cell>
          <table:table-cell table:style-name="ce11" table:formula="of:=VLOOKUP([.D42];[Listado.$A$2:.$D$19];4;0)" office:value-type="float" office:value="0">
            <text:p>#N/D</text:p>
          </table:table-cell>
          <table:table-cell table:style-name="ce11" table:formula="of:=VLOOKUP([.E42];[Listado.$A$2:.$D$19];4;0)" office:value-type="float" office:value="0">
            <text:p>#N/D</text:p>
          </table:table-cell>
          <table:table-cell table:style-name="ce11" table:formula="of:=VLOOKUP([.H42];[Listado.$A$2:.$D$19];4;0)" office:value-type="float" office:value="0">
            <text:p>#N/D</text:p>
          </table:table-cell>
          <table:table-cell table:style-name="ce11" table:formula="of:=COUNTIF([.J42:.M42];[.N4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8671. Indica cuál es la cifra de las DEC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3];0;[.F43])" office:value-type="string" office:string-value="7">
            <text:p>7</text:p>
          </table:table-cell>
          <table:table-cell table:style-name="ce9"/>
          <table:table-cell table:style-name="ce11" table:formula="of:=VLOOKUP([.B43];[Listado.$A$2:.$D$19];4;0)" office:value-type="float" office:value="0">
            <text:p>#N/D</text:p>
          </table:table-cell>
          <table:table-cell table:style-name="ce11" table:formula="of:=VLOOKUP([.C43];[Listado.$A$2:.$D$19];4;0)" office:value-type="float" office:value="0">
            <text:p>#N/D</text:p>
          </table:table-cell>
          <table:table-cell table:style-name="ce11" table:formula="of:=VLOOKUP([.D43];[Listado.$A$2:.$D$19];4;0)" office:value-type="float" office:value="0">
            <text:p>#N/D</text:p>
          </table:table-cell>
          <table:table-cell table:style-name="ce11" table:formula="of:=VLOOKUP([.E43];[Listado.$A$2:.$D$19];4;0)" office:value-type="float" office:value="0">
            <text:p>#N/D</text:p>
          </table:table-cell>
          <table:table-cell table:style-name="ce11" table:formula="of:=VLOOKUP([.H43];[Listado.$A$2:.$D$19];4;0)" office:value-type="float" office:value="0">
            <text:p>#N/D</text:p>
          </table:table-cell>
          <table:table-cell table:style-name="ce11" table:formula="of:=COUNTIF([.J43:.M43];[.N4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340. Indica cuál es la cifra de las DECENAS: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4];0;[.F44])" office:value-type="string" office:string-value="4">
            <text:p>4</text:p>
          </table:table-cell>
          <table:table-cell table:style-name="ce9"/>
          <table:table-cell table:style-name="ce11" table:formula="of:=VLOOKUP([.B44];[Listado.$A$2:.$D$19];4;0)" office:value-type="float" office:value="0">
            <text:p>#N/D</text:p>
          </table:table-cell>
          <table:table-cell table:style-name="ce11" table:formula="of:=VLOOKUP([.C44];[Listado.$A$2:.$D$19];4;0)" office:value-type="float" office:value="0">
            <text:p>#N/D</text:p>
          </table:table-cell>
          <table:table-cell table:style-name="ce11" table:formula="of:=VLOOKUP([.D44];[Listado.$A$2:.$D$19];4;0)" office:value-type="float" office:value="0">
            <text:p>#N/D</text:p>
          </table:table-cell>
          <table:table-cell table:style-name="ce11" table:formula="of:=VLOOKUP([.E44];[Listado.$A$2:.$D$19];4;0)" office:value-type="float" office:value="0">
            <text:p>#N/D</text:p>
          </table:table-cell>
          <table:table-cell table:style-name="ce11" table:formula="of:=VLOOKUP([.H44];[Listado.$A$2:.$D$19];4;0)" office:value-type="float" office:value="0">
            <text:p>#N/D</text:p>
          </table:table-cell>
          <table:table-cell table:style-name="ce11" table:formula="of:=COUNTIF([.J44:.M44];[.N4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410. Indica cuál es la cifra de las DECENA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5];0;[.F45])" office:value-type="string" office:string-value="1">
            <text:p>1</text:p>
          </table:table-cell>
          <table:table-cell table:style-name="ce9"/>
          <table:table-cell table:style-name="ce11" table:formula="of:=VLOOKUP([.B45];[Listado.$A$2:.$D$19];4;0)" office:value-type="float" office:value="0">
            <text:p>#N/D</text:p>
          </table:table-cell>
          <table:table-cell table:style-name="ce11" table:formula="of:=VLOOKUP([.C45];[Listado.$A$2:.$D$19];4;0)" office:value-type="float" office:value="0">
            <text:p>#N/D</text:p>
          </table:table-cell>
          <table:table-cell table:style-name="ce11" table:formula="of:=VLOOKUP([.D45];[Listado.$A$2:.$D$19];4;0)" office:value-type="float" office:value="0">
            <text:p>#N/D</text:p>
          </table:table-cell>
          <table:table-cell table:style-name="ce11" table:formula="of:=VLOOKUP([.E45];[Listado.$A$2:.$D$19];4;0)" office:value-type="float" office:value="0">
            <text:p>#N/D</text:p>
          </table:table-cell>
          <table:table-cell table:style-name="ce11" table:formula="of:=VLOOKUP([.H45];[Listado.$A$2:.$D$19];4;0)" office:value-type="float" office:value="0">
            <text:p>#N/D</text:p>
          </table:table-cell>
          <table:table-cell table:style-name="ce11" table:formula="of:=COUNTIF([.J45:.M45];[.N4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423. Indica cuál es la cifra de las DECENAS: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6];0;[.F46])" office:value-type="string" office:string-value="2">
            <text:p>2</text:p>
          </table:table-cell>
          <table:table-cell table:style-name="ce9"/>
          <table:table-cell table:style-name="ce11" table:formula="of:=VLOOKUP([.B46];[Listado.$A$2:.$D$19];4;0)" office:value-type="float" office:value="0">
            <text:p>#N/D</text:p>
          </table:table-cell>
          <table:table-cell table:style-name="ce11" table:formula="of:=VLOOKUP([.C46];[Listado.$A$2:.$D$19];4;0)" office:value-type="float" office:value="0">
            <text:p>#N/D</text:p>
          </table:table-cell>
          <table:table-cell table:style-name="ce11" table:formula="of:=VLOOKUP([.D46];[Listado.$A$2:.$D$19];4;0)" office:value-type="float" office:value="0">
            <text:p>#N/D</text:p>
          </table:table-cell>
          <table:table-cell table:style-name="ce11" table:formula="of:=VLOOKUP([.E46];[Listado.$A$2:.$D$19];4;0)" office:value-type="float" office:value="0">
            <text:p>#N/D</text:p>
          </table:table-cell>
          <table:table-cell table:style-name="ce11" table:formula="of:=VLOOKUP([.H46];[Listado.$A$2:.$D$19];4;0)" office:value-type="float" office:value="0">
            <text:p>#N/D</text:p>
          </table:table-cell>
          <table:table-cell table:style-name="ce11" table:formula="of:=COUNTIF([.J46:.M46];[.N4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8241. Indica cuál es la cifra de las DEC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7];0;[.F47])" office:value-type="string" office:string-value="4">
            <text:p>4</text:p>
          </table:table-cell>
          <table:table-cell table:style-name="ce9"/>
          <table:table-cell table:style-name="ce11" table:formula="of:=VLOOKUP([.B47];[Listado.$A$2:.$D$19];4;0)" office:value-type="float" office:value="0">
            <text:p>#N/D</text:p>
          </table:table-cell>
          <table:table-cell table:style-name="ce11" table:formula="of:=VLOOKUP([.C47];[Listado.$A$2:.$D$19];4;0)" office:value-type="float" office:value="0">
            <text:p>#N/D</text:p>
          </table:table-cell>
          <table:table-cell table:style-name="ce11" table:formula="of:=VLOOKUP([.D47];[Listado.$A$2:.$D$19];4;0)" office:value-type="float" office:value="0">
            <text:p>#N/D</text:p>
          </table:table-cell>
          <table:table-cell table:style-name="ce11" table:formula="of:=VLOOKUP([.E47];[Listado.$A$2:.$D$19];4;0)" office:value-type="float" office:value="0">
            <text:p>#N/D</text:p>
          </table:table-cell>
          <table:table-cell table:style-name="ce11" table:formula="of:=VLOOKUP([.H47];[Listado.$A$2:.$D$19];4;0)" office:value-type="float" office:value="0">
            <text:p>#N/D</text:p>
          </table:table-cell>
          <table:table-cell table:style-name="ce11" table:formula="of:=COUNTIF([.J47:.M47];[.N4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364. Indica cuál es la cifra de las DECENAS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8];0;[.F48])" office:value-type="string" office:string-value="6">
            <text:p>6</text:p>
          </table:table-cell>
          <table:table-cell table:style-name="ce9"/>
          <table:table-cell table:style-name="ce11" table:formula="of:=VLOOKUP([.B48];[Listado.$A$2:.$D$19];4;0)" office:value-type="float" office:value="0">
            <text:p>#N/D</text:p>
          </table:table-cell>
          <table:table-cell table:style-name="ce11" table:formula="of:=VLOOKUP([.C48];[Listado.$A$2:.$D$19];4;0)" office:value-type="float" office:value="0">
            <text:p>#N/D</text:p>
          </table:table-cell>
          <table:table-cell table:style-name="ce11" table:formula="of:=VLOOKUP([.D48];[Listado.$A$2:.$D$19];4;0)" office:value-type="float" office:value="0">
            <text:p>#N/D</text:p>
          </table:table-cell>
          <table:table-cell table:style-name="ce11" table:formula="of:=VLOOKUP([.E48];[Listado.$A$2:.$D$19];4;0)" office:value-type="float" office:value="0">
            <text:p>#N/D</text:p>
          </table:table-cell>
          <table:table-cell table:style-name="ce11" table:formula="of:=VLOOKUP([.H48];[Listado.$A$2:.$D$19];4;0)" office:value-type="float" office:value="0">
            <text:p>#N/D</text:p>
          </table:table-cell>
          <table:table-cell table:style-name="ce11" table:formula="of:=COUNTIF([.J48:.M48];[.N4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958. Indica cuál es la cifra de las DECENAS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49];0;[.F49])" office:value-type="string" office:string-value="5">
            <text:p>5</text:p>
          </table:table-cell>
          <table:table-cell table:style-name="ce9"/>
          <table:table-cell table:style-name="ce11" table:formula="of:=VLOOKUP([.B49];[Listado.$A$2:.$D$19];4;0)" office:value-type="float" office:value="0">
            <text:p>#N/D</text:p>
          </table:table-cell>
          <table:table-cell table:style-name="ce11" table:formula="of:=VLOOKUP([.C49];[Listado.$A$2:.$D$19];4;0)" office:value-type="float" office:value="0">
            <text:p>#N/D</text:p>
          </table:table-cell>
          <table:table-cell table:style-name="ce11" table:formula="of:=VLOOKUP([.D49];[Listado.$A$2:.$D$19];4;0)" office:value-type="float" office:value="0">
            <text:p>#N/D</text:p>
          </table:table-cell>
          <table:table-cell table:style-name="ce11" table:formula="of:=VLOOKUP([.E49];[Listado.$A$2:.$D$19];4;0)" office:value-type="float" office:value="0">
            <text:p>#N/D</text:p>
          </table:table-cell>
          <table:table-cell table:style-name="ce11" table:formula="of:=VLOOKUP([.H49];[Listado.$A$2:.$D$19];4;0)" office:value-type="float" office:value="0">
            <text:p>#N/D</text:p>
          </table:table-cell>
          <table:table-cell table:style-name="ce11" table:formula="of:=COUNTIF([.J49:.M49];[.N4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860. Indica cuál es la cifra de las DECENA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0];0;[.F50])" office:value-type="string" office:string-value="6">
            <text:p>6</text:p>
          </table:table-cell>
          <table:table-cell table:style-name="ce9"/>
          <table:table-cell table:style-name="ce11" table:formula="of:=VLOOKUP([.B50];[Listado.$A$2:.$D$19];4;0)" office:value-type="float" office:value="0">
            <text:p>#N/D</text:p>
          </table:table-cell>
          <table:table-cell table:style-name="ce11" table:formula="of:=VLOOKUP([.C50];[Listado.$A$2:.$D$19];4;0)" office:value-type="float" office:value="0">
            <text:p>#N/D</text:p>
          </table:table-cell>
          <table:table-cell table:style-name="ce11" table:formula="of:=VLOOKUP([.D50];[Listado.$A$2:.$D$19];4;0)" office:value-type="float" office:value="0">
            <text:p>#N/D</text:p>
          </table:table-cell>
          <table:table-cell table:style-name="ce11" table:formula="of:=VLOOKUP([.E50];[Listado.$A$2:.$D$19];4;0)" office:value-type="float" office:value="0">
            <text:p>#N/D</text:p>
          </table:table-cell>
          <table:table-cell table:style-name="ce11" table:formula="of:=VLOOKUP([.H50];[Listado.$A$2:.$D$19];4;0)" office:value-type="float" office:value="0">
            <text:p>#N/D</text:p>
          </table:table-cell>
          <table:table-cell table:style-name="ce11" table:formula="of:=COUNTIF([.J50:.M50];[.N5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234. Indica cuál es la cifra de las DECENA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1];0;[.F51])" office:value-type="string" office:string-value="3">
            <text:p>3</text:p>
          </table:table-cell>
          <table:table-cell table:style-name="ce9"/>
          <table:table-cell table:style-name="ce11" table:formula="of:=VLOOKUP([.B51];[Listado.$A$2:.$D$19];4;0)" office:value-type="float" office:value="0">
            <text:p>#N/D</text:p>
          </table:table-cell>
          <table:table-cell table:style-name="ce11" table:formula="of:=VLOOKUP([.C51];[Listado.$A$2:.$D$19];4;0)" office:value-type="float" office:value="0">
            <text:p>#N/D</text:p>
          </table:table-cell>
          <table:table-cell table:style-name="ce11" table:formula="of:=VLOOKUP([.D51];[Listado.$A$2:.$D$19];4;0)" office:value-type="float" office:value="0">
            <text:p>#N/D</text:p>
          </table:table-cell>
          <table:table-cell table:style-name="ce11" table:formula="of:=VLOOKUP([.E51];[Listado.$A$2:.$D$19];4;0)" office:value-type="float" office:value="0">
            <text:p>#N/D</text:p>
          </table:table-cell>
          <table:table-cell table:style-name="ce11" table:formula="of:=VLOOKUP([.H51];[Listado.$A$2:.$D$19];4;0)" office:value-type="float" office:value="0">
            <text:p>#N/D</text:p>
          </table:table-cell>
          <table:table-cell table:style-name="ce11" table:formula="of:=COUNTIF([.J51:.M51];[.N5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285. Indica cuál es la cifra de las DECENAS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7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2];0;[.F52])" office:value-type="string" office:string-value="8">
            <text:p>8</text:p>
          </table:table-cell>
          <table:table-cell table:style-name="ce9"/>
          <table:table-cell table:style-name="ce11" table:formula="of:=VLOOKUP([.B52];[Listado.$A$2:.$D$19];4;0)" office:value-type="float" office:value="0">
            <text:p>#N/D</text:p>
          </table:table-cell>
          <table:table-cell table:style-name="ce11" table:formula="of:=VLOOKUP([.C52];[Listado.$A$2:.$D$19];4;0)" office:value-type="float" office:value="0">
            <text:p>#N/D</text:p>
          </table:table-cell>
          <table:table-cell table:style-name="ce11" table:formula="of:=VLOOKUP([.D52];[Listado.$A$2:.$D$19];4;0)" office:value-type="float" office:value="0">
            <text:p>#N/D</text:p>
          </table:table-cell>
          <table:table-cell table:style-name="ce11" table:formula="of:=VLOOKUP([.E52];[Listado.$A$2:.$D$19];4;0)" office:value-type="float" office:value="0">
            <text:p>#N/D</text:p>
          </table:table-cell>
          <table:table-cell table:style-name="ce11" table:formula="of:=VLOOKUP([.H52];[Listado.$A$2:.$D$19];4;0)" office:value-type="float" office:value="0">
            <text:p>#N/D</text:p>
          </table:table-cell>
          <table:table-cell table:style-name="ce11" table:formula="of:=COUNTIF([.J52:.M52];[.N5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8532. Indica cuál es la cifra de las DEC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formula="of:=OFFSET([.A53];0;[.F53])" office:value-type="string" office:string-value="3">
            <text:p>3</text:p>
          </table:table-cell>
          <table:table-cell/>
          <table:table-cell table:style-name="ce10" table:formula="of:=VLOOKUP([.B53];[Listado.$A$2:.$D$19];4;0)" office:value-type="float" office:value="0">
            <text:p>#N/D</text:p>
          </table:table-cell>
          <table:table-cell table:style-name="ce10" table:formula="of:=VLOOKUP([.C53];[Listado.$A$2:.$D$19];4;0)" office:value-type="float" office:value="0">
            <text:p>#N/D</text:p>
          </table:table-cell>
          <table:table-cell table:style-name="ce10" table:formula="of:=VLOOKUP([.D53];[Listado.$A$2:.$D$19];4;0)" office:value-type="float" office:value="0">
            <text:p>#N/D</text:p>
          </table:table-cell>
          <table:table-cell table:style-name="ce10" table:formula="of:=VLOOKUP([.E53];[Listado.$A$2:.$D$19];4;0)" office:value-type="float" office:value="0">
            <text:p>#N/D</text:p>
          </table:table-cell>
          <table:table-cell table:style-name="ce10" table:formula="of:=VLOOKUP([.H53];[Listado.$A$2:.$D$19];4;0)" office:value-type="float" office:value="0">
            <text:p>#N/D</text:p>
          </table:table-cell>
          <table:table-cell table:style-name="ce10" table:formula="of:=COUNTIF([.J53:.M53];[.N53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4257. Indica cuál es la cifra de las DECENAS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4];0;[.F54])" office:value-type="string" office:string-value="5">
            <text:p>5</text:p>
          </table:table-cell>
          <table:table-cell table:style-name="ce9"/>
          <table:table-cell table:style-name="ce11" table:formula="of:=VLOOKUP([.B54];[Listado.$A$2:.$D$19];4;0)" office:value-type="float" office:value="0">
            <text:p>#N/D</text:p>
          </table:table-cell>
          <table:table-cell table:style-name="ce11" table:formula="of:=VLOOKUP([.C54];[Listado.$A$2:.$D$19];4;0)" office:value-type="float" office:value="0">
            <text:p>#N/D</text:p>
          </table:table-cell>
          <table:table-cell table:style-name="ce11" table:formula="of:=VLOOKUP([.D54];[Listado.$A$2:.$D$19];4;0)" office:value-type="float" office:value="0">
            <text:p>#N/D</text:p>
          </table:table-cell>
          <table:table-cell table:style-name="ce11" table:formula="of:=VLOOKUP([.E54];[Listado.$A$2:.$D$19];4;0)" office:value-type="float" office:value="0">
            <text:p>#N/D</text:p>
          </table:table-cell>
          <table:table-cell table:style-name="ce11" table:formula="of:=VLOOKUP([.H54];[Listado.$A$2:.$D$19];4;0)" office:value-type="float" office:value="0">
            <text:p>#N/D</text:p>
          </table:table-cell>
          <table:table-cell table:style-name="ce11" table:formula="of:=COUNTIF([.J54:.M54];[.N5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421. Indica cuál es la cifra de las DEC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5];0;[.F55])" office:value-type="string" office:string-value="2">
            <text:p>2</text:p>
          </table:table-cell>
          <table:table-cell table:style-name="ce9"/>
          <table:table-cell table:style-name="ce11" table:formula="of:=VLOOKUP([.B55];[Listado.$A$2:.$D$19];4;0)" office:value-type="float" office:value="0">
            <text:p>#N/D</text:p>
          </table:table-cell>
          <table:table-cell table:style-name="ce11" table:formula="of:=VLOOKUP([.C55];[Listado.$A$2:.$D$19];4;0)" office:value-type="float" office:value="0">
            <text:p>#N/D</text:p>
          </table:table-cell>
          <table:table-cell table:style-name="ce11" table:formula="of:=VLOOKUP([.D55];[Listado.$A$2:.$D$19];4;0)" office:value-type="float" office:value="0">
            <text:p>#N/D</text:p>
          </table:table-cell>
          <table:table-cell table:style-name="ce11" table:formula="of:=VLOOKUP([.E55];[Listado.$A$2:.$D$19];4;0)" office:value-type="float" office:value="0">
            <text:p>#N/D</text:p>
          </table:table-cell>
          <table:table-cell table:style-name="ce11" table:formula="of:=VLOOKUP([.H55];[Listado.$A$2:.$D$19];4;0)" office:value-type="float" office:value="0">
            <text:p>#N/D</text:p>
          </table:table-cell>
          <table:table-cell table:style-name="ce11" table:formula="of:=COUNTIF([.J55:.M55];[.N5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8960. Indica cuál es la cifra de las DECENA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6];0;[.F56])" office:value-type="string" office:string-value="6">
            <text:p>6</text:p>
          </table:table-cell>
          <table:table-cell table:style-name="ce9"/>
          <table:table-cell table:style-name="ce11" table:formula="of:=VLOOKUP([.B56];[Listado.$A$2:.$D$19];4;0)" office:value-type="float" office:value="0">
            <text:p>#N/D</text:p>
          </table:table-cell>
          <table:table-cell table:style-name="ce11" table:formula="of:=VLOOKUP([.C56];[Listado.$A$2:.$D$19];4;0)" office:value-type="float" office:value="0">
            <text:p>#N/D</text:p>
          </table:table-cell>
          <table:table-cell table:style-name="ce11" table:formula="of:=VLOOKUP([.D56];[Listado.$A$2:.$D$19];4;0)" office:value-type="float" office:value="0">
            <text:p>#N/D</text:p>
          </table:table-cell>
          <table:table-cell table:style-name="ce11" table:formula="of:=VLOOKUP([.E56];[Listado.$A$2:.$D$19];4;0)" office:value-type="float" office:value="0">
            <text:p>#N/D</text:p>
          </table:table-cell>
          <table:table-cell table:style-name="ce11" table:formula="of:=VLOOKUP([.H56];[Listado.$A$2:.$D$19];4;0)" office:value-type="float" office:value="0">
            <text:p>#N/D</text:p>
          </table:table-cell>
          <table:table-cell table:style-name="ce11" table:formula="of:=COUNTIF([.J56:.M56];[.N5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219. Indica cuál es la cifra de las DECENA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9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7];0;[.F57])" office:value-type="string" office:string-value="1">
            <text:p>1</text:p>
          </table:table-cell>
          <table:table-cell table:style-name="ce9"/>
          <table:table-cell table:style-name="ce11" table:formula="of:=VLOOKUP([.B57];[Listado.$A$2:.$D$19];4;0)" office:value-type="float" office:value="0">
            <text:p>#N/D</text:p>
          </table:table-cell>
          <table:table-cell table:style-name="ce11" table:formula="of:=VLOOKUP([.C57];[Listado.$A$2:.$D$19];4;0)" office:value-type="float" office:value="0">
            <text:p>#N/D</text:p>
          </table:table-cell>
          <table:table-cell table:style-name="ce11" table:formula="of:=VLOOKUP([.D57];[Listado.$A$2:.$D$19];4;0)" office:value-type="float" office:value="0">
            <text:p>#N/D</text:p>
          </table:table-cell>
          <table:table-cell table:style-name="ce11" table:formula="of:=VLOOKUP([.E57];[Listado.$A$2:.$D$19];4;0)" office:value-type="float" office:value="0">
            <text:p>#N/D</text:p>
          </table:table-cell>
          <table:table-cell table:style-name="ce11" table:formula="of:=VLOOKUP([.H57];[Listado.$A$2:.$D$19];4;0)" office:value-type="float" office:value="0">
            <text:p>#N/D</text:p>
          </table:table-cell>
          <table:table-cell table:style-name="ce11" table:formula="of:=COUNTIF([.J57:.M57];[.N5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8042. Indica cuál es la cifra de las DECENAS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8];0;[.F58])" office:value-type="string" office:string-value="4">
            <text:p>4</text:p>
          </table:table-cell>
          <table:table-cell table:style-name="ce9"/>
          <table:table-cell table:style-name="ce11" table:formula="of:=VLOOKUP([.B58];[Listado.$A$2:.$D$19];4;0)" office:value-type="float" office:value="0">
            <text:p>#N/D</text:p>
          </table:table-cell>
          <table:table-cell table:style-name="ce11" table:formula="of:=VLOOKUP([.C58];[Listado.$A$2:.$D$19];4;0)" office:value-type="float" office:value="0">
            <text:p>#N/D</text:p>
          </table:table-cell>
          <table:table-cell table:style-name="ce11" table:formula="of:=VLOOKUP([.D58];[Listado.$A$2:.$D$19];4;0)" office:value-type="float" office:value="0">
            <text:p>#N/D</text:p>
          </table:table-cell>
          <table:table-cell table:style-name="ce11" table:formula="of:=VLOOKUP([.E58];[Listado.$A$2:.$D$19];4;0)" office:value-type="float" office:value="0">
            <text:p>#N/D</text:p>
          </table:table-cell>
          <table:table-cell table:style-name="ce11" table:formula="of:=VLOOKUP([.H58];[Listado.$A$2:.$D$19];4;0)" office:value-type="float" office:value="0">
            <text:p>#N/D</text:p>
          </table:table-cell>
          <table:table-cell table:style-name="ce11" table:formula="of:=COUNTIF([.J58:.M58];[.N5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417. Indica cuál es la cifra de las DEC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59];0;[.F59])" office:value-type="string" office:string-value="1">
            <text:p>1</text:p>
          </table:table-cell>
          <table:table-cell table:style-name="ce9"/>
          <table:table-cell table:style-name="ce11" table:formula="of:=VLOOKUP([.B59];[Listado.$A$2:.$D$19];4;0)" office:value-type="float" office:value="0">
            <text:p>#N/D</text:p>
          </table:table-cell>
          <table:table-cell table:style-name="ce11" table:formula="of:=VLOOKUP([.C59];[Listado.$A$2:.$D$19];4;0)" office:value-type="float" office:value="0">
            <text:p>#N/D</text:p>
          </table:table-cell>
          <table:table-cell table:style-name="ce11" table:formula="of:=VLOOKUP([.D59];[Listado.$A$2:.$D$19];4;0)" office:value-type="float" office:value="0">
            <text:p>#N/D</text:p>
          </table:table-cell>
          <table:table-cell table:style-name="ce11" table:formula="of:=VLOOKUP([.E59];[Listado.$A$2:.$D$19];4;0)" office:value-type="float" office:value="0">
            <text:p>#N/D</text:p>
          </table:table-cell>
          <table:table-cell table:style-name="ce11" table:formula="of:=VLOOKUP([.H59];[Listado.$A$2:.$D$19];4;0)" office:value-type="float" office:value="0">
            <text:p>#N/D</text:p>
          </table:table-cell>
          <table:table-cell table:style-name="ce11" table:formula="of:=COUNTIF([.J59:.M59];[.N5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893. Indica cuál es la cifra de las DECENAS: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9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0];0;[.F60])" office:value-type="string" office:string-value="9">
            <text:p>9</text:p>
          </table:table-cell>
          <table:table-cell table:style-name="ce9"/>
          <table:table-cell table:style-name="ce11" table:formula="of:=VLOOKUP([.B60];[Listado.$A$2:.$D$19];4;0)" office:value-type="float" office:value="0">
            <text:p>#N/D</text:p>
          </table:table-cell>
          <table:table-cell table:style-name="ce11" table:formula="of:=VLOOKUP([.C60];[Listado.$A$2:.$D$19];4;0)" office:value-type="float" office:value="0">
            <text:p>#N/D</text:p>
          </table:table-cell>
          <table:table-cell table:style-name="ce11" table:formula="of:=VLOOKUP([.D60];[Listado.$A$2:.$D$19];4;0)" office:value-type="float" office:value="0">
            <text:p>#N/D</text:p>
          </table:table-cell>
          <table:table-cell table:style-name="ce11" table:formula="of:=VLOOKUP([.E60];[Listado.$A$2:.$D$19];4;0)" office:value-type="float" office:value="0">
            <text:p>#N/D</text:p>
          </table:table-cell>
          <table:table-cell table:style-name="ce11" table:formula="of:=VLOOKUP([.H60];[Listado.$A$2:.$D$19];4;0)" office:value-type="float" office:value="0">
            <text:p>#N/D</text:p>
          </table:table-cell>
          <table:table-cell table:style-name="ce11" table:formula="of:=COUNTIF([.J60:.M60];[.N6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104. Indica cuál es la cifra de las DECENAS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3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1];0;[.F61])" office:value-type="string" office:string-value="0">
            <text:p>0</text:p>
          </table:table-cell>
          <table:table-cell table:style-name="ce9"/>
          <table:table-cell table:style-name="ce11" table:formula="of:=VLOOKUP([.B61];[Listado.$A$2:.$D$19];4;0)" office:value-type="float" office:value="0">
            <text:p>#N/D</text:p>
          </table:table-cell>
          <table:table-cell table:style-name="ce11" table:formula="of:=VLOOKUP([.C61];[Listado.$A$2:.$D$19];4;0)" office:value-type="float" office:value="0">
            <text:p>#N/D</text:p>
          </table:table-cell>
          <table:table-cell table:style-name="ce11" table:formula="of:=VLOOKUP([.D61];[Listado.$A$2:.$D$19];4;0)" office:value-type="float" office:value="0">
            <text:p>#N/D</text:p>
          </table:table-cell>
          <table:table-cell table:style-name="ce11" table:formula="of:=VLOOKUP([.E61];[Listado.$A$2:.$D$19];4;0)" office:value-type="float" office:value="0">
            <text:p>#N/D</text:p>
          </table:table-cell>
          <table:table-cell table:style-name="ce11" table:formula="of:=VLOOKUP([.H61];[Listado.$A$2:.$D$19];4;0)" office:value-type="float" office:value="0">
            <text:p>#N/D</text:p>
          </table:table-cell>
          <table:table-cell table:style-name="ce11" table:formula="of:=COUNTIF([.J61:.M61];[.N6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194. Indica cuál es la cifra de las DECENAS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9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2];0;[.F62])" office:value-type="string" office:string-value="9">
            <text:p>9</text:p>
          </table:table-cell>
          <table:table-cell table:style-name="ce9"/>
          <table:table-cell table:style-name="ce11" table:formula="of:=VLOOKUP([.B62];[Listado.$A$2:.$D$19];4;0)" office:value-type="float" office:value="0">
            <text:p>#N/D</text:p>
          </table:table-cell>
          <table:table-cell table:style-name="ce11" table:formula="of:=VLOOKUP([.C62];[Listado.$A$2:.$D$19];4;0)" office:value-type="float" office:value="0">
            <text:p>#N/D</text:p>
          </table:table-cell>
          <table:table-cell table:style-name="ce11" table:formula="of:=VLOOKUP([.D62];[Listado.$A$2:.$D$19];4;0)" office:value-type="float" office:value="0">
            <text:p>#N/D</text:p>
          </table:table-cell>
          <table:table-cell table:style-name="ce11" table:formula="of:=VLOOKUP([.E62];[Listado.$A$2:.$D$19];4;0)" office:value-type="float" office:value="0">
            <text:p>#N/D</text:p>
          </table:table-cell>
          <table:table-cell table:style-name="ce11" table:formula="of:=VLOOKUP([.H62];[Listado.$A$2:.$D$19];4;0)" office:value-type="float" office:value="0">
            <text:p>#N/D</text:p>
          </table:table-cell>
          <table:table-cell table:style-name="ce11" table:formula="of:=COUNTIF([.J62:.M62];[.N6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736. Indica cuál es la cifra de las DECENA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3];0;[.F63])" office:value-type="string" office:string-value="3">
            <text:p>3</text:p>
          </table:table-cell>
          <table:table-cell table:style-name="ce9"/>
          <table:table-cell table:style-name="ce11" table:formula="of:=VLOOKUP([.B63];[Listado.$A$2:.$D$19];4;0)" office:value-type="float" office:value="0">
            <text:p>#N/D</text:p>
          </table:table-cell>
          <table:table-cell table:style-name="ce11" table:formula="of:=VLOOKUP([.C63];[Listado.$A$2:.$D$19];4;0)" office:value-type="float" office:value="0">
            <text:p>#N/D</text:p>
          </table:table-cell>
          <table:table-cell table:style-name="ce11" table:formula="of:=VLOOKUP([.D63];[Listado.$A$2:.$D$19];4;0)" office:value-type="float" office:value="0">
            <text:p>#N/D</text:p>
          </table:table-cell>
          <table:table-cell table:style-name="ce11" table:formula="of:=VLOOKUP([.E63];[Listado.$A$2:.$D$19];4;0)" office:value-type="float" office:value="0">
            <text:p>#N/D</text:p>
          </table:table-cell>
          <table:table-cell table:style-name="ce11" table:formula="of:=VLOOKUP([.H63];[Listado.$A$2:.$D$19];4;0)" office:value-type="float" office:value="0">
            <text:p>#N/D</text:p>
          </table:table-cell>
          <table:table-cell table:style-name="ce11" table:formula="of:=COUNTIF([.J63:.M63];[.N6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180. Indica cuál es la cifra de las DECENAS: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formula="of:=OFFSET([.A64];0;[.F64])" office:value-type="string" office:string-value="8">
            <text:p>8</text:p>
          </table:table-cell>
          <table:table-cell/>
          <table:table-cell table:style-name="ce10" table:formula="of:=VLOOKUP([.B64];[Listado.$A$2:.$D$19];4;0)" office:value-type="float" office:value="0">
            <text:p>#N/D</text:p>
          </table:table-cell>
          <table:table-cell table:style-name="ce10" table:formula="of:=VLOOKUP([.C64];[Listado.$A$2:.$D$19];4;0)" office:value-type="float" office:value="0">
            <text:p>#N/D</text:p>
          </table:table-cell>
          <table:table-cell table:style-name="ce10" table:formula="of:=VLOOKUP([.D64];[Listado.$A$2:.$D$19];4;0)" office:value-type="float" office:value="0">
            <text:p>#N/D</text:p>
          </table:table-cell>
          <table:table-cell table:style-name="ce10" table:formula="of:=VLOOKUP([.E64];[Listado.$A$2:.$D$19];4;0)" office:value-type="float" office:value="0">
            <text:p>#N/D</text:p>
          </table:table-cell>
          <table:table-cell table:style-name="ce10" table:formula="of:=VLOOKUP([.H64];[Listado.$A$2:.$D$19];4;0)" office:value-type="float" office:value="0">
            <text:p>#N/D</text:p>
          </table:table-cell>
          <table:table-cell table:style-name="ce10" table:formula="of:=COUNTIF([.J64:.M64];[.N64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7620. Indica cuál es la cifra de las DEC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5];0;[.F65])" office:value-type="string" office:string-value="2">
            <text:p>2</text:p>
          </table:table-cell>
          <table:table-cell table:style-name="ce9"/>
          <table:table-cell table:style-name="ce11" table:formula="of:=VLOOKUP([.B65];[Listado.$A$2:.$D$19];4;0)" office:value-type="float" office:value="0">
            <text:p>#N/D</text:p>
          </table:table-cell>
          <table:table-cell table:style-name="ce11" table:formula="of:=VLOOKUP([.C65];[Listado.$A$2:.$D$19];4;0)" office:value-type="float" office:value="0">
            <text:p>#N/D</text:p>
          </table:table-cell>
          <table:table-cell table:style-name="ce11" table:formula="of:=VLOOKUP([.D65];[Listado.$A$2:.$D$19];4;0)" office:value-type="float" office:value="0">
            <text:p>#N/D</text:p>
          </table:table-cell>
          <table:table-cell table:style-name="ce11" table:formula="of:=VLOOKUP([.E65];[Listado.$A$2:.$D$19];4;0)" office:value-type="float" office:value="0">
            <text:p>#N/D</text:p>
          </table:table-cell>
          <table:table-cell table:style-name="ce11" table:formula="of:=VLOOKUP([.H65];[Listado.$A$2:.$D$19];4;0)" office:value-type="float" office:value="0">
            <text:p>#N/D</text:p>
          </table:table-cell>
          <table:table-cell table:style-name="ce11" table:formula="of:=COUNTIF([.J65:.M65];[.N6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2365. Indica cuál es la cifra de las DECENAS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6];0;[.F66])" office:value-type="string" office:string-value="6">
            <text:p>6</text:p>
          </table:table-cell>
          <table:table-cell table:style-name="ce9"/>
          <table:table-cell table:style-name="ce11" table:formula="of:=VLOOKUP([.B66];[Listado.$A$2:.$D$19];4;0)" office:value-type="float" office:value="0">
            <text:p>#N/D</text:p>
          </table:table-cell>
          <table:table-cell table:style-name="ce11" table:formula="of:=VLOOKUP([.C66];[Listado.$A$2:.$D$19];4;0)" office:value-type="float" office:value="0">
            <text:p>#N/D</text:p>
          </table:table-cell>
          <table:table-cell table:style-name="ce11" table:formula="of:=VLOOKUP([.D66];[Listado.$A$2:.$D$19];4;0)" office:value-type="float" office:value="0">
            <text:p>#N/D</text:p>
          </table:table-cell>
          <table:table-cell table:style-name="ce11" table:formula="of:=VLOOKUP([.E66];[Listado.$A$2:.$D$19];4;0)" office:value-type="float" office:value="0">
            <text:p>#N/D</text:p>
          </table:table-cell>
          <table:table-cell table:style-name="ce11" table:formula="of:=VLOOKUP([.H66];[Listado.$A$2:.$D$19];4;0)" office:value-type="float" office:value="0">
            <text:p>#N/D</text:p>
          </table:table-cell>
          <table:table-cell table:style-name="ce11" table:formula="of:=COUNTIF([.J66:.M66];[.N6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2436. Indica cuál es la cifra de las DEC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7];0;[.F67])" office:value-type="string" office:string-value="3">
            <text:p>3</text:p>
          </table:table-cell>
          <table:table-cell table:style-name="ce9"/>
          <table:table-cell table:style-name="ce11" table:formula="of:=VLOOKUP([.B67];[Listado.$A$2:.$D$19];4;0)" office:value-type="float" office:value="0">
            <text:p>#N/D</text:p>
          </table:table-cell>
          <table:table-cell table:style-name="ce11" table:formula="of:=VLOOKUP([.C67];[Listado.$A$2:.$D$19];4;0)" office:value-type="float" office:value="0">
            <text:p>#N/D</text:p>
          </table:table-cell>
          <table:table-cell table:style-name="ce11" table:formula="of:=VLOOKUP([.D67];[Listado.$A$2:.$D$19];4;0)" office:value-type="float" office:value="0">
            <text:p>#N/D</text:p>
          </table:table-cell>
          <table:table-cell table:style-name="ce11" table:formula="of:=VLOOKUP([.E67];[Listado.$A$2:.$D$19];4;0)" office:value-type="float" office:value="0">
            <text:p>#N/D</text:p>
          </table:table-cell>
          <table:table-cell table:style-name="ce11" table:formula="of:=VLOOKUP([.H67];[Listado.$A$2:.$D$19];4;0)" office:value-type="float" office:value="0">
            <text:p>#N/D</text:p>
          </table:table-cell>
          <table:table-cell table:style-name="ce11" table:formula="of:=COUNTIF([.J67:.M67];[.N6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218. Indica cuál es la cifra de las DECENA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8];0;[.F68])" office:value-type="string" office:string-value="1">
            <text:p>1</text:p>
          </table:table-cell>
          <table:table-cell table:style-name="ce9"/>
          <table:table-cell table:style-name="ce11" table:formula="of:=VLOOKUP([.B68];[Listado.$A$2:.$D$19];4;0)" office:value-type="float" office:value="0">
            <text:p>#N/D</text:p>
          </table:table-cell>
          <table:table-cell table:style-name="ce11" table:formula="of:=VLOOKUP([.C68];[Listado.$A$2:.$D$19];4;0)" office:value-type="float" office:value="0">
            <text:p>#N/D</text:p>
          </table:table-cell>
          <table:table-cell table:style-name="ce11" table:formula="of:=VLOOKUP([.D68];[Listado.$A$2:.$D$19];4;0)" office:value-type="float" office:value="0">
            <text:p>#N/D</text:p>
          </table:table-cell>
          <table:table-cell table:style-name="ce11" table:formula="of:=VLOOKUP([.E68];[Listado.$A$2:.$D$19];4;0)" office:value-type="float" office:value="0">
            <text:p>#N/D</text:p>
          </table:table-cell>
          <table:table-cell table:style-name="ce11" table:formula="of:=VLOOKUP([.H68];[Listado.$A$2:.$D$19];4;0)" office:value-type="float" office:value="0">
            <text:p>#N/D</text:p>
          </table:table-cell>
          <table:table-cell table:style-name="ce11" table:formula="of:=COUNTIF([.J68:.M68];[.N6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235. Indica cuál es la cifra de las DECENAS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69];0;[.F69])" office:value-type="string" office:string-value="3">
            <text:p>3</text:p>
          </table:table-cell>
          <table:table-cell table:style-name="ce9"/>
          <table:table-cell table:style-name="ce11" table:formula="of:=VLOOKUP([.B69];[Listado.$A$2:.$D$19];4;0)" office:value-type="float" office:value="0">
            <text:p>#N/D</text:p>
          </table:table-cell>
          <table:table-cell table:style-name="ce11" table:formula="of:=VLOOKUP([.C69];[Listado.$A$2:.$D$19];4;0)" office:value-type="float" office:value="0">
            <text:p>#N/D</text:p>
          </table:table-cell>
          <table:table-cell table:style-name="ce11" table:formula="of:=VLOOKUP([.D69];[Listado.$A$2:.$D$19];4;0)" office:value-type="float" office:value="0">
            <text:p>#N/D</text:p>
          </table:table-cell>
          <table:table-cell table:style-name="ce11" table:formula="of:=VLOOKUP([.E69];[Listado.$A$2:.$D$19];4;0)" office:value-type="float" office:value="0">
            <text:p>#N/D</text:p>
          </table:table-cell>
          <table:table-cell table:style-name="ce11" table:formula="of:=VLOOKUP([.H69];[Listado.$A$2:.$D$19];4;0)" office:value-type="float" office:value="0">
            <text:p>#N/D</text:p>
          </table:table-cell>
          <table:table-cell table:style-name="ce11" table:formula="of:=COUNTIF([.J69:.M69];[.N6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581. Indica cuál es la cifra de las DECENAS: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70];0;[.F70])" office:value-type="string" office:string-value="8">
            <text:p>8</text:p>
          </table:table-cell>
          <table:table-cell table:style-name="ce9"/>
          <table:table-cell table:style-name="ce11" table:formula="of:=VLOOKUP([.B70];[Listado.$A$2:.$D$19];4;0)" office:value-type="float" office:value="0">
            <text:p>#N/D</text:p>
          </table:table-cell>
          <table:table-cell table:style-name="ce11" table:formula="of:=VLOOKUP([.C70];[Listado.$A$2:.$D$19];4;0)" office:value-type="float" office:value="0">
            <text:p>#N/D</text:p>
          </table:table-cell>
          <table:table-cell table:style-name="ce11" table:formula="of:=VLOOKUP([.D70];[Listado.$A$2:.$D$19];4;0)" office:value-type="float" office:value="0">
            <text:p>#N/D</text:p>
          </table:table-cell>
          <table:table-cell table:style-name="ce11" table:formula="of:=VLOOKUP([.E70];[Listado.$A$2:.$D$19];4;0)" office:value-type="float" office:value="0">
            <text:p>#N/D</text:p>
          </table:table-cell>
          <table:table-cell table:style-name="ce11" table:formula="of:=VLOOKUP([.H70];[Listado.$A$2:.$D$19];4;0)" office:value-type="float" office:value="0">
            <text:p>#N/D</text:p>
          </table:table-cell>
          <table:table-cell table:style-name="ce11" table:formula="of:=COUNTIF([.J70:.M70];[.N7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279. Indica cuál es la cifra de las DECENA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71];0;[.F71])" office:value-type="string" office:string-value="7">
            <text:p>7</text:p>
          </table:table-cell>
          <table:table-cell table:style-name="ce9"/>
          <table:table-cell table:style-name="ce11" table:formula="of:=VLOOKUP([.B71];[Listado.$A$2:.$D$19];4;0)" office:value-type="float" office:value="0">
            <text:p>#N/D</text:p>
          </table:table-cell>
          <table:table-cell table:style-name="ce11" table:formula="of:=VLOOKUP([.C71];[Listado.$A$2:.$D$19];4;0)" office:value-type="float" office:value="0">
            <text:p>#N/D</text:p>
          </table:table-cell>
          <table:table-cell table:style-name="ce11" table:formula="of:=VLOOKUP([.D71];[Listado.$A$2:.$D$19];4;0)" office:value-type="float" office:value="0">
            <text:p>#N/D</text:p>
          </table:table-cell>
          <table:table-cell table:style-name="ce11" table:formula="of:=VLOOKUP([.E71];[Listado.$A$2:.$D$19];4;0)" office:value-type="float" office:value="0">
            <text:p>#N/D</text:p>
          </table:table-cell>
          <table:table-cell table:style-name="ce11" table:formula="of:=VLOOKUP([.H71];[Listado.$A$2:.$D$19];4;0)" office:value-type="float" office:value="0">
            <text:p>#N/D</text:p>
          </table:table-cell>
          <table:table-cell table:style-name="ce11" table:formula="of:=COUNTIF([.J71:.M71];[.N7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967. Indica cuál es la cifra de las DECENAS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9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72];0;[.F72])" office:value-type="string" office:string-value="6">
            <text:p>6</text:p>
          </table:table-cell>
          <table:table-cell table:style-name="ce9"/>
          <table:table-cell table:style-name="ce11" table:formula="of:=VLOOKUP([.B72];[Listado.$A$2:.$D$19];4;0)" office:value-type="float" office:value="0">
            <text:p>#N/D</text:p>
          </table:table-cell>
          <table:table-cell table:style-name="ce11" table:formula="of:=VLOOKUP([.C72];[Listado.$A$2:.$D$19];4;0)" office:value-type="float" office:value="0">
            <text:p>#N/D</text:p>
          </table:table-cell>
          <table:table-cell table:style-name="ce11" table:formula="of:=VLOOKUP([.D72];[Listado.$A$2:.$D$19];4;0)" office:value-type="float" office:value="0">
            <text:p>#N/D</text:p>
          </table:table-cell>
          <table:table-cell table:style-name="ce11" table:formula="of:=VLOOKUP([.E72];[Listado.$A$2:.$D$19];4;0)" office:value-type="float" office:value="0">
            <text:p>#N/D</text:p>
          </table:table-cell>
          <table:table-cell table:style-name="ce11" table:formula="of:=VLOOKUP([.H72];[Listado.$A$2:.$D$19];4;0)" office:value-type="float" office:value="0">
            <text:p>#N/D</text:p>
          </table:table-cell>
          <table:table-cell table:style-name="ce11" table:formula="of:=COUNTIF([.J72:.M72];[.N7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469. Indica cuál es la cifra de las DECENA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6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73];0;[.F73])" office:value-type="string" office:string-value="6">
            <text:p>6</text:p>
          </table:table-cell>
          <table:table-cell table:style-name="ce9"/>
          <table:table-cell table:style-name="ce11" table:formula="of:=VLOOKUP([.B73];[Listado.$A$2:.$D$19];4;0)" office:value-type="float" office:value="0">
            <text:p>#N/D</text:p>
          </table:table-cell>
          <table:table-cell table:style-name="ce11" table:formula="of:=VLOOKUP([.C73];[Listado.$A$2:.$D$19];4;0)" office:value-type="float" office:value="0">
            <text:p>#N/D</text:p>
          </table:table-cell>
          <table:table-cell table:style-name="ce11" table:formula="of:=VLOOKUP([.D73];[Listado.$A$2:.$D$19];4;0)" office:value-type="float" office:value="0">
            <text:p>#N/D</text:p>
          </table:table-cell>
          <table:table-cell table:style-name="ce11" table:formula="of:=VLOOKUP([.E73];[Listado.$A$2:.$D$19];4;0)" office:value-type="float" office:value="0">
            <text:p>#N/D</text:p>
          </table:table-cell>
          <table:table-cell table:style-name="ce11" table:formula="of:=VLOOKUP([.H73];[Listado.$A$2:.$D$19];4;0)" office:value-type="float" office:value="0">
            <text:p>#N/D</text:p>
          </table:table-cell>
          <table:table-cell table:style-name="ce11" table:formula="of:=COUNTIF([.J73:.M73];[.N7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541. Indica cuál es la cifra de las DECENAS: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74];0;[.F74])" office:value-type="string" office:string-value="4">
            <text:p>4</text:p>
          </table:table-cell>
          <table:table-cell table:style-name="ce9"/>
          <table:table-cell table:style-name="ce11" table:formula="of:=VLOOKUP([.B74];[Listado.$A$2:.$D$19];4;0)" office:value-type="float" office:value="0">
            <text:p>#N/D</text:p>
          </table:table-cell>
          <table:table-cell table:style-name="ce11" table:formula="of:=VLOOKUP([.C74];[Listado.$A$2:.$D$19];4;0)" office:value-type="float" office:value="0">
            <text:p>#N/D</text:p>
          </table:table-cell>
          <table:table-cell table:style-name="ce11" table:formula="of:=VLOOKUP([.D74];[Listado.$A$2:.$D$19];4;0)" office:value-type="float" office:value="0">
            <text:p>#N/D</text:p>
          </table:table-cell>
          <table:table-cell table:style-name="ce11" table:formula="of:=VLOOKUP([.E74];[Listado.$A$2:.$D$19];4;0)" office:value-type="float" office:value="0">
            <text:p>#N/D</text:p>
          </table:table-cell>
          <table:table-cell table:style-name="ce11" table:formula="of:=VLOOKUP([.H74];[Listado.$A$2:.$D$19];4;0)" office:value-type="float" office:value="0">
            <text:p>#N/D</text:p>
          </table:table-cell>
          <table:table-cell table:style-name="ce11" table:formula="of:=COUNTIF([.J74:.M74];[.N7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619. Indica cuál es la cifra de las DECENA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75];0;[.F75])" office:value-type="string" office:string-value="1">
            <text:p>1</text:p>
          </table:table-cell>
          <table:table-cell table:style-name="ce9"/>
          <table:table-cell table:style-name="ce11" table:formula="of:=VLOOKUP([.B75];[Listado.$A$2:.$D$19];4;0)" office:value-type="float" office:value="0">
            <text:p>#N/D</text:p>
          </table:table-cell>
          <table:table-cell table:style-name="ce11" table:formula="of:=VLOOKUP([.C75];[Listado.$A$2:.$D$19];4;0)" office:value-type="float" office:value="0">
            <text:p>#N/D</text:p>
          </table:table-cell>
          <table:table-cell table:style-name="ce11" table:formula="of:=VLOOKUP([.D75];[Listado.$A$2:.$D$19];4;0)" office:value-type="float" office:value="0">
            <text:p>#N/D</text:p>
          </table:table-cell>
          <table:table-cell table:style-name="ce11" table:formula="of:=VLOOKUP([.E75];[Listado.$A$2:.$D$19];4;0)" office:value-type="float" office:value="0">
            <text:p>#N/D</text:p>
          </table:table-cell>
          <table:table-cell table:style-name="ce11" table:formula="of:=VLOOKUP([.H75];[Listado.$A$2:.$D$19];4;0)" office:value-type="float" office:value="0">
            <text:p>#N/D</text:p>
          </table:table-cell>
          <table:table-cell table:style-name="ce11" table:formula="of:=COUNTIF([.J75:.M75];[.N7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746. Indica cuál es la cifra de las DECENAS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style-name="ce9" table:formula="of:=OFFSET([.A76];0;[.F76])" office:value-type="string" office:string-value="4">
            <text:p>4</text:p>
          </table:table-cell>
          <table:table-cell table:style-name="ce9"/>
          <table:table-cell table:style-name="ce11" table:formula="of:=VLOOKUP([.B76];[Listado.$A$2:.$D$19];4;0)" office:value-type="float" office:value="0">
            <text:p>#N/D</text:p>
          </table:table-cell>
          <table:table-cell table:style-name="ce11" table:formula="of:=VLOOKUP([.C76];[Listado.$A$2:.$D$19];4;0)" office:value-type="float" office:value="0">
            <text:p>#N/D</text:p>
          </table:table-cell>
          <table:table-cell table:style-name="ce11" table:formula="of:=VLOOKUP([.D76];[Listado.$A$2:.$D$19];4;0)" office:value-type="float" office:value="0">
            <text:p>#N/D</text:p>
          </table:table-cell>
          <table:table-cell table:style-name="ce11" table:formula="of:=VLOOKUP([.E76];[Listado.$A$2:.$D$19];4;0)" office:value-type="float" office:value="0">
            <text:p>#N/D</text:p>
          </table:table-cell>
          <table:table-cell table:style-name="ce11" table:formula="of:=VLOOKUP([.H76];[Listado.$A$2:.$D$19];4;0)" office:value-type="float" office:value="0">
            <text:p>#N/D</text:p>
          </table:table-cell>
          <table:table-cell table:style-name="ce11" table:formula="of:=COUNTIF([.J76:.M76];[.N7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701. Indica cuál es la cifra de las DECENAS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decenas es la segunda de la parte entera contando desde la derecha.</text:p>
          </table:table-cell>
          <table:table-cell table:formula="of:=OFFSET([.A77];0;[.F77])" office:value-type="string" office:string-value="0">
            <text:p>0</text:p>
          </table:table-cell>
          <table:table-cell/>
          <table:table-cell table:style-name="ce10" table:formula="of:=VLOOKUP([.B77];[Listado.$A$2:.$D$19];4;0)" office:value-type="float" office:value="0">
            <text:p>#N/D</text:p>
          </table:table-cell>
          <table:table-cell table:style-name="ce10" table:formula="of:=VLOOKUP([.C77];[Listado.$A$2:.$D$19];4;0)" office:value-type="float" office:value="0">
            <text:p>#N/D</text:p>
          </table:table-cell>
          <table:table-cell table:style-name="ce10" table:formula="of:=VLOOKUP([.D77];[Listado.$A$2:.$D$19];4;0)" office:value-type="float" office:value="0">
            <text:p>#N/D</text:p>
          </table:table-cell>
          <table:table-cell table:style-name="ce10" table:formula="of:=VLOOKUP([.E77];[Listado.$A$2:.$D$19];4;0)" office:value-type="float" office:value="0">
            <text:p>#N/D</text:p>
          </table:table-cell>
          <table:table-cell table:style-name="ce10" table:formula="of:=VLOOKUP([.H77];[Listado.$A$2:.$D$19];4;0)" office:value-type="float" office:value="0">
            <text:p>#N/D</text:p>
          </table:table-cell>
          <table:table-cell table:style-name="ce10" table:formula="of:=COUNTIF([.J77:.M77];[.N77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3281. Indica cuál es la cifra de las UNIDADES DE MILLAR: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78];0;[.F78])" office:value-type="string" office:string-value="3">
            <text:p>3</text:p>
          </table:table-cell>
          <table:table-cell table:style-name="ce9"/>
          <table:table-cell table:style-name="ce11" table:formula="of:=VLOOKUP([.B78];[Listado.$A$2:.$D$19];4;0)" office:value-type="float" office:value="0">
            <text:p>#N/D</text:p>
          </table:table-cell>
          <table:table-cell table:style-name="ce11" table:formula="of:=VLOOKUP([.C78];[Listado.$A$2:.$D$19];4;0)" office:value-type="float" office:value="0">
            <text:p>#N/D</text:p>
          </table:table-cell>
          <table:table-cell table:style-name="ce11" table:formula="of:=VLOOKUP([.D78];[Listado.$A$2:.$D$19];4;0)" office:value-type="float" office:value="0">
            <text:p>#N/D</text:p>
          </table:table-cell>
          <table:table-cell table:style-name="ce11" table:formula="of:=VLOOKUP([.E78];[Listado.$A$2:.$D$19];4;0)" office:value-type="float" office:value="0">
            <text:p>#N/D</text:p>
          </table:table-cell>
          <table:table-cell table:style-name="ce11" table:formula="of:=VLOOKUP([.H78];[Listado.$A$2:.$D$19];4;0)" office:value-type="float" office:value="0">
            <text:p>#N/D</text:p>
          </table:table-cell>
          <table:table-cell table:style-name="ce11" table:formula="of:=COUNTIF([.J78:.M78];[.N7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326. Indica cuál es la cifra de las UNIDADES DE MILLAR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79];0;[.F79])" office:value-type="string" office:string-value="1">
            <text:p>1</text:p>
          </table:table-cell>
          <table:table-cell table:style-name="ce9"/>
          <table:table-cell table:style-name="ce11" table:formula="of:=VLOOKUP([.B79];[Listado.$A$2:.$D$19];4;0)" office:value-type="float" office:value="0">
            <text:p>#N/D</text:p>
          </table:table-cell>
          <table:table-cell table:style-name="ce11" table:formula="of:=VLOOKUP([.C79];[Listado.$A$2:.$D$19];4;0)" office:value-type="float" office:value="0">
            <text:p>#N/D</text:p>
          </table:table-cell>
          <table:table-cell table:style-name="ce11" table:formula="of:=VLOOKUP([.D79];[Listado.$A$2:.$D$19];4;0)" office:value-type="float" office:value="0">
            <text:p>#N/D</text:p>
          </table:table-cell>
          <table:table-cell table:style-name="ce11" table:formula="of:=VLOOKUP([.E79];[Listado.$A$2:.$D$19];4;0)" office:value-type="float" office:value="0">
            <text:p>#N/D</text:p>
          </table:table-cell>
          <table:table-cell table:style-name="ce11" table:formula="of:=VLOOKUP([.H79];[Listado.$A$2:.$D$19];4;0)" office:value-type="float" office:value="0">
            <text:p>#N/D</text:p>
          </table:table-cell>
          <table:table-cell table:style-name="ce11" table:formula="of:=COUNTIF([.J79:.M79];[.N7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198. Indica cuál es la cifra de las UNIDADES DE MILLAR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0];0;[.F80])" office:value-type="string" office:string-value="7">
            <text:p>7</text:p>
          </table:table-cell>
          <table:table-cell table:style-name="ce9"/>
          <table:table-cell table:style-name="ce11" table:formula="of:=VLOOKUP([.B80];[Listado.$A$2:.$D$19];4;0)" office:value-type="float" office:value="0">
            <text:p>#N/D</text:p>
          </table:table-cell>
          <table:table-cell table:style-name="ce11" table:formula="of:=VLOOKUP([.C80];[Listado.$A$2:.$D$19];4;0)" office:value-type="float" office:value="0">
            <text:p>#N/D</text:p>
          </table:table-cell>
          <table:table-cell table:style-name="ce11" table:formula="of:=VLOOKUP([.D80];[Listado.$A$2:.$D$19];4;0)" office:value-type="float" office:value="0">
            <text:p>#N/D</text:p>
          </table:table-cell>
          <table:table-cell table:style-name="ce11" table:formula="of:=VLOOKUP([.E80];[Listado.$A$2:.$D$19];4;0)" office:value-type="float" office:value="0">
            <text:p>#N/D</text:p>
          </table:table-cell>
          <table:table-cell table:style-name="ce11" table:formula="of:=VLOOKUP([.H80];[Listado.$A$2:.$D$19];4;0)" office:value-type="float" office:value="0">
            <text:p>#N/D</text:p>
          </table:table-cell>
          <table:table-cell table:style-name="ce11" table:formula="of:=COUNTIF([.J80:.M80];[.N8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873. Indica cuál es la cifra de las UNIDADES DE MILLAR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1];0;[.F81])" office:value-type="string" office:string-value="5">
            <text:p>5</text:p>
          </table:table-cell>
          <table:table-cell table:style-name="ce9"/>
          <table:table-cell table:style-name="ce11" table:formula="of:=VLOOKUP([.B81];[Listado.$A$2:.$D$19];4;0)" office:value-type="float" office:value="0">
            <text:p>#N/D</text:p>
          </table:table-cell>
          <table:table-cell table:style-name="ce11" table:formula="of:=VLOOKUP([.C81];[Listado.$A$2:.$D$19];4;0)" office:value-type="float" office:value="0">
            <text:p>#N/D</text:p>
          </table:table-cell>
          <table:table-cell table:style-name="ce11" table:formula="of:=VLOOKUP([.D81];[Listado.$A$2:.$D$19];4;0)" office:value-type="float" office:value="0">
            <text:p>#N/D</text:p>
          </table:table-cell>
          <table:table-cell table:style-name="ce11" table:formula="of:=VLOOKUP([.E81];[Listado.$A$2:.$D$19];4;0)" office:value-type="float" office:value="0">
            <text:p>#N/D</text:p>
          </table:table-cell>
          <table:table-cell table:style-name="ce11" table:formula="of:=VLOOKUP([.H81];[Listado.$A$2:.$D$19];4;0)" office:value-type="float" office:value="0">
            <text:p>#N/D</text:p>
          </table:table-cell>
          <table:table-cell table:style-name="ce11" table:formula="of:=COUNTIF([.J81:.M81];[.N8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836. Indica cuál es la cifra de las UNIDADES DE MILLAR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2];0;[.F82])" office:value-type="string" office:string-value="1">
            <text:p>1</text:p>
          </table:table-cell>
          <table:table-cell table:style-name="ce9"/>
          <table:table-cell table:style-name="ce11" table:formula="of:=VLOOKUP([.B82];[Listado.$A$2:.$D$19];4;0)" office:value-type="float" office:value="0">
            <text:p>#N/D</text:p>
          </table:table-cell>
          <table:table-cell table:style-name="ce11" table:formula="of:=VLOOKUP([.C82];[Listado.$A$2:.$D$19];4;0)" office:value-type="float" office:value="0">
            <text:p>#N/D</text:p>
          </table:table-cell>
          <table:table-cell table:style-name="ce11" table:formula="of:=VLOOKUP([.D82];[Listado.$A$2:.$D$19];4;0)" office:value-type="float" office:value="0">
            <text:p>#N/D</text:p>
          </table:table-cell>
          <table:table-cell table:style-name="ce11" table:formula="of:=VLOOKUP([.E82];[Listado.$A$2:.$D$19];4;0)" office:value-type="float" office:value="0">
            <text:p>#N/D</text:p>
          </table:table-cell>
          <table:table-cell table:style-name="ce11" table:formula="of:=VLOOKUP([.H82];[Listado.$A$2:.$D$19];4;0)" office:value-type="float" office:value="0">
            <text:p>#N/D</text:p>
          </table:table-cell>
          <table:table-cell table:style-name="ce11" table:formula="of:=COUNTIF([.J82:.M82];[.N8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215. Indica cuál es la cifra de las UNIDADES DE MILLAR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3];0;[.F83])" office:value-type="string" office:string-value="7">
            <text:p>7</text:p>
          </table:table-cell>
          <table:table-cell table:style-name="ce9"/>
          <table:table-cell table:style-name="ce11" table:formula="of:=VLOOKUP([.B83];[Listado.$A$2:.$D$19];4;0)" office:value-type="float" office:value="0">
            <text:p>#N/D</text:p>
          </table:table-cell>
          <table:table-cell table:style-name="ce11" table:formula="of:=VLOOKUP([.C83];[Listado.$A$2:.$D$19];4;0)" office:value-type="float" office:value="0">
            <text:p>#N/D</text:p>
          </table:table-cell>
          <table:table-cell table:style-name="ce11" table:formula="of:=VLOOKUP([.D83];[Listado.$A$2:.$D$19];4;0)" office:value-type="float" office:value="0">
            <text:p>#N/D</text:p>
          </table:table-cell>
          <table:table-cell table:style-name="ce11" table:formula="of:=VLOOKUP([.E83];[Listado.$A$2:.$D$19];4;0)" office:value-type="float" office:value="0">
            <text:p>#N/D</text:p>
          </table:table-cell>
          <table:table-cell table:style-name="ce11" table:formula="of:=VLOOKUP([.H83];[Listado.$A$2:.$D$19];4;0)" office:value-type="float" office:value="0">
            <text:p>#N/D</text:p>
          </table:table-cell>
          <table:table-cell table:style-name="ce11" table:formula="of:=COUNTIF([.J83:.M83];[.N8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821. Indica cuál es la cifra de las UNIDADES DE MILLAR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formula="of:=OFFSET([.A84];0;[.F84])" office:value-type="string" office:string-value="6">
            <text:p>6</text:p>
          </table:table-cell>
          <table:table-cell/>
          <table:table-cell table:style-name="ce10" table:formula="of:=VLOOKUP([.B84];[Listado.$A$2:.$D$19];4;0)" office:value-type="float" office:value="0">
            <text:p>#N/D</text:p>
          </table:table-cell>
          <table:table-cell table:style-name="ce10" table:formula="of:=VLOOKUP([.C84];[Listado.$A$2:.$D$19];4;0)" office:value-type="float" office:value="0">
            <text:p>#N/D</text:p>
          </table:table-cell>
          <table:table-cell table:style-name="ce10" table:formula="of:=VLOOKUP([.D84];[Listado.$A$2:.$D$19];4;0)" office:value-type="float" office:value="0">
            <text:p>#N/D</text:p>
          </table:table-cell>
          <table:table-cell table:style-name="ce10" table:formula="of:=VLOOKUP([.E84];[Listado.$A$2:.$D$19];4;0)" office:value-type="float" office:value="0">
            <text:p>#N/D</text:p>
          </table:table-cell>
          <table:table-cell table:style-name="ce10" table:formula="of:=VLOOKUP([.H84];[Listado.$A$2:.$D$19];4;0)" office:value-type="float" office:value="0">
            <text:p>#N/D</text:p>
          </table:table-cell>
          <table:table-cell table:style-name="ce10" table:formula="of:=COUNTIF([.J84:.M84];[.N84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1490. Indica cuál es la cifra de las UNIDADES DE MILLAR: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5];0;[.F85])" office:value-type="string" office:string-value="1">
            <text:p>1</text:p>
          </table:table-cell>
          <table:table-cell table:style-name="ce9"/>
          <table:table-cell table:style-name="ce11" table:formula="of:=VLOOKUP([.B85];[Listado.$A$2:.$D$19];4;0)" office:value-type="float" office:value="0">
            <text:p>#N/D</text:p>
          </table:table-cell>
          <table:table-cell table:style-name="ce11" table:formula="of:=VLOOKUP([.C85];[Listado.$A$2:.$D$19];4;0)" office:value-type="float" office:value="0">
            <text:p>#N/D</text:p>
          </table:table-cell>
          <table:table-cell table:style-name="ce11" table:formula="of:=VLOOKUP([.D85];[Listado.$A$2:.$D$19];4;0)" office:value-type="float" office:value="0">
            <text:p>#N/D</text:p>
          </table:table-cell>
          <table:table-cell table:style-name="ce11" table:formula="of:=VLOOKUP([.E85];[Listado.$A$2:.$D$19];4;0)" office:value-type="float" office:value="0">
            <text:p>#N/D</text:p>
          </table:table-cell>
          <table:table-cell table:style-name="ce11" table:formula="of:=VLOOKUP([.H85];[Listado.$A$2:.$D$19];4;0)" office:value-type="float" office:value="0">
            <text:p>#N/D</text:p>
          </table:table-cell>
          <table:table-cell table:style-name="ce11" table:formula="of:=COUNTIF([.J85:.M85];[.N8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467. Indica cuál es la cifra de las UNIDADES DE MILLAR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6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6];0;[.F86])" office:value-type="string" office:string-value="1">
            <text:p>1</text:p>
          </table:table-cell>
          <table:table-cell table:style-name="ce9"/>
          <table:table-cell table:style-name="ce11" table:formula="of:=VLOOKUP([.B86];[Listado.$A$2:.$D$19];4;0)" office:value-type="float" office:value="0">
            <text:p>#N/D</text:p>
          </table:table-cell>
          <table:table-cell table:style-name="ce11" table:formula="of:=VLOOKUP([.C86];[Listado.$A$2:.$D$19];4;0)" office:value-type="float" office:value="0">
            <text:p>#N/D</text:p>
          </table:table-cell>
          <table:table-cell table:style-name="ce11" table:formula="of:=VLOOKUP([.D86];[Listado.$A$2:.$D$19];4;0)" office:value-type="float" office:value="0">
            <text:p>#N/D</text:p>
          </table:table-cell>
          <table:table-cell table:style-name="ce11" table:formula="of:=VLOOKUP([.E86];[Listado.$A$2:.$D$19];4;0)" office:value-type="float" office:value="0">
            <text:p>#N/D</text:p>
          </table:table-cell>
          <table:table-cell table:style-name="ce11" table:formula="of:=VLOOKUP([.H86];[Listado.$A$2:.$D$19];4;0)" office:value-type="float" office:value="0">
            <text:p>#N/D</text:p>
          </table:table-cell>
          <table:table-cell table:style-name="ce11" table:formula="of:=COUNTIF([.J86:.M86];[.N8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475. Indica cuál es la cifra de las UNIDADES DE MILLAR: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7];0;[.F87])" office:value-type="string" office:string-value="1">
            <text:p>1</text:p>
          </table:table-cell>
          <table:table-cell table:style-name="ce9"/>
          <table:table-cell table:style-name="ce11" table:formula="of:=VLOOKUP([.B87];[Listado.$A$2:.$D$19];4;0)" office:value-type="float" office:value="0">
            <text:p>#N/D</text:p>
          </table:table-cell>
          <table:table-cell table:style-name="ce11" table:formula="of:=VLOOKUP([.C87];[Listado.$A$2:.$D$19];4;0)" office:value-type="float" office:value="0">
            <text:p>#N/D</text:p>
          </table:table-cell>
          <table:table-cell table:style-name="ce11" table:formula="of:=VLOOKUP([.D87];[Listado.$A$2:.$D$19];4;0)" office:value-type="float" office:value="0">
            <text:p>#N/D</text:p>
          </table:table-cell>
          <table:table-cell table:style-name="ce11" table:formula="of:=VLOOKUP([.E87];[Listado.$A$2:.$D$19];4;0)" office:value-type="float" office:value="0">
            <text:p>#N/D</text:p>
          </table:table-cell>
          <table:table-cell table:style-name="ce11" table:formula="of:=VLOOKUP([.H87];[Listado.$A$2:.$D$19];4;0)" office:value-type="float" office:value="0">
            <text:p>#N/D</text:p>
          </table:table-cell>
          <table:table-cell table:style-name="ce11" table:formula="of:=COUNTIF([.J87:.M87];[.N8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563. Indica cuál es la cifra de las UNIDADES DE MILLAR: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8];0;[.F88])" office:value-type="string" office:string-value="4">
            <text:p>4</text:p>
          </table:table-cell>
          <table:table-cell table:style-name="ce9"/>
          <table:table-cell table:style-name="ce11" table:formula="of:=VLOOKUP([.B88];[Listado.$A$2:.$D$19];4;0)" office:value-type="float" office:value="0">
            <text:p>#N/D</text:p>
          </table:table-cell>
          <table:table-cell table:style-name="ce11" table:formula="of:=VLOOKUP([.C88];[Listado.$A$2:.$D$19];4;0)" office:value-type="float" office:value="0">
            <text:p>#N/D</text:p>
          </table:table-cell>
          <table:table-cell table:style-name="ce11" table:formula="of:=VLOOKUP([.D88];[Listado.$A$2:.$D$19];4;0)" office:value-type="float" office:value="0">
            <text:p>#N/D</text:p>
          </table:table-cell>
          <table:table-cell table:style-name="ce11" table:formula="of:=VLOOKUP([.E88];[Listado.$A$2:.$D$19];4;0)" office:value-type="float" office:value="0">
            <text:p>#N/D</text:p>
          </table:table-cell>
          <table:table-cell table:style-name="ce11" table:formula="of:=VLOOKUP([.H88];[Listado.$A$2:.$D$19];4;0)" office:value-type="float" office:value="0">
            <text:p>#N/D</text:p>
          </table:table-cell>
          <table:table-cell table:style-name="ce11" table:formula="of:=COUNTIF([.J88:.M88];[.N8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358. Indica cuál es la cifra de las UNIDADES DE MILLAR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7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89];0;[.F89])" office:value-type="string" office:string-value="1">
            <text:p>1</text:p>
          </table:table-cell>
          <table:table-cell table:style-name="ce9"/>
          <table:table-cell table:style-name="ce11" table:formula="of:=VLOOKUP([.B89];[Listado.$A$2:.$D$19];4;0)" office:value-type="float" office:value="0">
            <text:p>#N/D</text:p>
          </table:table-cell>
          <table:table-cell table:style-name="ce11" table:formula="of:=VLOOKUP([.C89];[Listado.$A$2:.$D$19];4;0)" office:value-type="float" office:value="0">
            <text:p>#N/D</text:p>
          </table:table-cell>
          <table:table-cell table:style-name="ce11" table:formula="of:=VLOOKUP([.D89];[Listado.$A$2:.$D$19];4;0)" office:value-type="float" office:value="0">
            <text:p>#N/D</text:p>
          </table:table-cell>
          <table:table-cell table:style-name="ce11" table:formula="of:=VLOOKUP([.E89];[Listado.$A$2:.$D$19];4;0)" office:value-type="float" office:value="0">
            <text:p>#N/D</text:p>
          </table:table-cell>
          <table:table-cell table:style-name="ce11" table:formula="of:=VLOOKUP([.H89];[Listado.$A$2:.$D$19];4;0)" office:value-type="float" office:value="0">
            <text:p>#N/D</text:p>
          </table:table-cell>
          <table:table-cell table:style-name="ce11" table:formula="of:=COUNTIF([.J89:.M89];[.N8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941. Indica cuál es la cifra de las UNIDADES DE MILLAR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0];0;[.F90])" office:value-type="string" office:string-value="6">
            <text:p>6</text:p>
          </table:table-cell>
          <table:table-cell table:style-name="ce9"/>
          <table:table-cell table:style-name="ce11" table:formula="of:=VLOOKUP([.B90];[Listado.$A$2:.$D$19];4;0)" office:value-type="float" office:value="0">
            <text:p>#N/D</text:p>
          </table:table-cell>
          <table:table-cell table:style-name="ce11" table:formula="of:=VLOOKUP([.C90];[Listado.$A$2:.$D$19];4;0)" office:value-type="float" office:value="0">
            <text:p>#N/D</text:p>
          </table:table-cell>
          <table:table-cell table:style-name="ce11" table:formula="of:=VLOOKUP([.D90];[Listado.$A$2:.$D$19];4;0)" office:value-type="float" office:value="0">
            <text:p>#N/D</text:p>
          </table:table-cell>
          <table:table-cell table:style-name="ce11" table:formula="of:=VLOOKUP([.E90];[Listado.$A$2:.$D$19];4;0)" office:value-type="float" office:value="0">
            <text:p>#N/D</text:p>
          </table:table-cell>
          <table:table-cell table:style-name="ce11" table:formula="of:=VLOOKUP([.H90];[Listado.$A$2:.$D$19];4;0)" office:value-type="float" office:value="0">
            <text:p>#N/D</text:p>
          </table:table-cell>
          <table:table-cell table:style-name="ce11" table:formula="of:=COUNTIF([.J90:.M90];[.N9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2518. Indica cuál es la cifra de las UNIDADES DE MILLAR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1];0;[.F91])" office:value-type="string" office:string-value="2">
            <text:p>2</text:p>
          </table:table-cell>
          <table:table-cell table:style-name="ce9"/>
          <table:table-cell table:style-name="ce11" table:formula="of:=VLOOKUP([.B91];[Listado.$A$2:.$D$19];4;0)" office:value-type="float" office:value="0">
            <text:p>#N/D</text:p>
          </table:table-cell>
          <table:table-cell table:style-name="ce11" table:formula="of:=VLOOKUP([.C91];[Listado.$A$2:.$D$19];4;0)" office:value-type="float" office:value="0">
            <text:p>#N/D</text:p>
          </table:table-cell>
          <table:table-cell table:style-name="ce11" table:formula="of:=VLOOKUP([.D91];[Listado.$A$2:.$D$19];4;0)" office:value-type="float" office:value="0">
            <text:p>#N/D</text:p>
          </table:table-cell>
          <table:table-cell table:style-name="ce11" table:formula="of:=VLOOKUP([.E91];[Listado.$A$2:.$D$19];4;0)" office:value-type="float" office:value="0">
            <text:p>#N/D</text:p>
          </table:table-cell>
          <table:table-cell table:style-name="ce11" table:formula="of:=VLOOKUP([.H91];[Listado.$A$2:.$D$19];4;0)" office:value-type="float" office:value="0">
            <text:p>#N/D</text:p>
          </table:table-cell>
          <table:table-cell table:style-name="ce11" table:formula="of:=COUNTIF([.J91:.M91];[.N9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523. Indica cuál es la cifra de las UNIDADES DE MILLAR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2];0;[.F92])" office:value-type="string" office:string-value="4">
            <text:p>4</text:p>
          </table:table-cell>
          <table:table-cell table:style-name="ce9"/>
          <table:table-cell table:style-name="ce11" table:formula="of:=VLOOKUP([.B92];[Listado.$A$2:.$D$19];4;0)" office:value-type="float" office:value="0">
            <text:p>#N/D</text:p>
          </table:table-cell>
          <table:table-cell table:style-name="ce11" table:formula="of:=VLOOKUP([.C92];[Listado.$A$2:.$D$19];4;0)" office:value-type="float" office:value="0">
            <text:p>#N/D</text:p>
          </table:table-cell>
          <table:table-cell table:style-name="ce11" table:formula="of:=VLOOKUP([.D92];[Listado.$A$2:.$D$19];4;0)" office:value-type="float" office:value="0">
            <text:p>#N/D</text:p>
          </table:table-cell>
          <table:table-cell table:style-name="ce11" table:formula="of:=VLOOKUP([.E92];[Listado.$A$2:.$D$19];4;0)" office:value-type="float" office:value="0">
            <text:p>#N/D</text:p>
          </table:table-cell>
          <table:table-cell table:style-name="ce11" table:formula="of:=VLOOKUP([.H92];[Listado.$A$2:.$D$19];4;0)" office:value-type="float" office:value="0">
            <text:p>#N/D</text:p>
          </table:table-cell>
          <table:table-cell table:style-name="ce11" table:formula="of:=COUNTIF([.J92:.M92];[.N9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480. Indica cuál es la cifra de las UNIDADES DE MILLAR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3];0;[.F93])" office:value-type="string" office:string-value="7">
            <text:p>7</text:p>
          </table:table-cell>
          <table:table-cell table:style-name="ce9"/>
          <table:table-cell table:style-name="ce11" table:formula="of:=VLOOKUP([.B93];[Listado.$A$2:.$D$19];4;0)" office:value-type="float" office:value="0">
            <text:p>#N/D</text:p>
          </table:table-cell>
          <table:table-cell table:style-name="ce11" table:formula="of:=VLOOKUP([.C93];[Listado.$A$2:.$D$19];4;0)" office:value-type="float" office:value="0">
            <text:p>#N/D</text:p>
          </table:table-cell>
          <table:table-cell table:style-name="ce11" table:formula="of:=VLOOKUP([.D93];[Listado.$A$2:.$D$19];4;0)" office:value-type="float" office:value="0">
            <text:p>#N/D</text:p>
          </table:table-cell>
          <table:table-cell table:style-name="ce11" table:formula="of:=VLOOKUP([.E93];[Listado.$A$2:.$D$19];4;0)" office:value-type="float" office:value="0">
            <text:p>#N/D</text:p>
          </table:table-cell>
          <table:table-cell table:style-name="ce11" table:formula="of:=VLOOKUP([.H93];[Listado.$A$2:.$D$19];4;0)" office:value-type="float" office:value="0">
            <text:p>#N/D</text:p>
          </table:table-cell>
          <table:table-cell table:style-name="ce11" table:formula="of:=COUNTIF([.J93:.M93];[.N9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376. Indica cuál es la cifra de las UNIDADES DE MILLAR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4];0;[.F94])" office:value-type="string" office:string-value="5">
            <text:p>5</text:p>
          </table:table-cell>
          <table:table-cell table:style-name="ce9"/>
          <table:table-cell table:style-name="ce11" table:formula="of:=VLOOKUP([.B94];[Listado.$A$2:.$D$19];4;0)" office:value-type="float" office:value="0">
            <text:p>#N/D</text:p>
          </table:table-cell>
          <table:table-cell table:style-name="ce11" table:formula="of:=VLOOKUP([.C94];[Listado.$A$2:.$D$19];4;0)" office:value-type="float" office:value="0">
            <text:p>#N/D</text:p>
          </table:table-cell>
          <table:table-cell table:style-name="ce11" table:formula="of:=VLOOKUP([.D94];[Listado.$A$2:.$D$19];4;0)" office:value-type="float" office:value="0">
            <text:p>#N/D</text:p>
          </table:table-cell>
          <table:table-cell table:style-name="ce11" table:formula="of:=VLOOKUP([.E94];[Listado.$A$2:.$D$19];4;0)" office:value-type="float" office:value="0">
            <text:p>#N/D</text:p>
          </table:table-cell>
          <table:table-cell table:style-name="ce11" table:formula="of:=VLOOKUP([.H94];[Listado.$A$2:.$D$19];4;0)" office:value-type="float" office:value="0">
            <text:p>#N/D</text:p>
          </table:table-cell>
          <table:table-cell table:style-name="ce11" table:formula="of:=COUNTIF([.J94:.M94];[.N9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731. Indica cuál es la cifra de las UNIDADES DE MILLAR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5];0;[.F95])" office:value-type="string" office:string-value="5">
            <text:p>5</text:p>
          </table:table-cell>
          <table:table-cell table:style-name="ce9"/>
          <table:table-cell table:style-name="ce11" table:formula="of:=VLOOKUP([.B95];[Listado.$A$2:.$D$19];4;0)" office:value-type="float" office:value="0">
            <text:p>#N/D</text:p>
          </table:table-cell>
          <table:table-cell table:style-name="ce11" table:formula="of:=VLOOKUP([.C95];[Listado.$A$2:.$D$19];4;0)" office:value-type="float" office:value="0">
            <text:p>#N/D</text:p>
          </table:table-cell>
          <table:table-cell table:style-name="ce11" table:formula="of:=VLOOKUP([.D95];[Listado.$A$2:.$D$19];4;0)" office:value-type="float" office:value="0">
            <text:p>#N/D</text:p>
          </table:table-cell>
          <table:table-cell table:style-name="ce11" table:formula="of:=VLOOKUP([.E95];[Listado.$A$2:.$D$19];4;0)" office:value-type="float" office:value="0">
            <text:p>#N/D</text:p>
          </table:table-cell>
          <table:table-cell table:style-name="ce11" table:formula="of:=VLOOKUP([.H95];[Listado.$A$2:.$D$19];4;0)" office:value-type="float" office:value="0">
            <text:p>#N/D</text:p>
          </table:table-cell>
          <table:table-cell table:style-name="ce11" table:formula="of:=COUNTIF([.J95:.M95];[.N9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870. Indica cuál es la cifra de las UNIDADES DE MILLAR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6];0;[.F96])" office:value-type="string" office:string-value="5">
            <text:p>5</text:p>
          </table:table-cell>
          <table:table-cell table:style-name="ce9"/>
          <table:table-cell table:style-name="ce11" table:formula="of:=VLOOKUP([.B96];[Listado.$A$2:.$D$19];4;0)" office:value-type="float" office:value="0">
            <text:p>#N/D</text:p>
          </table:table-cell>
          <table:table-cell table:style-name="ce11" table:formula="of:=VLOOKUP([.C96];[Listado.$A$2:.$D$19];4;0)" office:value-type="float" office:value="0">
            <text:p>#N/D</text:p>
          </table:table-cell>
          <table:table-cell table:style-name="ce11" table:formula="of:=VLOOKUP([.D96];[Listado.$A$2:.$D$19];4;0)" office:value-type="float" office:value="0">
            <text:p>#N/D</text:p>
          </table:table-cell>
          <table:table-cell table:style-name="ce11" table:formula="of:=VLOOKUP([.E96];[Listado.$A$2:.$D$19];4;0)" office:value-type="float" office:value="0">
            <text:p>#N/D</text:p>
          </table:table-cell>
          <table:table-cell table:style-name="ce11" table:formula="of:=VLOOKUP([.H96];[Listado.$A$2:.$D$19];4;0)" office:value-type="float" office:value="0">
            <text:p>#N/D</text:p>
          </table:table-cell>
          <table:table-cell table:style-name="ce11" table:formula="of:=COUNTIF([.J96:.M96];[.N9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215. Indica cuál es la cifra de las UNIDADES DE MILLAR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7];0;[.F97])" office:value-type="string" office:string-value="4">
            <text:p>4</text:p>
          </table:table-cell>
          <table:table-cell table:style-name="ce9"/>
          <table:table-cell table:style-name="ce11" table:formula="of:=VLOOKUP([.B97];[Listado.$A$2:.$D$19];4;0)" office:value-type="float" office:value="0">
            <text:p>#N/D</text:p>
          </table:table-cell>
          <table:table-cell table:style-name="ce11" table:formula="of:=VLOOKUP([.C97];[Listado.$A$2:.$D$19];4;0)" office:value-type="float" office:value="0">
            <text:p>#N/D</text:p>
          </table:table-cell>
          <table:table-cell table:style-name="ce11" table:formula="of:=VLOOKUP([.D97];[Listado.$A$2:.$D$19];4;0)" office:value-type="float" office:value="0">
            <text:p>#N/D</text:p>
          </table:table-cell>
          <table:table-cell table:style-name="ce11" table:formula="of:=VLOOKUP([.E97];[Listado.$A$2:.$D$19];4;0)" office:value-type="float" office:value="0">
            <text:p>#N/D</text:p>
          </table:table-cell>
          <table:table-cell table:style-name="ce11" table:formula="of:=VLOOKUP([.H97];[Listado.$A$2:.$D$19];4;0)" office:value-type="float" office:value="0">
            <text:p>#N/D</text:p>
          </table:table-cell>
          <table:table-cell table:style-name="ce11" table:formula="of:=COUNTIF([.J97:.M97];[.N9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273. Indica cuál es la cifra de las UNIDADES DE MILLAR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8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8];0;[.F98])" office:value-type="string" office:string-value="1">
            <text:p>1</text:p>
          </table:table-cell>
          <table:table-cell table:style-name="ce9"/>
          <table:table-cell table:style-name="ce11" table:formula="of:=VLOOKUP([.B98];[Listado.$A$2:.$D$19];4;0)" office:value-type="float" office:value="0">
            <text:p>#N/D</text:p>
          </table:table-cell>
          <table:table-cell table:style-name="ce11" table:formula="of:=VLOOKUP([.C98];[Listado.$A$2:.$D$19];4;0)" office:value-type="float" office:value="0">
            <text:p>#N/D</text:p>
          </table:table-cell>
          <table:table-cell table:style-name="ce11" table:formula="of:=VLOOKUP([.D98];[Listado.$A$2:.$D$19];4;0)" office:value-type="float" office:value="0">
            <text:p>#N/D</text:p>
          </table:table-cell>
          <table:table-cell table:style-name="ce11" table:formula="of:=VLOOKUP([.E98];[Listado.$A$2:.$D$19];4;0)" office:value-type="float" office:value="0">
            <text:p>#N/D</text:p>
          </table:table-cell>
          <table:table-cell table:style-name="ce11" table:formula="of:=VLOOKUP([.H98];[Listado.$A$2:.$D$19];4;0)" office:value-type="float" office:value="0">
            <text:p>#N/D</text:p>
          </table:table-cell>
          <table:table-cell table:style-name="ce11" table:formula="of:=COUNTIF([.J98:.M98];[.N9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468. Indica cuál es la cifra de las UNIDADES DE MILLAR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99];0;[.F99])" office:value-type="string" office:string-value="1">
            <text:p>1</text:p>
          </table:table-cell>
          <table:table-cell table:style-name="ce9"/>
          <table:table-cell table:style-name="ce11" table:formula="of:=VLOOKUP([.B99];[Listado.$A$2:.$D$19];4;0)" office:value-type="float" office:value="0">
            <text:p>#N/D</text:p>
          </table:table-cell>
          <table:table-cell table:style-name="ce11" table:formula="of:=VLOOKUP([.C99];[Listado.$A$2:.$D$19];4;0)" office:value-type="float" office:value="0">
            <text:p>#N/D</text:p>
          </table:table-cell>
          <table:table-cell table:style-name="ce11" table:formula="of:=VLOOKUP([.D99];[Listado.$A$2:.$D$19];4;0)" office:value-type="float" office:value="0">
            <text:p>#N/D</text:p>
          </table:table-cell>
          <table:table-cell table:style-name="ce11" table:formula="of:=VLOOKUP([.E99];[Listado.$A$2:.$D$19];4;0)" office:value-type="float" office:value="0">
            <text:p>#N/D</text:p>
          </table:table-cell>
          <table:table-cell table:style-name="ce11" table:formula="of:=VLOOKUP([.H99];[Listado.$A$2:.$D$19];4;0)" office:value-type="float" office:value="0">
            <text:p>#N/D</text:p>
          </table:table-cell>
          <table:table-cell table:style-name="ce11" table:formula="of:=COUNTIF([.J99:.M99];[.N9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791. Indica cuál es la cifra de las UNIDADES DE MILLAR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0];0;[.F100])" office:value-type="string" office:string-value="4">
            <text:p>4</text:p>
          </table:table-cell>
          <table:table-cell table:style-name="ce9"/>
          <table:table-cell table:style-name="ce11" table:formula="of:=VLOOKUP([.B100];[Listado.$A$2:.$D$19];4;0)" office:value-type="float" office:value="0">
            <text:p>#N/D</text:p>
          </table:table-cell>
          <table:table-cell table:style-name="ce11" table:formula="of:=VLOOKUP([.C100];[Listado.$A$2:.$D$19];4;0)" office:value-type="float" office:value="0">
            <text:p>#N/D</text:p>
          </table:table-cell>
          <table:table-cell table:style-name="ce11" table:formula="of:=VLOOKUP([.D100];[Listado.$A$2:.$D$19];4;0)" office:value-type="float" office:value="0">
            <text:p>#N/D</text:p>
          </table:table-cell>
          <table:table-cell table:style-name="ce11" table:formula="of:=VLOOKUP([.E100];[Listado.$A$2:.$D$19];4;0)" office:value-type="float" office:value="0">
            <text:p>#N/D</text:p>
          </table:table-cell>
          <table:table-cell table:style-name="ce11" table:formula="of:=VLOOKUP([.H100];[Listado.$A$2:.$D$19];4;0)" office:value-type="float" office:value="0">
            <text:p>#N/D</text:p>
          </table:table-cell>
          <table:table-cell table:style-name="ce11" table:formula="of:=COUNTIF([.J100:.M100];[.N10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091. Indica cuál es la cifra de las UNIDADES DE MILLAR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8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1];0;[.F101])" office:value-type="string" office:string-value="3">
            <text:p>3</text:p>
          </table:table-cell>
          <table:table-cell table:style-name="ce9"/>
          <table:table-cell table:style-name="ce11" table:formula="of:=VLOOKUP([.B101];[Listado.$A$2:.$D$19];4;0)" office:value-type="float" office:value="0">
            <text:p>#N/D</text:p>
          </table:table-cell>
          <table:table-cell table:style-name="ce11" table:formula="of:=VLOOKUP([.C101];[Listado.$A$2:.$D$19];4;0)" office:value-type="float" office:value="0">
            <text:p>#N/D</text:p>
          </table:table-cell>
          <table:table-cell table:style-name="ce11" table:formula="of:=VLOOKUP([.D101];[Listado.$A$2:.$D$19];4;0)" office:value-type="float" office:value="0">
            <text:p>#N/D</text:p>
          </table:table-cell>
          <table:table-cell table:style-name="ce11" table:formula="of:=VLOOKUP([.E101];[Listado.$A$2:.$D$19];4;0)" office:value-type="float" office:value="0">
            <text:p>#N/D</text:p>
          </table:table-cell>
          <table:table-cell table:style-name="ce11" table:formula="of:=VLOOKUP([.H101];[Listado.$A$2:.$D$19];4;0)" office:value-type="float" office:value="0">
            <text:p>#N/D</text:p>
          </table:table-cell>
          <table:table-cell table:style-name="ce11" table:formula="of:=COUNTIF([.J101:.M101];[.N10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851. Indica cuál es la cifra de las UNIDADES DE MILLAR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formula="of:=OFFSET([.A102];0;[.F102])" office:value-type="string" office:string-value="7">
            <text:p>7</text:p>
          </table:table-cell>
          <table:table-cell/>
          <table:table-cell table:style-name="ce10" table:formula="of:=VLOOKUP([.B102];[Listado.$A$2:.$D$19];4;0)" office:value-type="float" office:value="0">
            <text:p>#N/D</text:p>
          </table:table-cell>
          <table:table-cell table:style-name="ce10" table:formula="of:=VLOOKUP([.C102];[Listado.$A$2:.$D$19];4;0)" office:value-type="float" office:value="0">
            <text:p>#N/D</text:p>
          </table:table-cell>
          <table:table-cell table:style-name="ce10" table:formula="of:=VLOOKUP([.D102];[Listado.$A$2:.$D$19];4;0)" office:value-type="float" office:value="0">
            <text:p>#N/D</text:p>
          </table:table-cell>
          <table:table-cell table:style-name="ce10" table:formula="of:=VLOOKUP([.E102];[Listado.$A$2:.$D$19];4;0)" office:value-type="float" office:value="0">
            <text:p>#N/D</text:p>
          </table:table-cell>
          <table:table-cell table:style-name="ce10" table:formula="of:=VLOOKUP([.H102];[Listado.$A$2:.$D$19];4;0)" office:value-type="float" office:value="0">
            <text:p>#N/D</text:p>
          </table:table-cell>
          <table:table-cell table:style-name="ce10" table:formula="of:=COUNTIF([.J102:.M102];[.N102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9856. Indica cuál es la cifra de las UNIDADES DE MILLAR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9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3];0;[.F103])" office:value-type="string" office:string-value="9">
            <text:p>9</text:p>
          </table:table-cell>
          <table:table-cell table:style-name="ce9"/>
          <table:table-cell table:style-name="ce11" table:formula="of:=VLOOKUP([.B103];[Listado.$A$2:.$D$19];4;0)" office:value-type="float" office:value="0">
            <text:p>#N/D</text:p>
          </table:table-cell>
          <table:table-cell table:style-name="ce11" table:formula="of:=VLOOKUP([.C103];[Listado.$A$2:.$D$19];4;0)" office:value-type="float" office:value="0">
            <text:p>#N/D</text:p>
          </table:table-cell>
          <table:table-cell table:style-name="ce11" table:formula="of:=VLOOKUP([.D103];[Listado.$A$2:.$D$19];4;0)" office:value-type="float" office:value="0">
            <text:p>#N/D</text:p>
          </table:table-cell>
          <table:table-cell table:style-name="ce11" table:formula="of:=VLOOKUP([.E103];[Listado.$A$2:.$D$19];4;0)" office:value-type="float" office:value="0">
            <text:p>#N/D</text:p>
          </table:table-cell>
          <table:table-cell table:style-name="ce11" table:formula="of:=VLOOKUP([.H103];[Listado.$A$2:.$D$19];4;0)" office:value-type="float" office:value="0">
            <text:p>#N/D</text:p>
          </table:table-cell>
          <table:table-cell table:style-name="ce11" table:formula="of:=COUNTIF([.J103:.M103];[.N10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4365. Indica cuál es la cifra de las UNIDADES DE MILLAR: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4];0;[.F104])" office:value-type="string" office:string-value="4">
            <text:p>4</text:p>
          </table:table-cell>
          <table:table-cell table:style-name="ce9"/>
          <table:table-cell table:style-name="ce11" table:formula="of:=VLOOKUP([.B104];[Listado.$A$2:.$D$19];4;0)" office:value-type="float" office:value="0">
            <text:p>#N/D</text:p>
          </table:table-cell>
          <table:table-cell table:style-name="ce11" table:formula="of:=VLOOKUP([.C104];[Listado.$A$2:.$D$19];4;0)" office:value-type="float" office:value="0">
            <text:p>#N/D</text:p>
          </table:table-cell>
          <table:table-cell table:style-name="ce11" table:formula="of:=VLOOKUP([.D104];[Listado.$A$2:.$D$19];4;0)" office:value-type="float" office:value="0">
            <text:p>#N/D</text:p>
          </table:table-cell>
          <table:table-cell table:style-name="ce11" table:formula="of:=VLOOKUP([.E104];[Listado.$A$2:.$D$19];4;0)" office:value-type="float" office:value="0">
            <text:p>#N/D</text:p>
          </table:table-cell>
          <table:table-cell table:style-name="ce11" table:formula="of:=VLOOKUP([.H104];[Listado.$A$2:.$D$19];4;0)" office:value-type="float" office:value="0">
            <text:p>#N/D</text:p>
          </table:table-cell>
          <table:table-cell table:style-name="ce11" table:formula="of:=COUNTIF([.J104:.M104];[.N10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5739. Indica cuál es la cifra de las UNIDADES DE MILLAR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9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5];0;[.F105])" office:value-type="string" office:string-value="5">
            <text:p>5</text:p>
          </table:table-cell>
          <table:table-cell table:style-name="ce9"/>
          <table:table-cell table:style-name="ce11" table:formula="of:=VLOOKUP([.B105];[Listado.$A$2:.$D$19];4;0)" office:value-type="float" office:value="0">
            <text:p>#N/D</text:p>
          </table:table-cell>
          <table:table-cell table:style-name="ce11" table:formula="of:=VLOOKUP([.C105];[Listado.$A$2:.$D$19];4;0)" office:value-type="float" office:value="0">
            <text:p>#N/D</text:p>
          </table:table-cell>
          <table:table-cell table:style-name="ce11" table:formula="of:=VLOOKUP([.D105];[Listado.$A$2:.$D$19];4;0)" office:value-type="float" office:value="0">
            <text:p>#N/D</text:p>
          </table:table-cell>
          <table:table-cell table:style-name="ce11" table:formula="of:=VLOOKUP([.E105];[Listado.$A$2:.$D$19];4;0)" office:value-type="float" office:value="0">
            <text:p>#N/D</text:p>
          </table:table-cell>
          <table:table-cell table:style-name="ce11" table:formula="of:=VLOOKUP([.H105];[Listado.$A$2:.$D$19];4;0)" office:value-type="float" office:value="0">
            <text:p>#N/D</text:p>
          </table:table-cell>
          <table:table-cell table:style-name="ce11" table:formula="of:=COUNTIF([.J105:.M105];[.N10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596. Indica cuál es la cifra de las UNIDADES DE MILLAR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6];0;[.F106])" office:value-type="string" office:string-value="3">
            <text:p>3</text:p>
          </table:table-cell>
          <table:table-cell table:style-name="ce9"/>
          <table:table-cell table:style-name="ce11" table:formula="of:=VLOOKUP([.B106];[Listado.$A$2:.$D$19];4;0)" office:value-type="float" office:value="0">
            <text:p>#N/D</text:p>
          </table:table-cell>
          <table:table-cell table:style-name="ce11" table:formula="of:=VLOOKUP([.C106];[Listado.$A$2:.$D$19];4;0)" office:value-type="float" office:value="0">
            <text:p>#N/D</text:p>
          </table:table-cell>
          <table:table-cell table:style-name="ce11" table:formula="of:=VLOOKUP([.D106];[Listado.$A$2:.$D$19];4;0)" office:value-type="float" office:value="0">
            <text:p>#N/D</text:p>
          </table:table-cell>
          <table:table-cell table:style-name="ce11" table:formula="of:=VLOOKUP([.E106];[Listado.$A$2:.$D$19];4;0)" office:value-type="float" office:value="0">
            <text:p>#N/D</text:p>
          </table:table-cell>
          <table:table-cell table:style-name="ce11" table:formula="of:=VLOOKUP([.H106];[Listado.$A$2:.$D$19];4;0)" office:value-type="float" office:value="0">
            <text:p>#N/D</text:p>
          </table:table-cell>
          <table:table-cell table:style-name="ce11" table:formula="of:=COUNTIF([.J106:.M106];[.N10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103. Indica cuál es la cifra de las UNIDADES DE MILLAR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7];0;[.F107])" office:value-type="string" office:string-value="7">
            <text:p>7</text:p>
          </table:table-cell>
          <table:table-cell table:style-name="ce9"/>
          <table:table-cell table:style-name="ce11" table:formula="of:=VLOOKUP([.B107];[Listado.$A$2:.$D$19];4;0)" office:value-type="float" office:value="0">
            <text:p>#N/D</text:p>
          </table:table-cell>
          <table:table-cell table:style-name="ce11" table:formula="of:=VLOOKUP([.C107];[Listado.$A$2:.$D$19];4;0)" office:value-type="float" office:value="0">
            <text:p>#N/D</text:p>
          </table:table-cell>
          <table:table-cell table:style-name="ce11" table:formula="of:=VLOOKUP([.D107];[Listado.$A$2:.$D$19];4;0)" office:value-type="float" office:value="0">
            <text:p>#N/D</text:p>
          </table:table-cell>
          <table:table-cell table:style-name="ce11" table:formula="of:=VLOOKUP([.E107];[Listado.$A$2:.$D$19];4;0)" office:value-type="float" office:value="0">
            <text:p>#N/D</text:p>
          </table:table-cell>
          <table:table-cell table:style-name="ce11" table:formula="of:=VLOOKUP([.H107];[Listado.$A$2:.$D$19];4;0)" office:value-type="float" office:value="0">
            <text:p>#N/D</text:p>
          </table:table-cell>
          <table:table-cell table:style-name="ce11" table:formula="of:=COUNTIF([.J107:.M107];[.N10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2096. Indica cuál es la cifra de las UNIDADES DE MILLAR: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8];0;[.F108])" office:value-type="string" office:string-value="2">
            <text:p>2</text:p>
          </table:table-cell>
          <table:table-cell table:style-name="ce9"/>
          <table:table-cell table:style-name="ce11" table:formula="of:=VLOOKUP([.B108];[Listado.$A$2:.$D$19];4;0)" office:value-type="float" office:value="0">
            <text:p>#N/D</text:p>
          </table:table-cell>
          <table:table-cell table:style-name="ce11" table:formula="of:=VLOOKUP([.C108];[Listado.$A$2:.$D$19];4;0)" office:value-type="float" office:value="0">
            <text:p>#N/D</text:p>
          </table:table-cell>
          <table:table-cell table:style-name="ce11" table:formula="of:=VLOOKUP([.D108];[Listado.$A$2:.$D$19];4;0)" office:value-type="float" office:value="0">
            <text:p>#N/D</text:p>
          </table:table-cell>
          <table:table-cell table:style-name="ce11" table:formula="of:=VLOOKUP([.E108];[Listado.$A$2:.$D$19];4;0)" office:value-type="float" office:value="0">
            <text:p>#N/D</text:p>
          </table:table-cell>
          <table:table-cell table:style-name="ce11" table:formula="of:=VLOOKUP([.H108];[Listado.$A$2:.$D$19];4;0)" office:value-type="float" office:value="0">
            <text:p>#N/D</text:p>
          </table:table-cell>
          <table:table-cell table:style-name="ce11" table:formula="of:=COUNTIF([.J108:.M108];[.N10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926. Indica cuál es la cifra de las UNIDADES DE MILLAR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6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09];0;[.F109])" office:value-type="string" office:string-value="1">
            <text:p>1</text:p>
          </table:table-cell>
          <table:table-cell table:style-name="ce9"/>
          <table:table-cell table:style-name="ce11" table:formula="of:=VLOOKUP([.B109];[Listado.$A$2:.$D$19];4;0)" office:value-type="float" office:value="0">
            <text:p>#N/D</text:p>
          </table:table-cell>
          <table:table-cell table:style-name="ce11" table:formula="of:=VLOOKUP([.C109];[Listado.$A$2:.$D$19];4;0)" office:value-type="float" office:value="0">
            <text:p>#N/D</text:p>
          </table:table-cell>
          <table:table-cell table:style-name="ce11" table:formula="of:=VLOOKUP([.D109];[Listado.$A$2:.$D$19];4;0)" office:value-type="float" office:value="0">
            <text:p>#N/D</text:p>
          </table:table-cell>
          <table:table-cell table:style-name="ce11" table:formula="of:=VLOOKUP([.E109];[Listado.$A$2:.$D$19];4;0)" office:value-type="float" office:value="0">
            <text:p>#N/D</text:p>
          </table:table-cell>
          <table:table-cell table:style-name="ce11" table:formula="of:=VLOOKUP([.H109];[Listado.$A$2:.$D$19];4;0)" office:value-type="float" office:value="0">
            <text:p>#N/D</text:p>
          </table:table-cell>
          <table:table-cell table:style-name="ce11" table:formula="of:=COUNTIF([.J109:.M109];[.N10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734. Indica cuál es la cifra de las UNIDADES DE MILLAR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10];0;[.F110])" office:value-type="string" office:string-value="1">
            <text:p>1</text:p>
          </table:table-cell>
          <table:table-cell table:style-name="ce9"/>
          <table:table-cell table:style-name="ce11" table:formula="of:=VLOOKUP([.B110];[Listado.$A$2:.$D$19];4;0)" office:value-type="float" office:value="0">
            <text:p>#N/D</text:p>
          </table:table-cell>
          <table:table-cell table:style-name="ce11" table:formula="of:=VLOOKUP([.C110];[Listado.$A$2:.$D$19];4;0)" office:value-type="float" office:value="0">
            <text:p>#N/D</text:p>
          </table:table-cell>
          <table:table-cell table:style-name="ce11" table:formula="of:=VLOOKUP([.D110];[Listado.$A$2:.$D$19];4;0)" office:value-type="float" office:value="0">
            <text:p>#N/D</text:p>
          </table:table-cell>
          <table:table-cell table:style-name="ce11" table:formula="of:=VLOOKUP([.E110];[Listado.$A$2:.$D$19];4;0)" office:value-type="float" office:value="0">
            <text:p>#N/D</text:p>
          </table:table-cell>
          <table:table-cell table:style-name="ce11" table:formula="of:=VLOOKUP([.H110];[Listado.$A$2:.$D$19];4;0)" office:value-type="float" office:value="0">
            <text:p>#N/D</text:p>
          </table:table-cell>
          <table:table-cell table:style-name="ce11" table:formula="of:=COUNTIF([.J110:.M110];[.N11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645. Indica cuál es la cifra de las UNIDADES DE MILLAR: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11];0;[.F111])" office:value-type="string" office:string-value="9">
            <text:p>9</text:p>
          </table:table-cell>
          <table:table-cell table:style-name="ce9"/>
          <table:table-cell table:style-name="ce11" table:formula="of:=VLOOKUP([.B111];[Listado.$A$2:.$D$19];4;0)" office:value-type="float" office:value="0">
            <text:p>#N/D</text:p>
          </table:table-cell>
          <table:table-cell table:style-name="ce11" table:formula="of:=VLOOKUP([.C111];[Listado.$A$2:.$D$19];4;0)" office:value-type="float" office:value="0">
            <text:p>#N/D</text:p>
          </table:table-cell>
          <table:table-cell table:style-name="ce11" table:formula="of:=VLOOKUP([.D111];[Listado.$A$2:.$D$19];4;0)" office:value-type="float" office:value="0">
            <text:p>#N/D</text:p>
          </table:table-cell>
          <table:table-cell table:style-name="ce11" table:formula="of:=VLOOKUP([.E111];[Listado.$A$2:.$D$19];4;0)" office:value-type="float" office:value="0">
            <text:p>#N/D</text:p>
          </table:table-cell>
          <table:table-cell table:style-name="ce11" table:formula="of:=VLOOKUP([.H111];[Listado.$A$2:.$D$19];4;0)" office:value-type="float" office:value="0">
            <text:p>#N/D</text:p>
          </table:table-cell>
          <table:table-cell table:style-name="ce11" table:formula="of:=COUNTIF([.J111:.M111];[.N11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350. Indica cuál es la cifra de las UNIDADES DE MILLAR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8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12];0;[.F112])" office:value-type="string" office:string-value="9">
            <text:p>9</text:p>
          </table:table-cell>
          <table:table-cell table:style-name="ce9"/>
          <table:table-cell table:style-name="ce11" table:formula="of:=VLOOKUP([.B112];[Listado.$A$2:.$D$19];4;0)" office:value-type="float" office:value="0">
            <text:p>#N/D</text:p>
          </table:table-cell>
          <table:table-cell table:style-name="ce11" table:formula="of:=VLOOKUP([.C112];[Listado.$A$2:.$D$19];4;0)" office:value-type="float" office:value="0">
            <text:p>#N/D</text:p>
          </table:table-cell>
          <table:table-cell table:style-name="ce11" table:formula="of:=VLOOKUP([.D112];[Listado.$A$2:.$D$19];4;0)" office:value-type="float" office:value="0">
            <text:p>#N/D</text:p>
          </table:table-cell>
          <table:table-cell table:style-name="ce11" table:formula="of:=VLOOKUP([.E112];[Listado.$A$2:.$D$19];4;0)" office:value-type="float" office:value="0">
            <text:p>#N/D</text:p>
          </table:table-cell>
          <table:table-cell table:style-name="ce11" table:formula="of:=VLOOKUP([.H112];[Listado.$A$2:.$D$19];4;0)" office:value-type="float" office:value="0">
            <text:p>#N/D</text:p>
          </table:table-cell>
          <table:table-cell table:style-name="ce11" table:formula="of:=COUNTIF([.J112:.M112];[.N11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479. Indica cuál es la cifra de las UNIDADES DE MILLAR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13];0;[.F113])" office:value-type="string" office:string-value="6">
            <text:p>6</text:p>
          </table:table-cell>
          <table:table-cell table:style-name="ce9"/>
          <table:table-cell table:style-name="ce11" table:formula="of:=VLOOKUP([.B113];[Listado.$A$2:.$D$19];4;0)" office:value-type="float" office:value="0">
            <text:p>#N/D</text:p>
          </table:table-cell>
          <table:table-cell table:style-name="ce11" table:formula="of:=VLOOKUP([.C113];[Listado.$A$2:.$D$19];4;0)" office:value-type="float" office:value="0">
            <text:p>#N/D</text:p>
          </table:table-cell>
          <table:table-cell table:style-name="ce11" table:formula="of:=VLOOKUP([.D113];[Listado.$A$2:.$D$19];4;0)" office:value-type="float" office:value="0">
            <text:p>#N/D</text:p>
          </table:table-cell>
          <table:table-cell table:style-name="ce11" table:formula="of:=VLOOKUP([.E113];[Listado.$A$2:.$D$19];4;0)" office:value-type="float" office:value="0">
            <text:p>#N/D</text:p>
          </table:table-cell>
          <table:table-cell table:style-name="ce11" table:formula="of:=VLOOKUP([.H113];[Listado.$A$2:.$D$19];4;0)" office:value-type="float" office:value="0">
            <text:p>#N/D</text:p>
          </table:table-cell>
          <table:table-cell table:style-name="ce11" table:formula="of:=COUNTIF([.J113:.M113];[.N11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185. Indica cuál es la cifra de las UNIDADES DE MILLAR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14];0;[.F114])" office:value-type="string" office:string-value="6">
            <text:p>6</text:p>
          </table:table-cell>
          <table:table-cell table:style-name="ce9"/>
          <table:table-cell table:style-name="ce11" table:formula="of:=VLOOKUP([.B114];[Listado.$A$2:.$D$19];4;0)" office:value-type="float" office:value="0">
            <text:p>#N/D</text:p>
          </table:table-cell>
          <table:table-cell table:style-name="ce11" table:formula="of:=VLOOKUP([.C114];[Listado.$A$2:.$D$19];4;0)" office:value-type="float" office:value="0">
            <text:p>#N/D</text:p>
          </table:table-cell>
          <table:table-cell table:style-name="ce11" table:formula="of:=VLOOKUP([.D114];[Listado.$A$2:.$D$19];4;0)" office:value-type="float" office:value="0">
            <text:p>#N/D</text:p>
          </table:table-cell>
          <table:table-cell table:style-name="ce11" table:formula="of:=VLOOKUP([.E114];[Listado.$A$2:.$D$19];4;0)" office:value-type="float" office:value="0">
            <text:p>#N/D</text:p>
          </table:table-cell>
          <table:table-cell table:style-name="ce11" table:formula="of:=VLOOKUP([.H114];[Listado.$A$2:.$D$19];4;0)" office:value-type="float" office:value="0">
            <text:p>#N/D</text:p>
          </table:table-cell>
          <table:table-cell table:style-name="ce11" table:formula="of:=COUNTIF([.J114:.M114];[.N11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3487. Indica cuál es la cifra de las UNIDADES DE MILLAR: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de millar es la cuarta de la parte entera contando desde la derecha.</text:p>
          </table:table-cell>
          <table:table-cell table:style-name="ce9" table:formula="of:=OFFSET([.A115];0;[.F115])" office:value-type="string" office:string-value="3">
            <text:p>3</text:p>
          </table:table-cell>
          <table:table-cell table:style-name="ce9"/>
          <table:table-cell table:style-name="ce11" table:formula="of:=VLOOKUP([.B115];[Listado.$A$2:.$D$19];4;0)" office:value-type="float" office:value="0">
            <text:p>#N/D</text:p>
          </table:table-cell>
          <table:table-cell table:style-name="ce11" table:formula="of:=VLOOKUP([.C115];[Listado.$A$2:.$D$19];4;0)" office:value-type="float" office:value="0">
            <text:p>#N/D</text:p>
          </table:table-cell>
          <table:table-cell table:style-name="ce11" table:formula="of:=VLOOKUP([.D115];[Listado.$A$2:.$D$19];4;0)" office:value-type="float" office:value="0">
            <text:p>#N/D</text:p>
          </table:table-cell>
          <table:table-cell table:style-name="ce11" table:formula="of:=VLOOKUP([.E115];[Listado.$A$2:.$D$19];4;0)" office:value-type="float" office:value="0">
            <text:p>#N/D</text:p>
          </table:table-cell>
          <table:table-cell table:style-name="ce11" table:formula="of:=VLOOKUP([.H115];[Listado.$A$2:.$D$19];4;0)" office:value-type="float" office:value="0">
            <text:p>#N/D</text:p>
          </table:table-cell>
          <table:table-cell table:style-name="ce11" table:formula="of:=COUNTIF([.J115:.M115];[.N11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1468. Indica cuál es la cifra de las UNIDADES: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3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es la última de la parte entera.</text:p>
          </table:table-cell>
          <table:table-cell table:style-name="ce9" table:formula="of:=OFFSET([.A116];0;[.F116])" office:value-type="string" office:string-value="8">
            <text:p>8</text:p>
          </table:table-cell>
          <table:table-cell table:style-name="ce9"/>
          <table:table-cell table:style-name="ce11" table:formula="of:=VLOOKUP([.B116];[Listado.$A$2:.$D$19];4;0)" office:value-type="float" office:value="0">
            <text:p>#N/D</text:p>
          </table:table-cell>
          <table:table-cell table:style-name="ce11" table:formula="of:=VLOOKUP([.C116];[Listado.$A$2:.$D$19];4;0)" office:value-type="float" office:value="0">
            <text:p>#N/D</text:p>
          </table:table-cell>
          <table:table-cell table:style-name="ce11" table:formula="of:=VLOOKUP([.D116];[Listado.$A$2:.$D$19];4;0)" office:value-type="float" office:value="0">
            <text:p>#N/D</text:p>
          </table:table-cell>
          <table:table-cell table:style-name="ce11" table:formula="of:=VLOOKUP([.E116];[Listado.$A$2:.$D$19];4;0)" office:value-type="float" office:value="0">
            <text:p>#N/D</text:p>
          </table:table-cell>
          <table:table-cell table:style-name="ce11" table:formula="of:=VLOOKUP([.H116];[Listado.$A$2:.$D$19];4;0)" office:value-type="float" office:value="0">
            <text:p>#N/D</text:p>
          </table:table-cell>
          <table:table-cell table:style-name="ce11" table:formula="of:=COUNTIF([.J116:.M116];[.N11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6742. Indica cuál es la cifra de las UNIDADES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6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es la última de la parte entera.</text:p>
          </table:table-cell>
          <table:table-cell table:style-name="ce9" table:formula="of:=OFFSET([.A117];0;[.F117])" office:value-type="string" office:string-value="2">
            <text:p>2</text:p>
          </table:table-cell>
          <table:table-cell table:style-name="ce9"/>
          <table:table-cell table:style-name="ce11" table:formula="of:=VLOOKUP([.B117];[Listado.$A$2:.$D$19];4;0)" office:value-type="float" office:value="0">
            <text:p>#N/D</text:p>
          </table:table-cell>
          <table:table-cell table:style-name="ce11" table:formula="of:=VLOOKUP([.C117];[Listado.$A$2:.$D$19];4;0)" office:value-type="float" office:value="0">
            <text:p>#N/D</text:p>
          </table:table-cell>
          <table:table-cell table:style-name="ce11" table:formula="of:=VLOOKUP([.D117];[Listado.$A$2:.$D$19];4;0)" office:value-type="float" office:value="0">
            <text:p>#N/D</text:p>
          </table:table-cell>
          <table:table-cell table:style-name="ce11" table:formula="of:=VLOOKUP([.E117];[Listado.$A$2:.$D$19];4;0)" office:value-type="float" office:value="0">
            <text:p>#N/D</text:p>
          </table:table-cell>
          <table:table-cell table:style-name="ce11" table:formula="of:=VLOOKUP([.H117];[Listado.$A$2:.$D$19];4;0)" office:value-type="float" office:value="0">
            <text:p>#N/D</text:p>
          </table:table-cell>
          <table:table-cell table:style-name="ce11" table:formula="of:=COUNTIF([.J117:.M117];[.N11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9317. Indica cuál es la cifra de las UNIDADES: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es la última de la parte entera.</text:p>
          </table:table-cell>
          <table:table-cell table:style-name="ce9" table:formula="of:=OFFSET([.A118];0;[.F118])" office:value-type="string" office:string-value="7">
            <text:p>7</text:p>
          </table:table-cell>
          <table:table-cell table:style-name="ce9"/>
          <table:table-cell table:style-name="ce11" table:formula="of:=VLOOKUP([.B118];[Listado.$A$2:.$D$19];4;0)" office:value-type="float" office:value="0">
            <text:p>#N/D</text:p>
          </table:table-cell>
          <table:table-cell table:style-name="ce11" table:formula="of:=VLOOKUP([.C118];[Listado.$A$2:.$D$19];4;0)" office:value-type="float" office:value="0">
            <text:p>#N/D</text:p>
          </table:table-cell>
          <table:table-cell table:style-name="ce11" table:formula="of:=VLOOKUP([.D118];[Listado.$A$2:.$D$19];4;0)" office:value-type="float" office:value="0">
            <text:p>#N/D</text:p>
          </table:table-cell>
          <table:table-cell table:style-name="ce11" table:formula="of:=VLOOKUP([.E118];[Listado.$A$2:.$D$19];4;0)" office:value-type="float" office:value="0">
            <text:p>#N/D</text:p>
          </table:table-cell>
          <table:table-cell table:style-name="ce11" table:formula="of:=VLOOKUP([.H118];[Listado.$A$2:.$D$19];4;0)" office:value-type="float" office:value="0">
            <text:p>#N/D</text:p>
          </table:table-cell>
          <table:table-cell table:style-name="ce11" table:formula="of:=COUNTIF([.J118:.M118];[.N11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Default" office:value-type="string">
            <text:p>Observa el número 7491. Indica cuál es la cifra de las UNIDADES: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4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es la última de la parte entera.</text:p>
          </table:table-cell>
          <table:table-cell table:formula="of:=OFFSET([.A119];0;[.F119])" office:value-type="string" office:string-value="1">
            <text:p>1</text:p>
          </table:table-cell>
          <table:table-cell/>
          <table:table-cell table:style-name="ce10" table:formula="of:=VLOOKUP([.B119];[Listado.$A$2:.$D$19];4;0)" office:value-type="float" office:value="0">
            <text:p>#N/D</text:p>
          </table:table-cell>
          <table:table-cell table:style-name="ce10" table:formula="of:=VLOOKUP([.C119];[Listado.$A$2:.$D$19];4;0)" office:value-type="float" office:value="0">
            <text:p>#N/D</text:p>
          </table:table-cell>
          <table:table-cell table:style-name="ce10" table:formula="of:=VLOOKUP([.D119];[Listado.$A$2:.$D$19];4;0)" office:value-type="float" office:value="0">
            <text:p>#N/D</text:p>
          </table:table-cell>
          <table:table-cell table:style-name="ce10" table:formula="of:=VLOOKUP([.E119];[Listado.$A$2:.$D$19];4;0)" office:value-type="float" office:value="0">
            <text:p>#N/D</text:p>
          </table:table-cell>
          <table:table-cell table:style-name="ce10" table:formula="of:=VLOOKUP([.H119];[Listado.$A$2:.$D$19];4;0)" office:value-type="float" office:value="0">
            <text:p>#N/D</text:p>
          </table:table-cell>
          <table:table-cell table:style-name="ce10" table:formula="of:=COUNTIF([.J119:.M119];[.N119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6048. Indica cuál es la cifra de las UNIDADES: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es la última de la parte entera.</text:p>
          </table:table-cell>
          <table:table-cell table:formula="of:=OFFSET([.A120];0;[.F120])" office:value-type="string" office:string-value="8">
            <text:p>8</text:p>
          </table:table-cell>
          <table:table-cell/>
          <table:table-cell table:style-name="ce10" table:formula="of:=VLOOKUP([.B120];[Listado.$A$2:.$D$19];4;0)" office:value-type="float" office:value="0">
            <text:p>#N/D</text:p>
          </table:table-cell>
          <table:table-cell table:style-name="ce10" table:formula="of:=VLOOKUP([.C120];[Listado.$A$2:.$D$19];4;0)" office:value-type="float" office:value="0">
            <text:p>#N/D</text:p>
          </table:table-cell>
          <table:table-cell table:style-name="ce10" table:formula="of:=VLOOKUP([.D120];[Listado.$A$2:.$D$19];4;0)" office:value-type="float" office:value="0">
            <text:p>#N/D</text:p>
          </table:table-cell>
          <table:table-cell table:style-name="ce10" table:formula="of:=VLOOKUP([.E120];[Listado.$A$2:.$D$19];4;0)" office:value-type="float" office:value="0">
            <text:p>#N/D</text:p>
          </table:table-cell>
          <table:table-cell table:style-name="ce10" table:formula="of:=VLOOKUP([.H120];[Listado.$A$2:.$D$19];4;0)" office:value-type="float" office:value="0">
            <text:p>#N/D</text:p>
          </table:table-cell>
          <table:table-cell table:style-name="ce10" table:formula="of:=COUNTIF([.J120:.M120];[.N120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3490. Indica cuál es la cifra de las UNIDADE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es la última de la parte entera.</text:p>
          </table:table-cell>
          <table:table-cell table:formula="of:=OFFSET([.A121];0;[.F121])" office:value-type="string" office:string-value="0">
            <text:p>0</text:p>
          </table:table-cell>
          <table:table-cell/>
          <table:table-cell table:style-name="ce10" table:formula="of:=VLOOKUP([.B121];[Listado.$A$2:.$D$19];4;0)" office:value-type="float" office:value="0">
            <text:p>#N/D</text:p>
          </table:table-cell>
          <table:table-cell table:style-name="ce10" table:formula="of:=VLOOKUP([.C121];[Listado.$A$2:.$D$19];4;0)" office:value-type="float" office:value="0">
            <text:p>#N/D</text:p>
          </table:table-cell>
          <table:table-cell table:style-name="ce10" table:formula="of:=VLOOKUP([.D121];[Listado.$A$2:.$D$19];4;0)" office:value-type="float" office:value="0">
            <text:p>#N/D</text:p>
          </table:table-cell>
          <table:table-cell table:style-name="ce10" table:formula="of:=VLOOKUP([.E121];[Listado.$A$2:.$D$19];4;0)" office:value-type="float" office:value="0">
            <text:p>#N/D</text:p>
          </table:table-cell>
          <table:table-cell table:style-name="ce10" table:formula="of:=VLOOKUP([.H121];[Listado.$A$2:.$D$19];4;0)" office:value-type="float" office:value="0">
            <text:p>#N/D</text:p>
          </table:table-cell>
          <table:table-cell table:style-name="ce10" table:formula="of:=COUNTIF([.J121:.M121];[.N121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7620. Indica cuál es la cifra de las UNIDADE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2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6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es la última de la parte entera.</text:p>
          </table:table-cell>
          <table:table-cell table:formula="of:=OFFSET([.A122];0;[.F122])" office:value-type="string" office:string-value="0">
            <text:p>0</text:p>
          </table:table-cell>
          <table:table-cell/>
          <table:table-cell table:style-name="ce10" table:formula="of:=VLOOKUP([.B122];[Listado.$A$2:.$D$19];4;0)" office:value-type="float" office:value="0">
            <text:p>#N/D</text:p>
          </table:table-cell>
          <table:table-cell table:style-name="ce10" table:formula="of:=VLOOKUP([.C122];[Listado.$A$2:.$D$19];4;0)" office:value-type="float" office:value="0">
            <text:p>#N/D</text:p>
          </table:table-cell>
          <table:table-cell table:style-name="ce10" table:formula="of:=VLOOKUP([.D122];[Listado.$A$2:.$D$19];4;0)" office:value-type="float" office:value="0">
            <text:p>#N/D</text:p>
          </table:table-cell>
          <table:table-cell table:style-name="ce10" table:formula="of:=VLOOKUP([.E122];[Listado.$A$2:.$D$19];4;0)" office:value-type="float" office:value="0">
            <text:p>#N/D</text:p>
          </table:table-cell>
          <table:table-cell table:style-name="ce10" table:formula="of:=VLOOKUP([.H122];[Listado.$A$2:.$D$19];4;0)" office:value-type="float" office:value="0">
            <text:p>#N/D</text:p>
          </table:table-cell>
          <table:table-cell table:style-name="ce10" table:formula="of:=COUNTIF([.J122:.M122];[.N122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6839. Indica cuál es la cifra de las UNIDADES: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7</text:p>
          </table:table-cell>
          <table:table-cell table:style-name="Default" office:value-type="string">
            <text:p>5</text:p>
          </table:table-cell>
          <table:table-cell table:style-name="Default" office:value-type="string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a cifra de las unidades es la última de la parte entera.</text:p>
          </table:table-cell>
          <table:table-cell table:formula="of:=OFFSET([.A123];0;[.F123])" office:value-type="string" office:string-value="9">
            <text:p>9</text:p>
          </table:table-cell>
          <table:table-cell/>
          <table:table-cell table:style-name="ce10" table:formula="of:=VLOOKUP([.B123];[Listado.$A$2:.$D$19];4;0)" office:value-type="float" office:value="0">
            <text:p>#N/D</text:p>
          </table:table-cell>
          <table:table-cell table:style-name="ce10" table:formula="of:=VLOOKUP([.C123];[Listado.$A$2:.$D$19];4;0)" office:value-type="float" office:value="0">
            <text:p>#N/D</text:p>
          </table:table-cell>
          <table:table-cell table:style-name="ce10" table:formula="of:=VLOOKUP([.D123];[Listado.$A$2:.$D$19];4;0)" office:value-type="float" office:value="0">
            <text:p>#N/D</text:p>
          </table:table-cell>
          <table:table-cell table:style-name="ce10" table:formula="of:=VLOOKUP([.E123];[Listado.$A$2:.$D$19];4;0)" office:value-type="float" office:value="0">
            <text:p>#N/D</text:p>
          </table:table-cell>
          <table:table-cell table:style-name="ce10" table:formula="of:=VLOOKUP([.H123];[Listado.$A$2:.$D$19];4;0)" office:value-type="float" office:value="0">
            <text:p>#N/D</text:p>
          </table:table-cell>
          <table:table-cell table:style-name="ce10" table:formula="of:=COUNTIF([.J123:.M123];[.N123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9530. Indica cuál es la cifra de las UNIDADE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9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La cifra de las unidades es la última de la parte entera.</text:p>
          </table:table-cell>
          <table:table-cell table:formula="of:=OFFSET([.A124];0;[.F124])" office:value-type="string" office:string-value="0">
            <text:p>0</text:p>
          </table:table-cell>
          <table:table-cell/>
          <table:table-cell table:style-name="ce10" table:formula="of:=VLOOKUP([.B124];[Listado.$A$2:.$D$19];4;0)" office:value-type="float" office:value="0">
            <text:p>#N/D</text:p>
          </table:table-cell>
          <table:table-cell table:style-name="ce10" table:formula="of:=VLOOKUP([.C124];[Listado.$A$2:.$D$19];4;0)" office:value-type="float" office:value="0">
            <text:p>#N/D</text:p>
          </table:table-cell>
          <table:table-cell table:style-name="ce10" table:formula="of:=VLOOKUP([.D124];[Listado.$A$2:.$D$19];4;0)" office:value-type="float" office:value="0">
            <text:p>#N/D</text:p>
          </table:table-cell>
          <table:table-cell table:style-name="ce10" table:formula="of:=VLOOKUP([.E124];[Listado.$A$2:.$D$19];4;0)" office:value-type="float" office:value="0">
            <text:p>#N/D</text:p>
          </table:table-cell>
          <table:table-cell table:style-name="ce10" table:formula="of:=VLOOKUP([.H124];[Listado.$A$2:.$D$19];4;0)" office:value-type="float" office:value="0">
            <text:p>#N/D</text:p>
          </table:table-cell>
          <table:table-cell table:style-name="ce10" table:formula="of:=COUNTIF([.J124:.M124];[.N124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Default" office:value-type="string">
            <text:p>Observa el número 1382. Indica cuál es la cifra de las UNIDADES:</text:p>
          </table:table-cell>
          <table:table-cell table:style-name="Default" office:value-type="string">
            <text:p>3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8</text:p>
          </table:table-cell>
          <table:table-cell table:style-name="Default" office:value-type="string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La cifra de las unidades es la última de la parte entera.</text:p>
          </table:table-cell>
          <table:table-cell table:formula="of:=OFFSET([.A125];0;[.F125])" office:value-type="string" office:string-value="2">
            <text:p>2</text:p>
          </table:table-cell>
          <table:table-cell/>
          <table:table-cell table:style-name="ce10" table:formula="of:=VLOOKUP([.B125];[Listado.$A$2:.$D$19];4;0)" office:value-type="float" office:value="0">
            <text:p>#N/D</text:p>
          </table:table-cell>
          <table:table-cell table:style-name="ce10" table:formula="of:=VLOOKUP([.C125];[Listado.$A$2:.$D$19];4;0)" office:value-type="float" office:value="0">
            <text:p>#N/D</text:p>
          </table:table-cell>
          <table:table-cell table:style-name="ce10" table:formula="of:=VLOOKUP([.D125];[Listado.$A$2:.$D$19];4;0)" office:value-type="float" office:value="0">
            <text:p>#N/D</text:p>
          </table:table-cell>
          <table:table-cell table:style-name="ce10" table:formula="of:=VLOOKUP([.E125];[Listado.$A$2:.$D$19];4;0)" office:value-type="float" office:value="0">
            <text:p>#N/D</text:p>
          </table:table-cell>
          <table:table-cell table:style-name="ce10" table:formula="of:=VLOOKUP([.H125];[Listado.$A$2:.$D$19];4;0)" office:value-type="float" office:value="0">
            <text:p>#N/D</text:p>
          </table:table-cell>
          <table:table-cell table:style-name="ce10" table:formula="of:=COUNTIF([.J125:.M125];[.N125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8049. Indica cuál es la cifra de las UNIDADES:</text:p>
          </table:table-cell>
          <table:table-cell table:style-name="ce6" office:value-type="string">
            <text:p>6</text:p>
          </table:table-cell>
          <table:table-cell table:style-name="ce6" office:value-type="string">
            <text:p>9</text:p>
          </table:table-cell>
          <table:table-cell table:style-name="ce6" office:value-type="string">
            <text:p>8</text:p>
          </table:table-cell>
          <table:table-cell table:style-name="ce6" office:value-type="string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26];0;[.F126])" office:value-type="string" office:string-value="9">
            <text:p>9</text:p>
          </table:table-cell>
          <table:table-cell/>
          <table:table-cell table:style-name="ce10" table:formula="of:=VLOOKUP([.B126];[Listado.$A$2:.$D$19];4;0)" office:value-type="float" office:value="0">
            <text:p>#N/D</text:p>
          </table:table-cell>
          <table:table-cell table:style-name="ce10" table:formula="of:=VLOOKUP([.C126];[Listado.$A$2:.$D$19];4;0)" office:value-type="float" office:value="0">
            <text:p>#N/D</text:p>
          </table:table-cell>
          <table:table-cell table:style-name="ce10" table:formula="of:=VLOOKUP([.D126];[Listado.$A$2:.$D$19];4;0)" office:value-type="float" office:value="0">
            <text:p>#N/D</text:p>
          </table:table-cell>
          <table:table-cell table:style-name="ce10" table:formula="of:=VLOOKUP([.E126];[Listado.$A$2:.$D$19];4;0)" office:value-type="float" office:value="0">
            <text:p>#N/D</text:p>
          </table:table-cell>
          <table:table-cell table:style-name="ce10" table:formula="of:=VLOOKUP([.H126];[Listado.$A$2:.$D$19];4;0)" office:value-type="float" office:value="0">
            <text:p>#N/D</text:p>
          </table:table-cell>
          <table:table-cell table:style-name="ce10" table:formula="of:=COUNTIF([.J126:.M126];[.N126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4015. Indica cuál es la cifra de las UNIDADES:</text:p>
          </table:table-cell>
          <table:table-cell table:style-name="ce7" office:value-type="string">
            <text:p>7</text:p>
          </table:table-cell>
          <table:table-cell table:style-name="ce7" office:value-type="string">
            <text:p>8</text:p>
          </table:table-cell>
          <table:table-cell table:style-name="ce7" office:value-type="string">
            <text:p>5</text:p>
          </table:table-cell>
          <table:table-cell table:style-name="ce7" office:value-type="string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a cifra de las unidades es la última de la parte entera.</text:p>
          </table:table-cell>
          <table:table-cell table:style-name="ce9" table:formula="of:=OFFSET([.A127];0;[.F127])" office:value-type="string" office:string-value="5">
            <text:p>5</text:p>
          </table:table-cell>
          <table:table-cell table:style-name="ce9"/>
          <table:table-cell table:style-name="ce9" table:formula="of:=VLOOKUP([.B127];[Listado.$A$2:.$D$19];4;0)" office:value-type="float" office:value="0">
            <text:p>#N/D</text:p>
          </table:table-cell>
          <table:table-cell table:style-name="ce9" table:formula="of:=VLOOKUP([.C127];[Listado.$A$2:.$D$19];4;0)" office:value-type="float" office:value="0">
            <text:p>#N/D</text:p>
          </table:table-cell>
          <table:table-cell table:style-name="ce9" table:formula="of:=VLOOKUP([.D127];[Listado.$A$2:.$D$19];4;0)" office:value-type="float" office:value="0">
            <text:p>#N/D</text:p>
          </table:table-cell>
          <table:table-cell table:style-name="ce9" table:formula="of:=VLOOKUP([.E127];[Listado.$A$2:.$D$19];4;0)" office:value-type="float" office:value="0">
            <text:p>#N/D</text:p>
          </table:table-cell>
          <table:table-cell table:style-name="ce9" table:formula="of:=VLOOKUP([.H127];[Listado.$A$2:.$D$19];4;0)" office:value-type="float" office:value="0">
            <text:p>#N/D</text:p>
          </table:table-cell>
          <table:table-cell table:style-name="ce9" table:formula="of:=COUNTIF([.J127:.M127];[.N127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8694. Indica cuál es la cifra de las UNIDADES:</text:p>
          </table:table-cell>
          <table:table-cell table:style-name="ce6" office:value-type="string">
            <text:p>4</text:p>
          </table:table-cell>
          <table:table-cell table:style-name="ce6" office:value-type="string">
            <text:p>8</text:p>
          </table:table-cell>
          <table:table-cell table:style-name="ce6" office:value-type="string">
            <text:p>0</text:p>
          </table:table-cell>
          <table:table-cell table:style-name="ce6" office:value-type="string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28];0;[.F128])" office:value-type="string" office:string-value="4">
            <text:p>4</text:p>
          </table:table-cell>
          <table:table-cell/>
          <table:table-cell table:style-name="ce10" table:formula="of:=VLOOKUP([.B128];[Listado.$A$2:.$D$19];4;0)" office:value-type="float" office:value="0">
            <text:p>#N/D</text:p>
          </table:table-cell>
          <table:table-cell table:style-name="ce10" table:formula="of:=VLOOKUP([.C128];[Listado.$A$2:.$D$19];4;0)" office:value-type="float" office:value="0">
            <text:p>#N/D</text:p>
          </table:table-cell>
          <table:table-cell table:style-name="ce10" table:formula="of:=VLOOKUP([.D128];[Listado.$A$2:.$D$19];4;0)" office:value-type="float" office:value="0">
            <text:p>#N/D</text:p>
          </table:table-cell>
          <table:table-cell table:style-name="ce10" table:formula="of:=VLOOKUP([.E128];[Listado.$A$2:.$D$19];4;0)" office:value-type="float" office:value="0">
            <text:p>#N/D</text:p>
          </table:table-cell>
          <table:table-cell table:style-name="ce10" table:formula="of:=VLOOKUP([.H128];[Listado.$A$2:.$D$19];4;0)" office:value-type="float" office:value="0">
            <text:p>#N/D</text:p>
          </table:table-cell>
          <table:table-cell table:style-name="ce10" table:formula="of:=COUNTIF([.J128:.M128];[.N128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4631. Indica cuál es la cifra de las UNIDADES:</text:p>
          </table:table-cell>
          <table:table-cell table:style-name="ce6" office:value-type="string">
            <text:p>4</text:p>
          </table:table-cell>
          <table:table-cell table:style-name="ce6" office:value-type="string">
            <text:p>3</text:p>
          </table:table-cell>
          <table:table-cell table:style-name="ce6" office:value-type="string">
            <text:p>1</text:p>
          </table:table-cell>
          <table:table-cell table:style-name="ce6" office:value-type="string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29];0;[.F129])" office:value-type="string" office:string-value="1">
            <text:p>1</text:p>
          </table:table-cell>
          <table:table-cell/>
          <table:table-cell table:style-name="ce10" table:formula="of:=VLOOKUP([.B129];[Listado.$A$2:.$D$19];4;0)" office:value-type="float" office:value="0">
            <text:p>#N/D</text:p>
          </table:table-cell>
          <table:table-cell table:style-name="ce10" table:formula="of:=VLOOKUP([.C129];[Listado.$A$2:.$D$19];4;0)" office:value-type="float" office:value="0">
            <text:p>#N/D</text:p>
          </table:table-cell>
          <table:table-cell table:style-name="ce10" table:formula="of:=VLOOKUP([.D129];[Listado.$A$2:.$D$19];4;0)" office:value-type="float" office:value="0">
            <text:p>#N/D</text:p>
          </table:table-cell>
          <table:table-cell table:style-name="ce10" table:formula="of:=VLOOKUP([.E129];[Listado.$A$2:.$D$19];4;0)" office:value-type="float" office:value="0">
            <text:p>#N/D</text:p>
          </table:table-cell>
          <table:table-cell table:style-name="ce10" table:formula="of:=VLOOKUP([.H129];[Listado.$A$2:.$D$19];4;0)" office:value-type="float" office:value="0">
            <text:p>#N/D</text:p>
          </table:table-cell>
          <table:table-cell table:style-name="ce10" table:formula="of:=COUNTIF([.J129:.M129];[.N129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932. Indica cuál es la cifra de las UNIDADES:</text:p>
          </table:table-cell>
          <table:table-cell table:style-name="ce6" office:value-type="string">
            <text:p>9</text:p>
          </table:table-cell>
          <table:table-cell table:style-name="ce6" office:value-type="string">
            <text:p>2</text:p>
          </table:table-cell>
          <table:table-cell table:style-name="ce6" office:value-type="string">
            <text:p>0</text:p>
          </table:table-cell>
          <table:table-cell table:style-name="ce6" office:value-type="string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30];0;[.F130])" office:value-type="string" office:string-value="2">
            <text:p>2</text:p>
          </table:table-cell>
          <table:table-cell/>
          <table:table-cell table:style-name="ce10" table:formula="of:=VLOOKUP([.B130];[Listado.$A$2:.$D$19];4;0)" office:value-type="float" office:value="0">
            <text:p>#N/D</text:p>
          </table:table-cell>
          <table:table-cell table:style-name="ce10" table:formula="of:=VLOOKUP([.C130];[Listado.$A$2:.$D$19];4;0)" office:value-type="float" office:value="0">
            <text:p>#N/D</text:p>
          </table:table-cell>
          <table:table-cell table:style-name="ce10" table:formula="of:=VLOOKUP([.D130];[Listado.$A$2:.$D$19];4;0)" office:value-type="float" office:value="0">
            <text:p>#N/D</text:p>
          </table:table-cell>
          <table:table-cell table:style-name="ce10" table:formula="of:=VLOOKUP([.E130];[Listado.$A$2:.$D$19];4;0)" office:value-type="float" office:value="0">
            <text:p>#N/D</text:p>
          </table:table-cell>
          <table:table-cell table:style-name="ce10" table:formula="of:=VLOOKUP([.H130];[Listado.$A$2:.$D$19];4;0)" office:value-type="float" office:value="0">
            <text:p>#N/D</text:p>
          </table:table-cell>
          <table:table-cell table:style-name="ce10" table:formula="of:=COUNTIF([.J130:.M130];[.N130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523. Indica cuál es la cifra de las UNIDADES:</text:p>
          </table:table-cell>
          <table:table-cell table:style-name="ce6" office:value-type="string">
            <text:p>2</text:p>
          </table:table-cell>
          <table:table-cell table:style-name="ce6" office:value-type="string">
            <text:p>1</text:p>
          </table:table-cell>
          <table:table-cell table:style-name="ce6" office:value-type="string">
            <text:p>3</text:p>
          </table:table-cell>
          <table:table-cell table:style-name="ce6" office:value-type="string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31];0;[.F131])" office:value-type="string" office:string-value="3">
            <text:p>3</text:p>
          </table:table-cell>
          <table:table-cell/>
          <table:table-cell table:style-name="ce10" table:formula="of:=VLOOKUP([.B131];[Listado.$A$2:.$D$19];4;0)" office:value-type="float" office:value="0">
            <text:p>#N/D</text:p>
          </table:table-cell>
          <table:table-cell table:style-name="ce10" table:formula="of:=VLOOKUP([.C131];[Listado.$A$2:.$D$19];4;0)" office:value-type="float" office:value="0">
            <text:p>#N/D</text:p>
          </table:table-cell>
          <table:table-cell table:style-name="ce10" table:formula="of:=VLOOKUP([.D131];[Listado.$A$2:.$D$19];4;0)" office:value-type="float" office:value="0">
            <text:p>#N/D</text:p>
          </table:table-cell>
          <table:table-cell table:style-name="ce10" table:formula="of:=VLOOKUP([.E131];[Listado.$A$2:.$D$19];4;0)" office:value-type="float" office:value="0">
            <text:p>#N/D</text:p>
          </table:table-cell>
          <table:table-cell table:style-name="ce10" table:formula="of:=VLOOKUP([.H131];[Listado.$A$2:.$D$19];4;0)" office:value-type="float" office:value="0">
            <text:p>#N/D</text:p>
          </table:table-cell>
          <table:table-cell table:style-name="ce10" table:formula="of:=COUNTIF([.J131:.M131];[.N131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7031. Indica cuál es la cifra de las UNIDADES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5</text:p>
          </table:table-cell>
          <table:table-cell table:style-name="ce6" office:value-type="string">
            <text:p>3</text:p>
          </table:table-cell>
          <table:table-cell table:style-name="ce6" office:value-type="string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32];0;[.F132])" office:value-type="string" office:string-value="1">
            <text:p>1</text:p>
          </table:table-cell>
          <table:table-cell/>
          <table:table-cell table:style-name="ce10" table:formula="of:=VLOOKUP([.B132];[Listado.$A$2:.$D$19];4;0)" office:value-type="float" office:value="0">
            <text:p>#N/D</text:p>
          </table:table-cell>
          <table:table-cell table:style-name="ce10" table:formula="of:=VLOOKUP([.C132];[Listado.$A$2:.$D$19];4;0)" office:value-type="float" office:value="0">
            <text:p>#N/D</text:p>
          </table:table-cell>
          <table:table-cell table:style-name="ce10" table:formula="of:=VLOOKUP([.D132];[Listado.$A$2:.$D$19];4;0)" office:value-type="float" office:value="0">
            <text:p>#N/D</text:p>
          </table:table-cell>
          <table:table-cell table:style-name="ce10" table:formula="of:=VLOOKUP([.E132];[Listado.$A$2:.$D$19];4;0)" office:value-type="float" office:value="0">
            <text:p>#N/D</text:p>
          </table:table-cell>
          <table:table-cell table:style-name="ce10" table:formula="of:=VLOOKUP([.H132];[Listado.$A$2:.$D$19];4;0)" office:value-type="float" office:value="0">
            <text:p>#N/D</text:p>
          </table:table-cell>
          <table:table-cell table:style-name="ce10" table:formula="of:=COUNTIF([.J132:.M132];[.N132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193. Indica cuál es la cifra de las UNIDADES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9</text:p>
          </table:table-cell>
          <table:table-cell table:style-name="ce6" office:value-type="string">
            <text:p>3</text:p>
          </table:table-cell>
          <table:table-cell table:style-name="ce6" office:value-type="string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33];0;[.F133])" office:value-type="string" office:string-value="3">
            <text:p>3</text:p>
          </table:table-cell>
          <table:table-cell/>
          <table:table-cell table:style-name="ce10" table:formula="of:=VLOOKUP([.B133];[Listado.$A$2:.$D$19];4;0)" office:value-type="float" office:value="0">
            <text:p>#N/D</text:p>
          </table:table-cell>
          <table:table-cell table:style-name="ce10" table:formula="of:=VLOOKUP([.C133];[Listado.$A$2:.$D$19];4;0)" office:value-type="float" office:value="0">
            <text:p>#N/D</text:p>
          </table:table-cell>
          <table:table-cell table:style-name="ce10" table:formula="of:=VLOOKUP([.D133];[Listado.$A$2:.$D$19];4;0)" office:value-type="float" office:value="0">
            <text:p>#N/D</text:p>
          </table:table-cell>
          <table:table-cell table:style-name="ce10" table:formula="of:=VLOOKUP([.E133];[Listado.$A$2:.$D$19];4;0)" office:value-type="float" office:value="0">
            <text:p>#N/D</text:p>
          </table:table-cell>
          <table:table-cell table:style-name="ce10" table:formula="of:=VLOOKUP([.H133];[Listado.$A$2:.$D$19];4;0)" office:value-type="float" office:value="0">
            <text:p>#N/D</text:p>
          </table:table-cell>
          <table:table-cell table:style-name="ce10" table:formula="of:=COUNTIF([.J133:.M133];[.N133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2751. Indica cuál es la cifra de las UNIDADES:</text:p>
          </table:table-cell>
          <table:table-cell table:style-name="ce6" office:value-type="string">
            <text:p>5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6" office:value-type="string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34];0;[.F134])" office:value-type="string" office:string-value="1">
            <text:p>1</text:p>
          </table:table-cell>
          <table:table-cell/>
          <table:table-cell table:style-name="ce10" table:formula="of:=VLOOKUP([.B134];[Listado.$A$2:.$D$19];4;0)" office:value-type="float" office:value="0">
            <text:p>#N/D</text:p>
          </table:table-cell>
          <table:table-cell table:style-name="ce10" table:formula="of:=VLOOKUP([.C134];[Listado.$A$2:.$D$19];4;0)" office:value-type="float" office:value="0">
            <text:p>#N/D</text:p>
          </table:table-cell>
          <table:table-cell table:style-name="ce10" table:formula="of:=VLOOKUP([.D134];[Listado.$A$2:.$D$19];4;0)" office:value-type="float" office:value="0">
            <text:p>#N/D</text:p>
          </table:table-cell>
          <table:table-cell table:style-name="ce10" table:formula="of:=VLOOKUP([.E134];[Listado.$A$2:.$D$19];4;0)" office:value-type="float" office:value="0">
            <text:p>#N/D</text:p>
          </table:table-cell>
          <table:table-cell table:style-name="ce10" table:formula="of:=VLOOKUP([.H134];[Listado.$A$2:.$D$19];4;0)" office:value-type="float" office:value="0">
            <text:p>#N/D</text:p>
          </table:table-cell>
          <table:table-cell table:style-name="ce10" table:formula="of:=COUNTIF([.J134:.M134];[.N134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2307. Indica cuál es la cifra de las UNIDADES: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7</text:p>
          </table:table-cell>
          <table:table-cell table:style-name="ce7" office:value-type="string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a cifra de las unidades es la última de la parte entera.</text:p>
          </table:table-cell>
          <table:table-cell table:style-name="ce9" table:formula="of:=OFFSET([.A135];0;[.F135])" office:value-type="string" office:string-value="7">
            <text:p>7</text:p>
          </table:table-cell>
          <table:table-cell table:style-name="ce9"/>
          <table:table-cell table:style-name="ce9" table:formula="of:=VLOOKUP([.B135];[Listado.$A$2:.$D$19];4;0)" office:value-type="float" office:value="0">
            <text:p>#N/D</text:p>
          </table:table-cell>
          <table:table-cell table:style-name="ce9" table:formula="of:=VLOOKUP([.C135];[Listado.$A$2:.$D$19];4;0)" office:value-type="float" office:value="0">
            <text:p>#N/D</text:p>
          </table:table-cell>
          <table:table-cell table:style-name="ce9" table:formula="of:=VLOOKUP([.D135];[Listado.$A$2:.$D$19];4;0)" office:value-type="float" office:value="0">
            <text:p>#N/D</text:p>
          </table:table-cell>
          <table:table-cell table:style-name="ce9" table:formula="of:=VLOOKUP([.E135];[Listado.$A$2:.$D$19];4;0)" office:value-type="float" office:value="0">
            <text:p>#N/D</text:p>
          </table:table-cell>
          <table:table-cell table:style-name="ce9" table:formula="of:=VLOOKUP([.H135];[Listado.$A$2:.$D$19];4;0)" office:value-type="float" office:value="0">
            <text:p>#N/D</text:p>
          </table:table-cell>
          <table:table-cell table:style-name="ce9" table:formula="of:=COUNTIF([.J135:.M135];[.N135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4" office:value-type="string">
            <text:p>Observa el número 7465. Indica cuál es la cifra de las UNIDADES:</text:p>
          </table:table-cell>
          <table:table-cell table:style-name="ce7" office:value-type="string">
            <text:p>4</text:p>
          </table:table-cell>
          <table:table-cell table:style-name="ce7" office:value-type="string">
            <text:p>1</text:p>
          </table:table-cell>
          <table:table-cell table:style-name="ce7" office:value-type="string">
            <text:p>5</text:p>
          </table:table-cell>
          <table:table-cell table:style-name="ce7" office:value-type="string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a cifra de las unidades es la última de la parte entera.</text:p>
          </table:table-cell>
          <table:table-cell table:style-name="ce9" table:formula="of:=OFFSET([.A136];0;[.F136])" office:value-type="string" office:string-value="5">
            <text:p>5</text:p>
          </table:table-cell>
          <table:table-cell table:style-name="ce9"/>
          <table:table-cell table:style-name="ce9" table:formula="of:=VLOOKUP([.B136];[Listado.$A$2:.$D$19];4;0)" office:value-type="float" office:value="0">
            <text:p>#N/D</text:p>
          </table:table-cell>
          <table:table-cell table:style-name="ce9" table:formula="of:=VLOOKUP([.C136];[Listado.$A$2:.$D$19];4;0)" office:value-type="float" office:value="0">
            <text:p>#N/D</text:p>
          </table:table-cell>
          <table:table-cell table:style-name="ce9" table:formula="of:=VLOOKUP([.D136];[Listado.$A$2:.$D$19];4;0)" office:value-type="float" office:value="0">
            <text:p>#N/D</text:p>
          </table:table-cell>
          <table:table-cell table:style-name="ce9" table:formula="of:=VLOOKUP([.E136];[Listado.$A$2:.$D$19];4;0)" office:value-type="float" office:value="0">
            <text:p>#N/D</text:p>
          </table:table-cell>
          <table:table-cell table:style-name="ce9" table:formula="of:=VLOOKUP([.H136];[Listado.$A$2:.$D$19];4;0)" office:value-type="float" office:value="0">
            <text:p>#N/D</text:p>
          </table:table-cell>
          <table:table-cell table:style-name="ce9" table:formula="of:=COUNTIF([.J136:.M136];[.N136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7268. Indica cuál es la cifra de las UNIDADES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37];0;[.F137])" office:value-type="string" office:string-value="8">
            <text:p>8</text:p>
          </table:table-cell>
          <table:table-cell/>
          <table:table-cell table:style-name="ce10" table:formula="of:=VLOOKUP([.B137];[Listado.$A$2:.$D$19];4;0)" office:value-type="float" office:value="0">
            <text:p>#N/D</text:p>
          </table:table-cell>
          <table:table-cell table:style-name="ce10" table:formula="of:=VLOOKUP([.C137];[Listado.$A$2:.$D$19];4;0)" office:value-type="float" office:value="0">
            <text:p>#N/D</text:p>
          </table:table-cell>
          <table:table-cell table:style-name="ce10" table:formula="of:=VLOOKUP([.D137];[Listado.$A$2:.$D$19];4;0)" office:value-type="float" office:value="0">
            <text:p>#N/D</text:p>
          </table:table-cell>
          <table:table-cell table:style-name="ce10" table:formula="of:=VLOOKUP([.E137];[Listado.$A$2:.$D$19];4;0)" office:value-type="float" office:value="0">
            <text:p>#N/D</text:p>
          </table:table-cell>
          <table:table-cell table:style-name="ce10" table:formula="of:=VLOOKUP([.H137];[Listado.$A$2:.$D$19];4;0)" office:value-type="float" office:value="0">
            <text:p>#N/D</text:p>
          </table:table-cell>
          <table:table-cell table:style-name="ce10" table:formula="of:=COUNTIF([.J137:.M137];[.N137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4076. Indica cuál es la cifra de las UNIDADES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38];0;[.F138])" office:value-type="string" office:string-value="6">
            <text:p>6</text:p>
          </table:table-cell>
          <table:table-cell/>
          <table:table-cell table:style-name="ce10" table:formula="of:=VLOOKUP([.B138];[Listado.$A$2:.$D$19];4;0)" office:value-type="float" office:value="0">
            <text:p>#N/D</text:p>
          </table:table-cell>
          <table:table-cell table:style-name="ce10" table:formula="of:=VLOOKUP([.C138];[Listado.$A$2:.$D$19];4;0)" office:value-type="float" office:value="0">
            <text:p>#N/D</text:p>
          </table:table-cell>
          <table:table-cell table:style-name="ce10" table:formula="of:=VLOOKUP([.D138];[Listado.$A$2:.$D$19];4;0)" office:value-type="float" office:value="0">
            <text:p>#N/D</text:p>
          </table:table-cell>
          <table:table-cell table:style-name="ce10" table:formula="of:=VLOOKUP([.E138];[Listado.$A$2:.$D$19];4;0)" office:value-type="float" office:value="0">
            <text:p>#N/D</text:p>
          </table:table-cell>
          <table:table-cell table:style-name="ce10" table:formula="of:=VLOOKUP([.H138];[Listado.$A$2:.$D$19];4;0)" office:value-type="float" office:value="0">
            <text:p>#N/D</text:p>
          </table:table-cell>
          <table:table-cell table:style-name="ce10" table:formula="of:=COUNTIF([.J138:.M138];[.N138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3160. Indica cuál es la cifra de las UNIDADES:</text:p>
          </table:table-cell>
          <table:table-cell table:style-name="ce6" office:value-type="string">
            <text:p>7</text:p>
          </table:table-cell>
          <table:table-cell table:style-name="ce6" office:value-type="string">
            <text:p>2</text:p>
          </table:table-cell>
          <table:table-cell table:style-name="ce6" office:value-type="string">
            <text:p>3</text:p>
          </table:table-cell>
          <table:table-cell table:style-name="ce6" office:value-type="string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39];0;[.F139])" office:value-type="string" office:string-value="0">
            <text:p>0</text:p>
          </table:table-cell>
          <table:table-cell/>
          <table:table-cell table:style-name="ce10" table:formula="of:=VLOOKUP([.B139];[Listado.$A$2:.$D$19];4;0)" office:value-type="float" office:value="0">
            <text:p>#N/D</text:p>
          </table:table-cell>
          <table:table-cell table:style-name="ce10" table:formula="of:=VLOOKUP([.C139];[Listado.$A$2:.$D$19];4;0)" office:value-type="float" office:value="0">
            <text:p>#N/D</text:p>
          </table:table-cell>
          <table:table-cell table:style-name="ce10" table:formula="of:=VLOOKUP([.D139];[Listado.$A$2:.$D$19];4;0)" office:value-type="float" office:value="0">
            <text:p>#N/D</text:p>
          </table:table-cell>
          <table:table-cell table:style-name="ce10" table:formula="of:=VLOOKUP([.E139];[Listado.$A$2:.$D$19];4;0)" office:value-type="float" office:value="0">
            <text:p>#N/D</text:p>
          </table:table-cell>
          <table:table-cell table:style-name="ce10" table:formula="of:=VLOOKUP([.H139];[Listado.$A$2:.$D$19];4;0)" office:value-type="float" office:value="0">
            <text:p>#N/D</text:p>
          </table:table-cell>
          <table:table-cell table:style-name="ce10" table:formula="of:=COUNTIF([.J139:.M139];[.N139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2349. Indica cuál es la cifra de las UNIDADES:</text:p>
          </table:table-cell>
          <table:table-cell table:style-name="ce6" office:value-type="string">
            <text:p>9</text:p>
          </table:table-cell>
          <table:table-cell table:style-name="ce6" office:value-type="string">
            <text:p>7</text:p>
          </table:table-cell>
          <table:table-cell table:style-name="ce6" office:value-type="string">
            <text:p>6</text:p>
          </table:table-cell>
          <table:table-cell table:style-name="ce6" office:value-type="string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0];0;[.F140])" office:value-type="string" office:string-value="9">
            <text:p>9</text:p>
          </table:table-cell>
          <table:table-cell/>
          <table:table-cell table:style-name="ce10" table:formula="of:=VLOOKUP([.B140];[Listado.$A$2:.$D$19];4;0)" office:value-type="float" office:value="0">
            <text:p>#N/D</text:p>
          </table:table-cell>
          <table:table-cell table:style-name="ce10" table:formula="of:=VLOOKUP([.C140];[Listado.$A$2:.$D$19];4;0)" office:value-type="float" office:value="0">
            <text:p>#N/D</text:p>
          </table:table-cell>
          <table:table-cell table:style-name="ce10" table:formula="of:=VLOOKUP([.D140];[Listado.$A$2:.$D$19];4;0)" office:value-type="float" office:value="0">
            <text:p>#N/D</text:p>
          </table:table-cell>
          <table:table-cell table:style-name="ce10" table:formula="of:=VLOOKUP([.E140];[Listado.$A$2:.$D$19];4;0)" office:value-type="float" office:value="0">
            <text:p>#N/D</text:p>
          </table:table-cell>
          <table:table-cell table:style-name="ce10" table:formula="of:=VLOOKUP([.H140];[Listado.$A$2:.$D$19];4;0)" office:value-type="float" office:value="0">
            <text:p>#N/D</text:p>
          </table:table-cell>
          <table:table-cell table:style-name="ce10" table:formula="of:=COUNTIF([.J140:.M140];[.N140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3980. Indica cuál es la cifra de las UNIDADES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9</text:p>
          </table:table-cell>
          <table:table-cell table:style-name="ce6" office:value-type="string">
            <text:p>0</text:p>
          </table:table-cell>
          <table:table-cell table:style-name="ce6" office:value-type="string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1];0;[.F141])" office:value-type="string" office:string-value="0">
            <text:p>0</text:p>
          </table:table-cell>
          <table:table-cell/>
          <table:table-cell table:style-name="ce10" table:formula="of:=VLOOKUP([.B141];[Listado.$A$2:.$D$19];4;0)" office:value-type="float" office:value="0">
            <text:p>#N/D</text:p>
          </table:table-cell>
          <table:table-cell table:style-name="ce10" table:formula="of:=VLOOKUP([.C141];[Listado.$A$2:.$D$19];4;0)" office:value-type="float" office:value="0">
            <text:p>#N/D</text:p>
          </table:table-cell>
          <table:table-cell table:style-name="ce10" table:formula="of:=VLOOKUP([.D141];[Listado.$A$2:.$D$19];4;0)" office:value-type="float" office:value="0">
            <text:p>#N/D</text:p>
          </table:table-cell>
          <table:table-cell table:style-name="ce10" table:formula="of:=VLOOKUP([.E141];[Listado.$A$2:.$D$19];4;0)" office:value-type="float" office:value="0">
            <text:p>#N/D</text:p>
          </table:table-cell>
          <table:table-cell table:style-name="ce10" table:formula="of:=VLOOKUP([.H141];[Listado.$A$2:.$D$19];4;0)" office:value-type="float" office:value="0">
            <text:p>#N/D</text:p>
          </table:table-cell>
          <table:table-cell table:style-name="ce10" table:formula="of:=COUNTIF([.J141:.M141];[.N141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846. Indica cuál es la cifra de las UNIDADES:</text:p>
          </table:table-cell>
          <table:table-cell table:style-name="ce6" office:value-type="string">
            <text:p>6</text:p>
          </table:table-cell>
          <table:table-cell table:style-name="ce6" office:value-type="string">
            <text:p>5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2];0;[.F142])" office:value-type="string" office:string-value="6">
            <text:p>6</text:p>
          </table:table-cell>
          <table:table-cell/>
          <table:table-cell table:style-name="ce10" table:formula="of:=VLOOKUP([.B142];[Listado.$A$2:.$D$19];4;0)" office:value-type="float" office:value="0">
            <text:p>#N/D</text:p>
          </table:table-cell>
          <table:table-cell table:style-name="ce10" table:formula="of:=VLOOKUP([.C142];[Listado.$A$2:.$D$19];4;0)" office:value-type="float" office:value="0">
            <text:p>#N/D</text:p>
          </table:table-cell>
          <table:table-cell table:style-name="ce10" table:formula="of:=VLOOKUP([.D142];[Listado.$A$2:.$D$19];4;0)" office:value-type="float" office:value="0">
            <text:p>#N/D</text:p>
          </table:table-cell>
          <table:table-cell table:style-name="ce10" table:formula="of:=VLOOKUP([.E142];[Listado.$A$2:.$D$19];4;0)" office:value-type="float" office:value="0">
            <text:p>#N/D</text:p>
          </table:table-cell>
          <table:table-cell table:style-name="ce10" table:formula="of:=VLOOKUP([.H142];[Listado.$A$2:.$D$19];4;0)" office:value-type="float" office:value="0">
            <text:p>#N/D</text:p>
          </table:table-cell>
          <table:table-cell table:style-name="ce10" table:formula="of:=COUNTIF([.J142:.M142];[.N142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2167. Indica cuál es la cifra de las UNIDADES:</text:p>
          </table:table-cell>
          <table:table-cell table:style-name="ce6" office:value-type="string">
            <text:p>7</text:p>
          </table:table-cell>
          <table:table-cell table:style-name="ce6" office:value-type="string">
            <text:p>0</text:p>
          </table:table-cell>
          <table:table-cell table:style-name="ce6" office:value-type="string">
            <text:p>4</text:p>
          </table:table-cell>
          <table:table-cell table:style-name="ce6" office:value-type="string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3];0;[.F143])" office:value-type="string" office:string-value="7">
            <text:p>7</text:p>
          </table:table-cell>
          <table:table-cell/>
          <table:table-cell table:style-name="ce10" table:formula="of:=VLOOKUP([.B143];[Listado.$A$2:.$D$19];4;0)" office:value-type="float" office:value="0">
            <text:p>#N/D</text:p>
          </table:table-cell>
          <table:table-cell table:style-name="ce10" table:formula="of:=VLOOKUP([.C143];[Listado.$A$2:.$D$19];4;0)" office:value-type="float" office:value="0">
            <text:p>#N/D</text:p>
          </table:table-cell>
          <table:table-cell table:style-name="ce10" table:formula="of:=VLOOKUP([.D143];[Listado.$A$2:.$D$19];4;0)" office:value-type="float" office:value="0">
            <text:p>#N/D</text:p>
          </table:table-cell>
          <table:table-cell table:style-name="ce10" table:formula="of:=VLOOKUP([.E143];[Listado.$A$2:.$D$19];4;0)" office:value-type="float" office:value="0">
            <text:p>#N/D</text:p>
          </table:table-cell>
          <table:table-cell table:style-name="ce10" table:formula="of:=VLOOKUP([.H143];[Listado.$A$2:.$D$19];4;0)" office:value-type="float" office:value="0">
            <text:p>#N/D</text:p>
          </table:table-cell>
          <table:table-cell table:style-name="ce10" table:formula="of:=COUNTIF([.J143:.M143];[.N143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249. Indica cuál es la cifra de las UNIDADES:</text:p>
          </table:table-cell>
          <table:table-cell table:style-name="ce6" office:value-type="string">
            <text:p>4</text:p>
          </table:table-cell>
          <table:table-cell table:style-name="ce6" office:value-type="string">
            <text:p>9</text:p>
          </table:table-cell>
          <table:table-cell table:style-name="ce6" office:value-type="string">
            <text:p>3</text:p>
          </table:table-cell>
          <table:table-cell table:style-name="ce6" office:value-type="string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4];0;[.F144])" office:value-type="string" office:string-value="9">
            <text:p>9</text:p>
          </table:table-cell>
          <table:table-cell/>
          <table:table-cell table:style-name="ce10" table:formula="of:=VLOOKUP([.B144];[Listado.$A$2:.$D$19];4;0)" office:value-type="float" office:value="0">
            <text:p>#N/D</text:p>
          </table:table-cell>
          <table:table-cell table:style-name="ce10" table:formula="of:=VLOOKUP([.C144];[Listado.$A$2:.$D$19];4;0)" office:value-type="float" office:value="0">
            <text:p>#N/D</text:p>
          </table:table-cell>
          <table:table-cell table:style-name="ce10" table:formula="of:=VLOOKUP([.D144];[Listado.$A$2:.$D$19];4;0)" office:value-type="float" office:value="0">
            <text:p>#N/D</text:p>
          </table:table-cell>
          <table:table-cell table:style-name="ce10" table:formula="of:=VLOOKUP([.E144];[Listado.$A$2:.$D$19];4;0)" office:value-type="float" office:value="0">
            <text:p>#N/D</text:p>
          </table:table-cell>
          <table:table-cell table:style-name="ce10" table:formula="of:=VLOOKUP([.H144];[Listado.$A$2:.$D$19];4;0)" office:value-type="float" office:value="0">
            <text:p>#N/D</text:p>
          </table:table-cell>
          <table:table-cell table:style-name="ce10" table:formula="of:=COUNTIF([.J144:.M144];[.N144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Observa el número 4709. Indica cuál es la cifra de las UNIDADES:</text:p>
          </table:table-cell>
          <table:table-cell table:style-name="ce6" office:value-type="string">
            <text:p>3</text:p>
          </table:table-cell>
          <table:table-cell table:style-name="ce6" office:value-type="string">
            <text:p>9</text:p>
          </table:table-cell>
          <table:table-cell table:style-name="ce6" office:value-type="string">
            <text:p>2</text:p>
          </table:table-cell>
          <table:table-cell table:style-name="ce6" office:value-type="string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5];0;[.F145])" office:value-type="string" office:string-value="9">
            <text:p>9</text:p>
          </table:table-cell>
          <table:table-cell/>
          <table:table-cell table:style-name="ce10" table:formula="of:=VLOOKUP([.B145];[Listado.$A$2:.$D$19];4;0)" office:value-type="float" office:value="0">
            <text:p>#N/D</text:p>
          </table:table-cell>
          <table:table-cell table:style-name="ce10" table:formula="of:=VLOOKUP([.C145];[Listado.$A$2:.$D$19];4;0)" office:value-type="float" office:value="0">
            <text:p>#N/D</text:p>
          </table:table-cell>
          <table:table-cell table:style-name="ce10" table:formula="of:=VLOOKUP([.D145];[Listado.$A$2:.$D$19];4;0)" office:value-type="float" office:value="0">
            <text:p>#N/D</text:p>
          </table:table-cell>
          <table:table-cell table:style-name="ce10" table:formula="of:=VLOOKUP([.E145];[Listado.$A$2:.$D$19];4;0)" office:value-type="float" office:value="0">
            <text:p>#N/D</text:p>
          </table:table-cell>
          <table:table-cell table:style-name="ce10" table:formula="of:=VLOOKUP([.H145];[Listado.$A$2:.$D$19];4;0)" office:value-type="float" office:value="0">
            <text:p>#N/D</text:p>
          </table:table-cell>
          <table:table-cell table:style-name="ce10" table:formula="of:=COUNTIF([.J145:.M145];[.N145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3687. Indica cuál es la cifra de las UNIDADES:</text:p>
          </table:table-cell>
          <table:table-cell table:style-name="ce6" office:value-type="string">
            <text:p>9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6];0;[.F146])" office:value-type="string" office:string-value="7">
            <text:p>7</text:p>
          </table:table-cell>
          <table:table-cell/>
          <table:table-cell table:style-name="ce10" table:formula="of:=VLOOKUP([.B146];[Listado.$A$2:.$D$19];4;0)" office:value-type="float" office:value="0">
            <text:p>#N/D</text:p>
          </table:table-cell>
          <table:table-cell table:style-name="ce10" table:formula="of:=VLOOKUP([.C146];[Listado.$A$2:.$D$19];4;0)" office:value-type="float" office:value="0">
            <text:p>#N/D</text:p>
          </table:table-cell>
          <table:table-cell table:style-name="ce10" table:formula="of:=VLOOKUP([.D146];[Listado.$A$2:.$D$19];4;0)" office:value-type="float" office:value="0">
            <text:p>#N/D</text:p>
          </table:table-cell>
          <table:table-cell table:style-name="ce10" table:formula="of:=VLOOKUP([.E146];[Listado.$A$2:.$D$19];4;0)" office:value-type="float" office:value="0">
            <text:p>#N/D</text:p>
          </table:table-cell>
          <table:table-cell table:style-name="ce10" table:formula="of:=VLOOKUP([.H146];[Listado.$A$2:.$D$19];4;0)" office:value-type="float" office:value="0">
            <text:p>#N/D</text:p>
          </table:table-cell>
          <table:table-cell table:style-name="ce10" table:formula="of:=COUNTIF([.J146:.M146];[.N146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5068. Indica cuál es la cifra de las UNIDADES:</text:p>
          </table:table-cell>
          <table:table-cell table:style-name="ce6" office:value-type="string">
            <text:p>5</text:p>
          </table:table-cell>
          <table:table-cell table:style-name="ce6" office:value-type="string">
            <text:p>4</text:p>
          </table:table-cell>
          <table:table-cell table:style-name="ce6" office:value-type="string">
            <text:p>8</text:p>
          </table:table-cell>
          <table:table-cell table:style-name="ce6" office:value-type="string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7];0;[.F147])" office:value-type="string" office:string-value="8">
            <text:p>8</text:p>
          </table:table-cell>
          <table:table-cell/>
          <table:table-cell table:style-name="ce10" table:formula="of:=VLOOKUP([.B147];[Listado.$A$2:.$D$19];4;0)" office:value-type="float" office:value="0">
            <text:p>#N/D</text:p>
          </table:table-cell>
          <table:table-cell table:style-name="ce10" table:formula="of:=VLOOKUP([.C147];[Listado.$A$2:.$D$19];4;0)" office:value-type="float" office:value="0">
            <text:p>#N/D</text:p>
          </table:table-cell>
          <table:table-cell table:style-name="ce10" table:formula="of:=VLOOKUP([.D147];[Listado.$A$2:.$D$19];4;0)" office:value-type="float" office:value="0">
            <text:p>#N/D</text:p>
          </table:table-cell>
          <table:table-cell table:style-name="ce10" table:formula="of:=VLOOKUP([.E147];[Listado.$A$2:.$D$19];4;0)" office:value-type="float" office:value="0">
            <text:p>#N/D</text:p>
          </table:table-cell>
          <table:table-cell table:style-name="ce10" table:formula="of:=VLOOKUP([.H147];[Listado.$A$2:.$D$19];4;0)" office:value-type="float" office:value="0">
            <text:p>#N/D</text:p>
          </table:table-cell>
          <table:table-cell table:style-name="ce10" table:formula="of:=COUNTIF([.J147:.M147];[.N147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2746. Indica cuál es la cifra de las UNIDADES:</text:p>
          </table:table-cell>
          <table:table-cell table:style-name="ce7" office:value-type="string">
            <text:p>7</text:p>
          </table:table-cell>
          <table:table-cell table:style-name="ce7" office:value-type="string">
            <text:p>4</text:p>
          </table:table-cell>
          <table:table-cell table:style-name="ce7" office:value-type="string">
            <text:p>3</text:p>
          </table:table-cell>
          <table:table-cell table:style-name="ce7" office:value-type="string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La cifra de las unidades es la última de la parte entera.</text:p>
          </table:table-cell>
          <table:table-cell table:style-name="ce9" table:formula="of:=OFFSET([.A148];0;[.F148])" office:value-type="string" office:string-value="6">
            <text:p>6</text:p>
          </table:table-cell>
          <table:table-cell table:style-name="ce9"/>
          <table:table-cell table:style-name="ce9" table:formula="of:=VLOOKUP([.B148];[Listado.$A$2:.$D$19];4;0)" office:value-type="float" office:value="0">
            <text:p>#N/D</text:p>
          </table:table-cell>
          <table:table-cell table:style-name="ce9" table:formula="of:=VLOOKUP([.C148];[Listado.$A$2:.$D$19];4;0)" office:value-type="float" office:value="0">
            <text:p>#N/D</text:p>
          </table:table-cell>
          <table:table-cell table:style-name="ce9" table:formula="of:=VLOOKUP([.D148];[Listado.$A$2:.$D$19];4;0)" office:value-type="float" office:value="0">
            <text:p>#N/D</text:p>
          </table:table-cell>
          <table:table-cell table:style-name="ce9" table:formula="of:=VLOOKUP([.E148];[Listado.$A$2:.$D$19];4;0)" office:value-type="float" office:value="0">
            <text:p>#N/D</text:p>
          </table:table-cell>
          <table:table-cell table:style-name="ce9" table:formula="of:=VLOOKUP([.H148];[Listado.$A$2:.$D$19];4;0)" office:value-type="float" office:value="0">
            <text:p>#N/D</text:p>
          </table:table-cell>
          <table:table-cell table:style-name="ce9" table:formula="of:=COUNTIF([.J148:.M148];[.N148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5186. Indica cuál es la cifra de las UNIDADES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49];0;[.F149])" office:value-type="string" office:string-value="6">
            <text:p>6</text:p>
          </table:table-cell>
          <table:table-cell/>
          <table:table-cell table:style-name="ce10" table:formula="of:=VLOOKUP([.B149];[Listado.$A$2:.$D$19];4;0)" office:value-type="float" office:value="0">
            <text:p>#N/D</text:p>
          </table:table-cell>
          <table:table-cell table:style-name="ce10" table:formula="of:=VLOOKUP([.C149];[Listado.$A$2:.$D$19];4;0)" office:value-type="float" office:value="0">
            <text:p>#N/D</text:p>
          </table:table-cell>
          <table:table-cell table:style-name="ce10" table:formula="of:=VLOOKUP([.D149];[Listado.$A$2:.$D$19];4;0)" office:value-type="float" office:value="0">
            <text:p>#N/D</text:p>
          </table:table-cell>
          <table:table-cell table:style-name="ce10" table:formula="of:=VLOOKUP([.E149];[Listado.$A$2:.$D$19];4;0)" office:value-type="float" office:value="0">
            <text:p>#N/D</text:p>
          </table:table-cell>
          <table:table-cell table:style-name="ce10" table:formula="of:=VLOOKUP([.H149];[Listado.$A$2:.$D$19];4;0)" office:value-type="float" office:value="0">
            <text:p>#N/D</text:p>
          </table:table-cell>
          <table:table-cell table:style-name="ce10" table:formula="of:=COUNTIF([.J149:.M149];[.N149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2078. Indica cuál es la cifra de las UNIDADES:</text:p>
          </table:table-cell>
          <table:table-cell table:style-name="ce6" office:value-type="string">
            <text:p>6</text:p>
          </table:table-cell>
          <table:table-cell table:style-name="ce6" office:value-type="string">
            <text:p>0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50];0;[.F150])" office:value-type="string" office:string-value="8">
            <text:p>8</text:p>
          </table:table-cell>
          <table:table-cell/>
          <table:table-cell table:style-name="ce10" table:formula="of:=VLOOKUP([.B150];[Listado.$A$2:.$D$19];4;0)" office:value-type="float" office:value="0">
            <text:p>#N/D</text:p>
          </table:table-cell>
          <table:table-cell table:style-name="ce10" table:formula="of:=VLOOKUP([.C150];[Listado.$A$2:.$D$19];4;0)" office:value-type="float" office:value="0">
            <text:p>#N/D</text:p>
          </table:table-cell>
          <table:table-cell table:style-name="ce10" table:formula="of:=VLOOKUP([.D150];[Listado.$A$2:.$D$19];4;0)" office:value-type="float" office:value="0">
            <text:p>#N/D</text:p>
          </table:table-cell>
          <table:table-cell table:style-name="ce10" table:formula="of:=VLOOKUP([.E150];[Listado.$A$2:.$D$19];4;0)" office:value-type="float" office:value="0">
            <text:p>#N/D</text:p>
          </table:table-cell>
          <table:table-cell table:style-name="ce10" table:formula="of:=VLOOKUP([.H150];[Listado.$A$2:.$D$19];4;0)" office:value-type="float" office:value="0">
            <text:p>#N/D</text:p>
          </table:table-cell>
          <table:table-cell table:style-name="ce10" table:formula="of:=COUNTIF([.J150:.M150];[.N150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879. Indica cuál es la cifra de las UNIDADES:</text:p>
          </table:table-cell>
          <table:table-cell table:style-name="ce6" office:value-type="string">
            <text:p>2</text:p>
          </table:table-cell>
          <table:table-cell table:style-name="ce6" office:value-type="string">
            <text:p>9</text:p>
          </table:table-cell>
          <table:table-cell table:style-name="ce6" office:value-type="string">
            <text:p>6</text:p>
          </table:table-cell>
          <table:table-cell table:style-name="ce6" office:value-type="string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51];0;[.F151])" office:value-type="string" office:string-value="9">
            <text:p>9</text:p>
          </table:table-cell>
          <table:table-cell/>
          <table:table-cell table:style-name="ce10" table:formula="of:=VLOOKUP([.B151];[Listado.$A$2:.$D$19];4;0)" office:value-type="float" office:value="0">
            <text:p>#N/D</text:p>
          </table:table-cell>
          <table:table-cell table:style-name="ce10" table:formula="of:=VLOOKUP([.C151];[Listado.$A$2:.$D$19];4;0)" office:value-type="float" office:value="0">
            <text:p>#N/D</text:p>
          </table:table-cell>
          <table:table-cell table:style-name="ce10" table:formula="of:=VLOOKUP([.D151];[Listado.$A$2:.$D$19];4;0)" office:value-type="float" office:value="0">
            <text:p>#N/D</text:p>
          </table:table-cell>
          <table:table-cell table:style-name="ce10" table:formula="of:=VLOOKUP([.E151];[Listado.$A$2:.$D$19];4;0)" office:value-type="float" office:value="0">
            <text:p>#N/D</text:p>
          </table:table-cell>
          <table:table-cell table:style-name="ce10" table:formula="of:=VLOOKUP([.H151];[Listado.$A$2:.$D$19];4;0)" office:value-type="float" office:value="0">
            <text:p>#N/D</text:p>
          </table:table-cell>
          <table:table-cell table:style-name="ce10" table:formula="of:=COUNTIF([.J151:.M151];[.N151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7685. Indica cuál es la cifra de las UNIDADES:</text:p>
          </table:table-cell>
          <table:table-cell table:style-name="ce6" office:value-type="string">
            <text:p>5</text:p>
          </table:table-cell>
          <table:table-cell table:style-name="ce6" office:value-type="string">
            <text:p>3</text:p>
          </table:table-cell>
          <table:table-cell table:style-name="ce6" office:value-type="string">
            <text:p>0</text:p>
          </table:table-cell>
          <table:table-cell table:style-name="ce6" office:value-type="string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as unidades es la última de la parte entera.</text:p>
          </table:table-cell>
          <table:table-cell table:formula="of:=OFFSET([.A152];0;[.F152])" office:value-type="string" office:string-value="5">
            <text:p>5</text:p>
          </table:table-cell>
          <table:table-cell/>
          <table:table-cell table:style-name="ce10" table:formula="of:=VLOOKUP([.B152];[Listado.$A$2:.$D$19];4;0)" office:value-type="float" office:value="0">
            <text:p>#N/D</text:p>
          </table:table-cell>
          <table:table-cell table:style-name="ce10" table:formula="of:=VLOOKUP([.C152];[Listado.$A$2:.$D$19];4;0)" office:value-type="float" office:value="0">
            <text:p>#N/D</text:p>
          </table:table-cell>
          <table:table-cell table:style-name="ce10" table:formula="of:=VLOOKUP([.D152];[Listado.$A$2:.$D$19];4;0)" office:value-type="float" office:value="0">
            <text:p>#N/D</text:p>
          </table:table-cell>
          <table:table-cell table:style-name="ce10" table:formula="of:=VLOOKUP([.E152];[Listado.$A$2:.$D$19];4;0)" office:value-type="float" office:value="0">
            <text:p>#N/D</text:p>
          </table:table-cell>
          <table:table-cell table:style-name="ce10" table:formula="of:=VLOOKUP([.H152];[Listado.$A$2:.$D$19];4;0)" office:value-type="float" office:value="0">
            <text:p>#N/D</text:p>
          </table:table-cell>
          <table:table-cell table:style-name="ce10" table:formula="of:=COUNTIF([.J152:.M152];[.N152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Observa el número 3260. Indica cuál es la cifra de las UNIDADES DE MILLAR:</text:p>
          </table:table-cell>
          <table:table-cell table:style-name="ce6" office:value-type="string">
            <text:p>0</text:p>
          </table:table-cell>
          <table:table-cell table:style-name="ce6" office:value-type="string">
            <text:p>8</text:p>
          </table:table-cell>
          <table:table-cell table:style-name="ce6" office:value-type="string">
            <text:p>1</text:p>
          </table:table-cell>
          <table:table-cell table:style-name="ce6" office:value-type="string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53];0;[.F153])" office:value-type="string" office:string-value="3">
            <text:p>3</text:p>
          </table:table-cell>
          <table:table-cell/>
          <table:table-cell table:style-name="ce10" table:formula="of:=VLOOKUP([.B153];[Listado.$A$2:.$D$19];4;0)" office:value-type="float" office:value="0">
            <text:p>#N/D</text:p>
          </table:table-cell>
          <table:table-cell table:style-name="ce10" table:formula="of:=VLOOKUP([.C153];[Listado.$A$2:.$D$19];4;0)" office:value-type="float" office:value="0">
            <text:p>#N/D</text:p>
          </table:table-cell>
          <table:table-cell table:style-name="ce10" table:formula="of:=VLOOKUP([.D153];[Listado.$A$2:.$D$19];4;0)" office:value-type="float" office:value="0">
            <text:p>#N/D</text:p>
          </table:table-cell>
          <table:table-cell table:style-name="ce10" table:formula="of:=VLOOKUP([.E153];[Listado.$A$2:.$D$19];4;0)" office:value-type="float" office:value="0">
            <text:p>#N/D</text:p>
          </table:table-cell>
          <table:table-cell table:style-name="ce10" table:formula="of:=VLOOKUP([.H153];[Listado.$A$2:.$D$19];4;0)" office:value-type="float" office:value="0">
            <text:p>#N/D</text:p>
          </table:table-cell>
          <table:table-cell table:style-name="ce10" table:formula="of:=COUNTIF([.J153:.M153];[.N153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6893. Indica cuál es la cifra de las UNIDADES DE MILLAR:</text:p>
          </table:table-cell>
          <table:table-cell table:style-name="ce6" office:value-type="string">
            <text:p>0</text:p>
          </table:table-cell>
          <table:table-cell table:style-name="ce6" office:value-type="string">
            <text:p>4</text:p>
          </table:table-cell>
          <table:table-cell table:style-name="ce6" office:value-type="string">
            <text:p>7</text:p>
          </table:table-cell>
          <table:table-cell table:style-name="ce6" office:value-type="string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54];0;[.F154])" office:value-type="string" office:string-value="6">
            <text:p>6</text:p>
          </table:table-cell>
          <table:table-cell/>
          <table:table-cell table:style-name="ce10" table:formula="of:=VLOOKUP([.B154];[Listado.$A$2:.$D$19];4;0)" office:value-type="float" office:value="0">
            <text:p>#N/D</text:p>
          </table:table-cell>
          <table:table-cell table:style-name="ce10" table:formula="of:=VLOOKUP([.C154];[Listado.$A$2:.$D$19];4;0)" office:value-type="float" office:value="0">
            <text:p>#N/D</text:p>
          </table:table-cell>
          <table:table-cell table:style-name="ce10" table:formula="of:=VLOOKUP([.D154];[Listado.$A$2:.$D$19];4;0)" office:value-type="float" office:value="0">
            <text:p>#N/D</text:p>
          </table:table-cell>
          <table:table-cell table:style-name="ce10" table:formula="of:=VLOOKUP([.E154];[Listado.$A$2:.$D$19];4;0)" office:value-type="float" office:value="0">
            <text:p>#N/D</text:p>
          </table:table-cell>
          <table:table-cell table:style-name="ce10" table:formula="of:=VLOOKUP([.H154];[Listado.$A$2:.$D$19];4;0)" office:value-type="float" office:value="0">
            <text:p>#N/D</text:p>
          </table:table-cell>
          <table:table-cell table:style-name="ce10" table:formula="of:=COUNTIF([.J154:.M154];[.N154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6728. Indica cuál es la cifra de las UNIDADES DE MILLAR:</text:p>
          </table:table-cell>
          <table:table-cell table:style-name="ce7" office:value-type="string">
            <text:p>0</text:p>
          </table:table-cell>
          <table:table-cell table:style-name="ce7" office:value-type="string">
            <text:p>5</text:p>
          </table:table-cell>
          <table:table-cell table:style-name="ce7" office:value-type="string">
            <text:p>4</text:p>
          </table:table-cell>
          <table:table-cell table:style-name="ce7" office:value-type="string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La cifra de los millares es la cuarta de la parte entera contando desde la derecha.</text:p>
          </table:table-cell>
          <table:table-cell table:style-name="ce9" table:formula="of:=OFFSET([.A155];0;[.F155])" office:value-type="string" office:string-value="6">
            <text:p>6</text:p>
          </table:table-cell>
          <table:table-cell table:style-name="ce9"/>
          <table:table-cell table:style-name="ce9" table:formula="of:=VLOOKUP([.B155];[Listado.$A$2:.$D$19];4;0)" office:value-type="float" office:value="0">
            <text:p>#N/D</text:p>
          </table:table-cell>
          <table:table-cell table:style-name="ce9" table:formula="of:=VLOOKUP([.C155];[Listado.$A$2:.$D$19];4;0)" office:value-type="float" office:value="0">
            <text:p>#N/D</text:p>
          </table:table-cell>
          <table:table-cell table:style-name="ce9" table:formula="of:=VLOOKUP([.D155];[Listado.$A$2:.$D$19];4;0)" office:value-type="float" office:value="0">
            <text:p>#N/D</text:p>
          </table:table-cell>
          <table:table-cell table:style-name="ce9" table:formula="of:=VLOOKUP([.E155];[Listado.$A$2:.$D$19];4;0)" office:value-type="float" office:value="0">
            <text:p>#N/D</text:p>
          </table:table-cell>
          <table:table-cell table:style-name="ce9" table:formula="of:=VLOOKUP([.H155];[Listado.$A$2:.$D$19];4;0)" office:value-type="float" office:value="0">
            <text:p>#N/D</text:p>
          </table:table-cell>
          <table:table-cell table:style-name="ce9" table:formula="of:=COUNTIF([.J155:.M155];[.N155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9268. Indica cuál es la cifra de las UNIDADES DE MILLAR:</text:p>
          </table:table-cell>
          <table:table-cell table:style-name="ce6" office:value-type="string">
            <text:p>2</text:p>
          </table:table-cell>
          <table:table-cell table:style-name="ce6" office:value-type="string">
            <text:p>9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56];0;[.F156])" office:value-type="string" office:string-value="9">
            <text:p>9</text:p>
          </table:table-cell>
          <table:table-cell/>
          <table:table-cell table:style-name="ce10" table:formula="of:=VLOOKUP([.B156];[Listado.$A$2:.$D$19];4;0)" office:value-type="float" office:value="0">
            <text:p>#N/D</text:p>
          </table:table-cell>
          <table:table-cell table:style-name="ce10" table:formula="of:=VLOOKUP([.C156];[Listado.$A$2:.$D$19];4;0)" office:value-type="float" office:value="0">
            <text:p>#N/D</text:p>
          </table:table-cell>
          <table:table-cell table:style-name="ce10" table:formula="of:=VLOOKUP([.D156];[Listado.$A$2:.$D$19];4;0)" office:value-type="float" office:value="0">
            <text:p>#N/D</text:p>
          </table:table-cell>
          <table:table-cell table:style-name="ce10" table:formula="of:=VLOOKUP([.E156];[Listado.$A$2:.$D$19];4;0)" office:value-type="float" office:value="0">
            <text:p>#N/D</text:p>
          </table:table-cell>
          <table:table-cell table:style-name="ce10" table:formula="of:=VLOOKUP([.H156];[Listado.$A$2:.$D$19];4;0)" office:value-type="float" office:value="0">
            <text:p>#N/D</text:p>
          </table:table-cell>
          <table:table-cell table:style-name="ce10" table:formula="of:=COUNTIF([.J156:.M156];[.N156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6728. Indica cuál es la cifra de las UNIDADES DE MILLAR:</text:p>
          </table:table-cell>
          <table:table-cell table:style-name="ce6" office:value-type="string">
            <text:p>7</text:p>
          </table:table-cell>
          <table:table-cell table:style-name="ce6" office:value-type="string">
            <text:p>5</text:p>
          </table:table-cell>
          <table:table-cell table:style-name="ce6" office:value-type="string">
            <text:p>8</text:p>
          </table:table-cell>
          <table:table-cell table:style-name="ce6" office:value-type="string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57];0;[.F157])" office:value-type="string" office:string-value="6">
            <text:p>6</text:p>
          </table:table-cell>
          <table:table-cell/>
          <table:table-cell table:style-name="ce10" table:formula="of:=VLOOKUP([.B157];[Listado.$A$2:.$D$19];4;0)" office:value-type="float" office:value="0">
            <text:p>#N/D</text:p>
          </table:table-cell>
          <table:table-cell table:style-name="ce10" table:formula="of:=VLOOKUP([.C157];[Listado.$A$2:.$D$19];4;0)" office:value-type="float" office:value="0">
            <text:p>#N/D</text:p>
          </table:table-cell>
          <table:table-cell table:style-name="ce10" table:formula="of:=VLOOKUP([.D157];[Listado.$A$2:.$D$19];4;0)" office:value-type="float" office:value="0">
            <text:p>#N/D</text:p>
          </table:table-cell>
          <table:table-cell table:style-name="ce10" table:formula="of:=VLOOKUP([.E157];[Listado.$A$2:.$D$19];4;0)" office:value-type="float" office:value="0">
            <text:p>#N/D</text:p>
          </table:table-cell>
          <table:table-cell table:style-name="ce10" table:formula="of:=VLOOKUP([.H157];[Listado.$A$2:.$D$19];4;0)" office:value-type="float" office:value="0">
            <text:p>#N/D</text:p>
          </table:table-cell>
          <table:table-cell table:style-name="ce10" table:formula="of:=COUNTIF([.J157:.M157];[.N157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3485. Indica cuál es la cifra de las UNIDADES DE MILLAR:</text:p>
          </table:table-cell>
          <table:table-cell table:style-name="ce6" office:value-type="string">
            <text:p>2</text:p>
          </table:table-cell>
          <table:table-cell table:style-name="ce6" office:value-type="string">
            <text:p>0</text:p>
          </table:table-cell>
          <table:table-cell table:style-name="ce6" office:value-type="string">
            <text:p>6</text:p>
          </table:table-cell>
          <table:table-cell table:style-name="ce6" office:value-type="string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58];0;[.F158])" office:value-type="string" office:string-value="3">
            <text:p>3</text:p>
          </table:table-cell>
          <table:table-cell/>
          <table:table-cell table:style-name="ce10" table:formula="of:=VLOOKUP([.B158];[Listado.$A$2:.$D$19];4;0)" office:value-type="float" office:value="0">
            <text:p>#N/D</text:p>
          </table:table-cell>
          <table:table-cell table:style-name="ce10" table:formula="of:=VLOOKUP([.C158];[Listado.$A$2:.$D$19];4;0)" office:value-type="float" office:value="0">
            <text:p>#N/D</text:p>
          </table:table-cell>
          <table:table-cell table:style-name="ce10" table:formula="of:=VLOOKUP([.D158];[Listado.$A$2:.$D$19];4;0)" office:value-type="float" office:value="0">
            <text:p>#N/D</text:p>
          </table:table-cell>
          <table:table-cell table:style-name="ce10" table:formula="of:=VLOOKUP([.E158];[Listado.$A$2:.$D$19];4;0)" office:value-type="float" office:value="0">
            <text:p>#N/D</text:p>
          </table:table-cell>
          <table:table-cell table:style-name="ce10" table:formula="of:=VLOOKUP([.H158];[Listado.$A$2:.$D$19];4;0)" office:value-type="float" office:value="0">
            <text:p>#N/D</text:p>
          </table:table-cell>
          <table:table-cell table:style-name="ce10" table:formula="of:=COUNTIF([.J158:.M158];[.N158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8476. Indica cuál es la cifra de las UNIDADES DE MILLAR: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5</text:p>
          </table:table-cell>
          <table:table-cell table:style-name="ce6" office:value-type="string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59];0;[.F159])" office:value-type="string" office:string-value="8">
            <text:p>8</text:p>
          </table:table-cell>
          <table:table-cell/>
          <table:table-cell table:style-name="ce10" table:formula="of:=VLOOKUP([.B159];[Listado.$A$2:.$D$19];4;0)" office:value-type="float" office:value="0">
            <text:p>#N/D</text:p>
          </table:table-cell>
          <table:table-cell table:style-name="ce10" table:formula="of:=VLOOKUP([.C159];[Listado.$A$2:.$D$19];4;0)" office:value-type="float" office:value="0">
            <text:p>#N/D</text:p>
          </table:table-cell>
          <table:table-cell table:style-name="ce10" table:formula="of:=VLOOKUP([.D159];[Listado.$A$2:.$D$19];4;0)" office:value-type="float" office:value="0">
            <text:p>#N/D</text:p>
          </table:table-cell>
          <table:table-cell table:style-name="ce10" table:formula="of:=VLOOKUP([.E159];[Listado.$A$2:.$D$19];4;0)" office:value-type="float" office:value="0">
            <text:p>#N/D</text:p>
          </table:table-cell>
          <table:table-cell table:style-name="ce10" table:formula="of:=VLOOKUP([.H159];[Listado.$A$2:.$D$19];4;0)" office:value-type="float" office:value="0">
            <text:p>#N/D</text:p>
          </table:table-cell>
          <table:table-cell table:style-name="ce10" table:formula="of:=COUNTIF([.J159:.M159];[.N159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9602. Indica cuál es la cifra de las UNIDADES DE MILLAR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9</text:p>
          </table:table-cell>
          <table:table-cell table:style-name="ce6" office:value-type="string">
            <text:p>4</text:p>
          </table:table-cell>
          <table:table-cell table:style-name="ce6" office:value-type="string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60];0;[.F160])" office:value-type="string" office:string-value="9">
            <text:p>9</text:p>
          </table:table-cell>
          <table:table-cell/>
          <table:table-cell table:style-name="ce10" table:formula="of:=VLOOKUP([.B160];[Listado.$A$2:.$D$19];4;0)" office:value-type="float" office:value="0">
            <text:p>#N/D</text:p>
          </table:table-cell>
          <table:table-cell table:style-name="ce10" table:formula="of:=VLOOKUP([.C160];[Listado.$A$2:.$D$19];4;0)" office:value-type="float" office:value="0">
            <text:p>#N/D</text:p>
          </table:table-cell>
          <table:table-cell table:style-name="ce10" table:formula="of:=VLOOKUP([.D160];[Listado.$A$2:.$D$19];4;0)" office:value-type="float" office:value="0">
            <text:p>#N/D</text:p>
          </table:table-cell>
          <table:table-cell table:style-name="ce10" table:formula="of:=VLOOKUP([.E160];[Listado.$A$2:.$D$19];4;0)" office:value-type="float" office:value="0">
            <text:p>#N/D</text:p>
          </table:table-cell>
          <table:table-cell table:style-name="ce10" table:formula="of:=VLOOKUP([.H160];[Listado.$A$2:.$D$19];4;0)" office:value-type="float" office:value="0">
            <text:p>#N/D</text:p>
          </table:table-cell>
          <table:table-cell table:style-name="ce10" table:formula="of:=COUNTIF([.J160:.M160];[.N160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7935. Indica cuál es la cifra de las UNIDADES DE MILLAR:</text:p>
          </table:table-cell>
          <table:table-cell table:style-name="ce6" office:value-type="string">
            <text:p>9</text:p>
          </table:table-cell>
          <table:table-cell table:style-name="ce6" office:value-type="string">
            <text:p>1</text:p>
          </table:table-cell>
          <table:table-cell table:style-name="ce6" office:value-type="string">
            <text:p>5</text:p>
          </table:table-cell>
          <table:table-cell table:style-name="ce6" office:value-type="string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61];0;[.F161])" office:value-type="string" office:string-value="7">
            <text:p>7</text:p>
          </table:table-cell>
          <table:table-cell/>
          <table:table-cell table:style-name="ce10" table:formula="of:=VLOOKUP([.B161];[Listado.$A$2:.$D$19];4;0)" office:value-type="float" office:value="0">
            <text:p>#N/D</text:p>
          </table:table-cell>
          <table:table-cell table:style-name="ce10" table:formula="of:=VLOOKUP([.C161];[Listado.$A$2:.$D$19];4;0)" office:value-type="float" office:value="0">
            <text:p>#N/D</text:p>
          </table:table-cell>
          <table:table-cell table:style-name="ce10" table:formula="of:=VLOOKUP([.D161];[Listado.$A$2:.$D$19];4;0)" office:value-type="float" office:value="0">
            <text:p>#N/D</text:p>
          </table:table-cell>
          <table:table-cell table:style-name="ce10" table:formula="of:=VLOOKUP([.E161];[Listado.$A$2:.$D$19];4;0)" office:value-type="float" office:value="0">
            <text:p>#N/D</text:p>
          </table:table-cell>
          <table:table-cell table:style-name="ce10" table:formula="of:=VLOOKUP([.H161];[Listado.$A$2:.$D$19];4;0)" office:value-type="float" office:value="0">
            <text:p>#N/D</text:p>
          </table:table-cell>
          <table:table-cell table:style-name="ce10" table:formula="of:=COUNTIF([.J161:.M161];[.N161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9127. Indica cuál es la cifra de las UNIDADES DE MILLAR:</text:p>
          </table:table-cell>
          <table:table-cell table:style-name="ce6" office:value-type="string">
            <text:p>4</text:p>
          </table:table-cell>
          <table:table-cell table:style-name="ce6" office:value-type="string">
            <text:p>2</text:p>
          </table:table-cell>
          <table:table-cell table:style-name="ce6" office:value-type="string">
            <text:p>9</text:p>
          </table:table-cell>
          <table:table-cell table:style-name="ce6" office:value-type="string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62];0;[.F162])" office:value-type="string" office:string-value="9">
            <text:p>9</text:p>
          </table:table-cell>
          <table:table-cell/>
          <table:table-cell table:style-name="ce10" table:formula="of:=VLOOKUP([.B162];[Listado.$A$2:.$D$19];4;0)" office:value-type="float" office:value="0">
            <text:p>#N/D</text:p>
          </table:table-cell>
          <table:table-cell table:style-name="ce10" table:formula="of:=VLOOKUP([.C162];[Listado.$A$2:.$D$19];4;0)" office:value-type="float" office:value="0">
            <text:p>#N/D</text:p>
          </table:table-cell>
          <table:table-cell table:style-name="ce10" table:formula="of:=VLOOKUP([.D162];[Listado.$A$2:.$D$19];4;0)" office:value-type="float" office:value="0">
            <text:p>#N/D</text:p>
          </table:table-cell>
          <table:table-cell table:style-name="ce10" table:formula="of:=VLOOKUP([.E162];[Listado.$A$2:.$D$19];4;0)" office:value-type="float" office:value="0">
            <text:p>#N/D</text:p>
          </table:table-cell>
          <table:table-cell table:style-name="ce10" table:formula="of:=VLOOKUP([.H162];[Listado.$A$2:.$D$19];4;0)" office:value-type="float" office:value="0">
            <text:p>#N/D</text:p>
          </table:table-cell>
          <table:table-cell table:style-name="ce10" table:formula="of:=COUNTIF([.J162:.M162];[.N162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7149. Indica cuál es la cifra de las UNIDADES DE MILLAR:</text:p>
          </table:table-cell>
          <table:table-cell table:style-name="ce7" office:value-type="string">
            <text:p>7</text:p>
          </table:table-cell>
          <table:table-cell table:style-name="ce7" office:value-type="string">
            <text:p>9</text:p>
          </table:table-cell>
          <table:table-cell table:style-name="ce7" office:value-type="string">
            <text:p>6</text:p>
          </table:table-cell>
          <table:table-cell table:style-name="ce7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a cifra de los millares es la cuarta de la parte entera contando desde la derecha.</text:p>
          </table:table-cell>
          <table:table-cell table:style-name="ce9" table:formula="of:=OFFSET([.A163];0;[.F163])" office:value-type="string" office:string-value="7">
            <text:p>7</text:p>
          </table:table-cell>
          <table:table-cell table:style-name="ce9"/>
          <table:table-cell table:style-name="ce9" table:formula="of:=VLOOKUP([.B163];[Listado.$A$2:.$D$19];4;0)" office:value-type="float" office:value="0">
            <text:p>#N/D</text:p>
          </table:table-cell>
          <table:table-cell table:style-name="ce9" table:formula="of:=VLOOKUP([.C163];[Listado.$A$2:.$D$19];4;0)" office:value-type="float" office:value="0">
            <text:p>#N/D</text:p>
          </table:table-cell>
          <table:table-cell table:style-name="ce9" table:formula="of:=VLOOKUP([.D163];[Listado.$A$2:.$D$19];4;0)" office:value-type="float" office:value="0">
            <text:p>#N/D</text:p>
          </table:table-cell>
          <table:table-cell table:style-name="ce9" table:formula="of:=VLOOKUP([.E163];[Listado.$A$2:.$D$19];4;0)" office:value-type="float" office:value="0">
            <text:p>#N/D</text:p>
          </table:table-cell>
          <table:table-cell table:style-name="ce9" table:formula="of:=VLOOKUP([.H163];[Listado.$A$2:.$D$19];4;0)" office:value-type="float" office:value="0">
            <text:p>#N/D</text:p>
          </table:table-cell>
          <table:table-cell table:style-name="ce9" table:formula="of:=COUNTIF([.J163:.M163];[.N163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5017. Indica cuál es la cifra de las UNIDADES DE MILLAR: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2</text:p>
          </table:table-cell>
          <table:table-cell table:style-name="ce6" office:value-type="string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64];0;[.F164])" office:value-type="string" office:string-value="5">
            <text:p>5</text:p>
          </table:table-cell>
          <table:table-cell/>
          <table:table-cell table:style-name="ce10" table:formula="of:=VLOOKUP([.B164];[Listado.$A$2:.$D$19];4;0)" office:value-type="float" office:value="0">
            <text:p>#N/D</text:p>
          </table:table-cell>
          <table:table-cell table:style-name="ce10" table:formula="of:=VLOOKUP([.C164];[Listado.$A$2:.$D$19];4;0)" office:value-type="float" office:value="0">
            <text:p>#N/D</text:p>
          </table:table-cell>
          <table:table-cell table:style-name="ce10" table:formula="of:=VLOOKUP([.D164];[Listado.$A$2:.$D$19];4;0)" office:value-type="float" office:value="0">
            <text:p>#N/D</text:p>
          </table:table-cell>
          <table:table-cell table:style-name="ce10" table:formula="of:=VLOOKUP([.E164];[Listado.$A$2:.$D$19];4;0)" office:value-type="float" office:value="0">
            <text:p>#N/D</text:p>
          </table:table-cell>
          <table:table-cell table:style-name="ce10" table:formula="of:=VLOOKUP([.H164];[Listado.$A$2:.$D$19];4;0)" office:value-type="float" office:value="0">
            <text:p>#N/D</text:p>
          </table:table-cell>
          <table:table-cell table:style-name="ce10" table:formula="of:=COUNTIF([.J164:.M164];[.N164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7405. Indica cuál es la cifra de las UNIDADES DE MILLAR:</text:p>
          </table:table-cell>
          <table:table-cell table:style-name="ce6" office:value-type="string">
            <text:p>4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6" office:value-type="string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65];0;[.F165])" office:value-type="string" office:string-value="7">
            <text:p>7</text:p>
          </table:table-cell>
          <table:table-cell/>
          <table:table-cell table:style-name="ce10" table:formula="of:=VLOOKUP([.B165];[Listado.$A$2:.$D$19];4;0)" office:value-type="float" office:value="0">
            <text:p>#N/D</text:p>
          </table:table-cell>
          <table:table-cell table:style-name="ce10" table:formula="of:=VLOOKUP([.C165];[Listado.$A$2:.$D$19];4;0)" office:value-type="float" office:value="0">
            <text:p>#N/D</text:p>
          </table:table-cell>
          <table:table-cell table:style-name="ce10" table:formula="of:=VLOOKUP([.D165];[Listado.$A$2:.$D$19];4;0)" office:value-type="float" office:value="0">
            <text:p>#N/D</text:p>
          </table:table-cell>
          <table:table-cell table:style-name="ce10" table:formula="of:=VLOOKUP([.E165];[Listado.$A$2:.$D$19];4;0)" office:value-type="float" office:value="0">
            <text:p>#N/D</text:p>
          </table:table-cell>
          <table:table-cell table:style-name="ce10" table:formula="of:=VLOOKUP([.H165];[Listado.$A$2:.$D$19];4;0)" office:value-type="float" office:value="0">
            <text:p>#N/D</text:p>
          </table:table-cell>
          <table:table-cell table:style-name="ce10" table:formula="of:=COUNTIF([.J165:.M165];[.N165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8739. Indica cuál es la cifra de las UNIDADES DE MILLAR:</text:p>
          </table:table-cell>
          <table:table-cell table:style-name="ce7" office:value-type="string">
            <text:p>8</text:p>
          </table:table-cell>
          <table:table-cell table:style-name="ce7" office:value-type="string">
            <text:p>5</text:p>
          </table:table-cell>
          <table:table-cell table:style-name="ce7" office:value-type="string">
            <text:p>6</text:p>
          </table:table-cell>
          <table:table-cell table:style-name="ce7" office:value-type="string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a cifra de los millares es la cuarta de la parte entera contando desde la derecha.</text:p>
          </table:table-cell>
          <table:table-cell table:style-name="ce9" table:formula="of:=OFFSET([.A166];0;[.F166])" office:value-type="string" office:string-value="8">
            <text:p>8</text:p>
          </table:table-cell>
          <table:table-cell table:style-name="ce9"/>
          <table:table-cell table:style-name="ce9" table:formula="of:=VLOOKUP([.B166];[Listado.$A$2:.$D$19];4;0)" office:value-type="float" office:value="0">
            <text:p>#N/D</text:p>
          </table:table-cell>
          <table:table-cell table:style-name="ce9" table:formula="of:=VLOOKUP([.C166];[Listado.$A$2:.$D$19];4;0)" office:value-type="float" office:value="0">
            <text:p>#N/D</text:p>
          </table:table-cell>
          <table:table-cell table:style-name="ce9" table:formula="of:=VLOOKUP([.D166];[Listado.$A$2:.$D$19];4;0)" office:value-type="float" office:value="0">
            <text:p>#N/D</text:p>
          </table:table-cell>
          <table:table-cell table:style-name="ce9" table:formula="of:=VLOOKUP([.E166];[Listado.$A$2:.$D$19];4;0)" office:value-type="float" office:value="0">
            <text:p>#N/D</text:p>
          </table:table-cell>
          <table:table-cell table:style-name="ce9" table:formula="of:=VLOOKUP([.H166];[Listado.$A$2:.$D$19];4;0)" office:value-type="float" office:value="0">
            <text:p>#N/D</text:p>
          </table:table-cell>
          <table:table-cell table:style-name="ce9" table:formula="of:=COUNTIF([.J166:.M166];[.N166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4821. Indica cuál es la cifra de las UNIDADES DE MILLAR:</text:p>
          </table:table-cell>
          <table:table-cell table:style-name="ce6" office:value-type="string">
            <text:p>8</text:p>
          </table:table-cell>
          <table:table-cell table:style-name="ce6" office:value-type="string">
            <text:p>2</text:p>
          </table:table-cell>
          <table:table-cell table:style-name="ce6" office:value-type="string">
            <text:p>4</text:p>
          </table:table-cell>
          <table:table-cell table:style-name="ce6" office:value-type="string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67];0;[.F167])" office:value-type="string" office:string-value="4">
            <text:p>4</text:p>
          </table:table-cell>
          <table:table-cell/>
          <table:table-cell table:style-name="ce10" table:formula="of:=VLOOKUP([.B167];[Listado.$A$2:.$D$19];4;0)" office:value-type="float" office:value="0">
            <text:p>#N/D</text:p>
          </table:table-cell>
          <table:table-cell table:style-name="ce10" table:formula="of:=VLOOKUP([.C167];[Listado.$A$2:.$D$19];4;0)" office:value-type="float" office:value="0">
            <text:p>#N/D</text:p>
          </table:table-cell>
          <table:table-cell table:style-name="ce10" table:formula="of:=VLOOKUP([.D167];[Listado.$A$2:.$D$19];4;0)" office:value-type="float" office:value="0">
            <text:p>#N/D</text:p>
          </table:table-cell>
          <table:table-cell table:style-name="ce10" table:formula="of:=VLOOKUP([.E167];[Listado.$A$2:.$D$19];4;0)" office:value-type="float" office:value="0">
            <text:p>#N/D</text:p>
          </table:table-cell>
          <table:table-cell table:style-name="ce10" table:formula="of:=VLOOKUP([.H167];[Listado.$A$2:.$D$19];4;0)" office:value-type="float" office:value="0">
            <text:p>#N/D</text:p>
          </table:table-cell>
          <table:table-cell table:style-name="ce10" table:formula="of:=COUNTIF([.J167:.M167];[.N167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9817. Indica cuál es la cifra de las UNIDADES DE MILLAR:</text:p>
          </table:table-cell>
          <table:table-cell table:style-name="ce7" office:value-type="string">
            <text:p>4</text:p>
          </table:table-cell>
          <table:table-cell table:style-name="ce7" office:value-type="string">
            <text:p>8</text:p>
          </table:table-cell>
          <table:table-cell table:style-name="ce7" office:value-type="string">
            <text:p>9</text:p>
          </table:table-cell>
          <table:table-cell table:style-name="ce7" office:value-type="string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a cifra de los millares es la cuarta de la parte entera contando desde la derecha.</text:p>
          </table:table-cell>
          <table:table-cell table:style-name="ce9" table:formula="of:=OFFSET([.A168];0;[.F168])" office:value-type="string" office:string-value="9">
            <text:p>9</text:p>
          </table:table-cell>
          <table:table-cell table:style-name="ce9"/>
          <table:table-cell table:style-name="ce9" table:formula="of:=VLOOKUP([.B168];[Listado.$A$2:.$D$19];4;0)" office:value-type="float" office:value="0">
            <text:p>#N/D</text:p>
          </table:table-cell>
          <table:table-cell table:style-name="ce9" table:formula="of:=VLOOKUP([.C168];[Listado.$A$2:.$D$19];4;0)" office:value-type="float" office:value="0">
            <text:p>#N/D</text:p>
          </table:table-cell>
          <table:table-cell table:style-name="ce9" table:formula="of:=VLOOKUP([.D168];[Listado.$A$2:.$D$19];4;0)" office:value-type="float" office:value="0">
            <text:p>#N/D</text:p>
          </table:table-cell>
          <table:table-cell table:style-name="ce9" table:formula="of:=VLOOKUP([.E168];[Listado.$A$2:.$D$19];4;0)" office:value-type="float" office:value="0">
            <text:p>#N/D</text:p>
          </table:table-cell>
          <table:table-cell table:style-name="ce9" table:formula="of:=VLOOKUP([.H168];[Listado.$A$2:.$D$19];4;0)" office:value-type="float" office:value="0">
            <text:p>#N/D</text:p>
          </table:table-cell>
          <table:table-cell table:style-name="ce9" table:formula="of:=COUNTIF([.J168:.M168];[.N168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1589. Indica cuál es la cifra de las UNIDADES DE MILLAR: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1</text:p>
          </table:table-cell>
          <table:table-cell table:style-name="ce6" office:value-type="string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69];0;[.F169])" office:value-type="string" office:string-value="1">
            <text:p>1</text:p>
          </table:table-cell>
          <table:table-cell/>
          <table:table-cell table:style-name="ce10" table:formula="of:=VLOOKUP([.B169];[Listado.$A$2:.$D$19];4;0)" office:value-type="float" office:value="0">
            <text:p>#N/D</text:p>
          </table:table-cell>
          <table:table-cell table:style-name="ce10" table:formula="of:=VLOOKUP([.C169];[Listado.$A$2:.$D$19];4;0)" office:value-type="float" office:value="0">
            <text:p>#N/D</text:p>
          </table:table-cell>
          <table:table-cell table:style-name="ce10" table:formula="of:=VLOOKUP([.D169];[Listado.$A$2:.$D$19];4;0)" office:value-type="float" office:value="0">
            <text:p>#N/D</text:p>
          </table:table-cell>
          <table:table-cell table:style-name="ce10" table:formula="of:=VLOOKUP([.E169];[Listado.$A$2:.$D$19];4;0)" office:value-type="float" office:value="0">
            <text:p>#N/D</text:p>
          </table:table-cell>
          <table:table-cell table:style-name="ce10" table:formula="of:=VLOOKUP([.H169];[Listado.$A$2:.$D$19];4;0)" office:value-type="float" office:value="0">
            <text:p>#N/D</text:p>
          </table:table-cell>
          <table:table-cell table:style-name="ce10" table:formula="of:=COUNTIF([.J169:.M169];[.N169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8241. Indica cuál es la cifra de las UNIDADES DE MILLAR:</text:p>
          </table:table-cell>
          <table:table-cell table:style-name="ce6" office:value-type="string">
            <text:p>0</text:p>
          </table:table-cell>
          <table:table-cell table:style-name="ce6" office:value-type="string">
            <text:p>9</text:p>
          </table:table-cell>
          <table:table-cell table:style-name="ce6" office:value-type="string">
            <text:p>8</text:p>
          </table:table-cell>
          <table:table-cell table:style-name="ce6" office:value-type="string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0];0;[.F170])" office:value-type="string" office:string-value="8">
            <text:p>8</text:p>
          </table:table-cell>
          <table:table-cell/>
          <table:table-cell table:style-name="ce10" table:formula="of:=VLOOKUP([.B170];[Listado.$A$2:.$D$19];4;0)" office:value-type="float" office:value="0">
            <text:p>#N/D</text:p>
          </table:table-cell>
          <table:table-cell table:style-name="ce10" table:formula="of:=VLOOKUP([.C170];[Listado.$A$2:.$D$19];4;0)" office:value-type="float" office:value="0">
            <text:p>#N/D</text:p>
          </table:table-cell>
          <table:table-cell table:style-name="ce10" table:formula="of:=VLOOKUP([.D170];[Listado.$A$2:.$D$19];4;0)" office:value-type="float" office:value="0">
            <text:p>#N/D</text:p>
          </table:table-cell>
          <table:table-cell table:style-name="ce10" table:formula="of:=VLOOKUP([.E170];[Listado.$A$2:.$D$19];4;0)" office:value-type="float" office:value="0">
            <text:p>#N/D</text:p>
          </table:table-cell>
          <table:table-cell table:style-name="ce10" table:formula="of:=VLOOKUP([.H170];[Listado.$A$2:.$D$19];4;0)" office:value-type="float" office:value="0">
            <text:p>#N/D</text:p>
          </table:table-cell>
          <table:table-cell table:style-name="ce10" table:formula="of:=COUNTIF([.J170:.M170];[.N170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627. Indica cuál es la cifra de las UNIDADES DE MILLAR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7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1];0;[.F171])" office:value-type="string" office:string-value="1">
            <text:p>1</text:p>
          </table:table-cell>
          <table:table-cell/>
          <table:table-cell table:style-name="ce10" table:formula="of:=VLOOKUP([.B171];[Listado.$A$2:.$D$19];4;0)" office:value-type="float" office:value="0">
            <text:p>#N/D</text:p>
          </table:table-cell>
          <table:table-cell table:style-name="ce10" table:formula="of:=VLOOKUP([.C171];[Listado.$A$2:.$D$19];4;0)" office:value-type="float" office:value="0">
            <text:p>#N/D</text:p>
          </table:table-cell>
          <table:table-cell table:style-name="ce10" table:formula="of:=VLOOKUP([.D171];[Listado.$A$2:.$D$19];4;0)" office:value-type="float" office:value="0">
            <text:p>#N/D</text:p>
          </table:table-cell>
          <table:table-cell table:style-name="ce10" table:formula="of:=VLOOKUP([.E171];[Listado.$A$2:.$D$19];4;0)" office:value-type="float" office:value="0">
            <text:p>#N/D</text:p>
          </table:table-cell>
          <table:table-cell table:style-name="ce10" table:formula="of:=VLOOKUP([.H171];[Listado.$A$2:.$D$19];4;0)" office:value-type="float" office:value="0">
            <text:p>#N/D</text:p>
          </table:table-cell>
          <table:table-cell table:style-name="ce10" table:formula="of:=COUNTIF([.J171:.M171];[.N171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6824. Indica cuál es la cifra de las UNIDADES DE MILLAR:</text:p>
          </table:table-cell>
          <table:table-cell table:style-name="ce6" office:value-type="string">
            <text:p>2</text:p>
          </table:table-cell>
          <table:table-cell table:style-name="ce6" office:value-type="string">
            <text:p>4</text:p>
          </table:table-cell>
          <table:table-cell table:style-name="ce6" office:value-type="string">
            <text:p>6</text:p>
          </table:table-cell>
          <table:table-cell table:style-name="ce6" office:value-type="string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2];0;[.F172])" office:value-type="string" office:string-value="6">
            <text:p>6</text:p>
          </table:table-cell>
          <table:table-cell/>
          <table:table-cell table:style-name="ce10" table:formula="of:=VLOOKUP([.B172];[Listado.$A$2:.$D$19];4;0)" office:value-type="float" office:value="0">
            <text:p>#N/D</text:p>
          </table:table-cell>
          <table:table-cell table:style-name="ce10" table:formula="of:=VLOOKUP([.C172];[Listado.$A$2:.$D$19];4;0)" office:value-type="float" office:value="0">
            <text:p>#N/D</text:p>
          </table:table-cell>
          <table:table-cell table:style-name="ce10" table:formula="of:=VLOOKUP([.D172];[Listado.$A$2:.$D$19];4;0)" office:value-type="float" office:value="0">
            <text:p>#N/D</text:p>
          </table:table-cell>
          <table:table-cell table:style-name="ce10" table:formula="of:=VLOOKUP([.E172];[Listado.$A$2:.$D$19];4;0)" office:value-type="float" office:value="0">
            <text:p>#N/D</text:p>
          </table:table-cell>
          <table:table-cell table:style-name="ce10" table:formula="of:=VLOOKUP([.H172];[Listado.$A$2:.$D$19];4;0)" office:value-type="float" office:value="0">
            <text:p>#N/D</text:p>
          </table:table-cell>
          <table:table-cell table:style-name="ce10" table:formula="of:=COUNTIF([.J172:.M172];[.N172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3602. Indica cuál es la cifra de las UNIDADES DE MILLAR:</text:p>
          </table:table-cell>
          <table:table-cell table:style-name="ce6" office:value-type="string">
            <text:p>6</text:p>
          </table:table-cell>
          <table:table-cell table:style-name="ce6" office:value-type="string">
            <text:p>3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3];0;[.F173])" office:value-type="string" office:string-value="3">
            <text:p>3</text:p>
          </table:table-cell>
          <table:table-cell/>
          <table:table-cell table:style-name="ce10" table:formula="of:=VLOOKUP([.B173];[Listado.$A$2:.$D$19];4;0)" office:value-type="float" office:value="0">
            <text:p>#N/D</text:p>
          </table:table-cell>
          <table:table-cell table:style-name="ce10" table:formula="of:=VLOOKUP([.C173];[Listado.$A$2:.$D$19];4;0)" office:value-type="float" office:value="0">
            <text:p>#N/D</text:p>
          </table:table-cell>
          <table:table-cell table:style-name="ce10" table:formula="of:=VLOOKUP([.D173];[Listado.$A$2:.$D$19];4;0)" office:value-type="float" office:value="0">
            <text:p>#N/D</text:p>
          </table:table-cell>
          <table:table-cell table:style-name="ce10" table:formula="of:=VLOOKUP([.E173];[Listado.$A$2:.$D$19];4;0)" office:value-type="float" office:value="0">
            <text:p>#N/D</text:p>
          </table:table-cell>
          <table:table-cell table:style-name="ce10" table:formula="of:=VLOOKUP([.H173];[Listado.$A$2:.$D$19];4;0)" office:value-type="float" office:value="0">
            <text:p>#N/D</text:p>
          </table:table-cell>
          <table:table-cell table:style-name="ce10" table:formula="of:=COUNTIF([.J173:.M173];[.N173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7205. Indica cuál es la cifra de las UNIDADES DE MILLAR:</text:p>
          </table:table-cell>
          <table:table-cell table:style-name="ce6" office:value-type="string">
            <text:p>8</text:p>
          </table:table-cell>
          <table:table-cell table:style-name="ce6" office:value-type="string">
            <text:p>7</text:p>
          </table:table-cell>
          <table:table-cell table:style-name="ce6" office:value-type="string">
            <text:p>0</text:p>
          </table:table-cell>
          <table:table-cell table:style-name="ce6" office:value-type="string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4];0;[.F174])" office:value-type="string" office:string-value="7">
            <text:p>7</text:p>
          </table:table-cell>
          <table:table-cell/>
          <table:table-cell table:style-name="ce10" table:formula="of:=VLOOKUP([.B174];[Listado.$A$2:.$D$19];4;0)" office:value-type="float" office:value="0">
            <text:p>#N/D</text:p>
          </table:table-cell>
          <table:table-cell table:style-name="ce10" table:formula="of:=VLOOKUP([.C174];[Listado.$A$2:.$D$19];4;0)" office:value-type="float" office:value="0">
            <text:p>#N/D</text:p>
          </table:table-cell>
          <table:table-cell table:style-name="ce10" table:formula="of:=VLOOKUP([.D174];[Listado.$A$2:.$D$19];4;0)" office:value-type="float" office:value="0">
            <text:p>#N/D</text:p>
          </table:table-cell>
          <table:table-cell table:style-name="ce10" table:formula="of:=VLOOKUP([.E174];[Listado.$A$2:.$D$19];4;0)" office:value-type="float" office:value="0">
            <text:p>#N/D</text:p>
          </table:table-cell>
          <table:table-cell table:style-name="ce10" table:formula="of:=VLOOKUP([.H174];[Listado.$A$2:.$D$19];4;0)" office:value-type="float" office:value="0">
            <text:p>#N/D</text:p>
          </table:table-cell>
          <table:table-cell table:style-name="ce10" table:formula="of:=COUNTIF([.J174:.M174];[.N174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2173. Indica cuál es la cifra de las UNIDADES DE MILLAR:</text:p>
          </table:table-cell>
          <table:table-cell table:style-name="ce6" office:value-type="string">
            <text:p>0</text:p>
          </table:table-cell>
          <table:table-cell table:style-name="ce6" office:value-type="string">
            <text:p>1</text:p>
          </table:table-cell>
          <table:table-cell table:style-name="ce6" office:value-type="string">
            <text:p>3</text:p>
          </table:table-cell>
          <table:table-cell table:style-name="ce6" office:value-type="string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5];0;[.F175])" office:value-type="string" office:string-value="2">
            <text:p>2</text:p>
          </table:table-cell>
          <table:table-cell/>
          <table:table-cell table:style-name="ce10" table:formula="of:=VLOOKUP([.B175];[Listado.$A$2:.$D$19];4;0)" office:value-type="float" office:value="0">
            <text:p>#N/D</text:p>
          </table:table-cell>
          <table:table-cell table:style-name="ce10" table:formula="of:=VLOOKUP([.C175];[Listado.$A$2:.$D$19];4;0)" office:value-type="float" office:value="0">
            <text:p>#N/D</text:p>
          </table:table-cell>
          <table:table-cell table:style-name="ce10" table:formula="of:=VLOOKUP([.D175];[Listado.$A$2:.$D$19];4;0)" office:value-type="float" office:value="0">
            <text:p>#N/D</text:p>
          </table:table-cell>
          <table:table-cell table:style-name="ce10" table:formula="of:=VLOOKUP([.E175];[Listado.$A$2:.$D$19];4;0)" office:value-type="float" office:value="0">
            <text:p>#N/D</text:p>
          </table:table-cell>
          <table:table-cell table:style-name="ce10" table:formula="of:=VLOOKUP([.H175];[Listado.$A$2:.$D$19];4;0)" office:value-type="float" office:value="0">
            <text:p>#N/D</text:p>
          </table:table-cell>
          <table:table-cell table:style-name="ce10" table:formula="of:=COUNTIF([.J175:.M175];[.N175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4768. Indica cuál es la cifra de las UNIDADES DE MILLAR:</text:p>
          </table:table-cell>
          <table:table-cell table:style-name="ce6" office:value-type="string">
            <text:p>7</text:p>
          </table:table-cell>
          <table:table-cell table:style-name="ce6" office:value-type="string">
            <text:p>4</text:p>
          </table:table-cell>
          <table:table-cell table:style-name="ce6" office:value-type="string">
            <text:p>1</text:p>
          </table:table-cell>
          <table:table-cell table:style-name="ce6" office:value-type="string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6];0;[.F176])" office:value-type="string" office:string-value="4">
            <text:p>4</text:p>
          </table:table-cell>
          <table:table-cell/>
          <table:table-cell table:style-name="ce10" table:formula="of:=VLOOKUP([.B176];[Listado.$A$2:.$D$19];4;0)" office:value-type="float" office:value="0">
            <text:p>#N/D</text:p>
          </table:table-cell>
          <table:table-cell table:style-name="ce10" table:formula="of:=VLOOKUP([.C176];[Listado.$A$2:.$D$19];4;0)" office:value-type="float" office:value="0">
            <text:p>#N/D</text:p>
          </table:table-cell>
          <table:table-cell table:style-name="ce10" table:formula="of:=VLOOKUP([.D176];[Listado.$A$2:.$D$19];4;0)" office:value-type="float" office:value="0">
            <text:p>#N/D</text:p>
          </table:table-cell>
          <table:table-cell table:style-name="ce10" table:formula="of:=VLOOKUP([.E176];[Listado.$A$2:.$D$19];4;0)" office:value-type="float" office:value="0">
            <text:p>#N/D</text:p>
          </table:table-cell>
          <table:table-cell table:style-name="ce10" table:formula="of:=VLOOKUP([.H176];[Listado.$A$2:.$D$19];4;0)" office:value-type="float" office:value="0">
            <text:p>#N/D</text:p>
          </table:table-cell>
          <table:table-cell table:style-name="ce10" table:formula="of:=COUNTIF([.J176:.M176];[.N176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5294. Indica cuál es la cifra de las UNIDADES DE MILLAR: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2</text:p>
          </table:table-cell>
          <table:table-cell table:style-name="ce6" office:value-type="string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7];0;[.F177])" office:value-type="string" office:string-value="5">
            <text:p>5</text:p>
          </table:table-cell>
          <table:table-cell/>
          <table:table-cell table:style-name="ce10" table:formula="of:=VLOOKUP([.B177];[Listado.$A$2:.$D$19];4;0)" office:value-type="float" office:value="0">
            <text:p>#N/D</text:p>
          </table:table-cell>
          <table:table-cell table:style-name="ce10" table:formula="of:=VLOOKUP([.C177];[Listado.$A$2:.$D$19];4;0)" office:value-type="float" office:value="0">
            <text:p>#N/D</text:p>
          </table:table-cell>
          <table:table-cell table:style-name="ce10" table:formula="of:=VLOOKUP([.D177];[Listado.$A$2:.$D$19];4;0)" office:value-type="float" office:value="0">
            <text:p>#N/D</text:p>
          </table:table-cell>
          <table:table-cell table:style-name="ce10" table:formula="of:=VLOOKUP([.E177];[Listado.$A$2:.$D$19];4;0)" office:value-type="float" office:value="0">
            <text:p>#N/D</text:p>
          </table:table-cell>
          <table:table-cell table:style-name="ce10" table:formula="of:=VLOOKUP([.H177];[Listado.$A$2:.$D$19];4;0)" office:value-type="float" office:value="0">
            <text:p>#N/D</text:p>
          </table:table-cell>
          <table:table-cell table:style-name="ce10" table:formula="of:=COUNTIF([.J177:.M177];[.N177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1731. Indica cuál es la cifra de las UNIDADES DE MILLAR:</text:p>
          </table:table-cell>
          <table:table-cell table:style-name="ce7" office:value-type="string">
            <text:p>5</text:p>
          </table:table-cell>
          <table:table-cell table:style-name="ce7" office:value-type="string">
            <text:p>4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La cifra de los millares es la cuarta de la parte entera contando desde la derecha.</text:p>
          </table:table-cell>
          <table:table-cell table:style-name="ce9" table:formula="of:=OFFSET([.A178];0;[.F178])" office:value-type="string" office:string-value="1">
            <text:p>1</text:p>
          </table:table-cell>
          <table:table-cell table:style-name="ce9"/>
          <table:table-cell table:style-name="ce9" table:formula="of:=VLOOKUP([.B178];[Listado.$A$2:.$D$19];4;0)" office:value-type="float" office:value="0">
            <text:p>#N/D</text:p>
          </table:table-cell>
          <table:table-cell table:style-name="ce9" table:formula="of:=VLOOKUP([.C178];[Listado.$A$2:.$D$19];4;0)" office:value-type="float" office:value="0">
            <text:p>#N/D</text:p>
          </table:table-cell>
          <table:table-cell table:style-name="ce9" table:formula="of:=VLOOKUP([.D178];[Listado.$A$2:.$D$19];4;0)" office:value-type="float" office:value="0">
            <text:p>#N/D</text:p>
          </table:table-cell>
          <table:table-cell table:style-name="ce9" table:formula="of:=VLOOKUP([.E178];[Listado.$A$2:.$D$19];4;0)" office:value-type="float" office:value="0">
            <text:p>#N/D</text:p>
          </table:table-cell>
          <table:table-cell table:style-name="ce9" table:formula="of:=VLOOKUP([.H178];[Listado.$A$2:.$D$19];4;0)" office:value-type="float" office:value="0">
            <text:p>#N/D</text:p>
          </table:table-cell>
          <table:table-cell table:style-name="ce9" table:formula="of:=COUNTIF([.J178:.M178];[.N178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8967. Indica cuál es la cifra de las UNIDADES DE MILLAR:</text:p>
          </table:table-cell>
          <table:table-cell table:style-name="ce6" office:value-type="string">
            <text:p>8</text:p>
          </table:table-cell>
          <table:table-cell table:style-name="ce6" office:value-type="string">
            <text:p>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79];0;[.F179])" office:value-type="string" office:string-value="8">
            <text:p>8</text:p>
          </table:table-cell>
          <table:table-cell/>
          <table:table-cell table:style-name="ce10" table:formula="of:=VLOOKUP([.B179];[Listado.$A$2:.$D$19];4;0)" office:value-type="float" office:value="0">
            <text:p>#N/D</text:p>
          </table:table-cell>
          <table:table-cell table:style-name="ce10" table:formula="of:=VLOOKUP([.C179];[Listado.$A$2:.$D$19];4;0)" office:value-type="float" office:value="0">
            <text:p>#N/D</text:p>
          </table:table-cell>
          <table:table-cell table:style-name="ce10" table:formula="of:=VLOOKUP([.D179];[Listado.$A$2:.$D$19];4;0)" office:value-type="float" office:value="0">
            <text:p>#N/D</text:p>
          </table:table-cell>
          <table:table-cell table:style-name="ce10" table:formula="of:=VLOOKUP([.E179];[Listado.$A$2:.$D$19];4;0)" office:value-type="float" office:value="0">
            <text:p>#N/D</text:p>
          </table:table-cell>
          <table:table-cell table:style-name="ce10" table:formula="of:=VLOOKUP([.H179];[Listado.$A$2:.$D$19];4;0)" office:value-type="float" office:value="0">
            <text:p>#N/D</text:p>
          </table:table-cell>
          <table:table-cell table:style-name="ce10" table:formula="of:=COUNTIF([.J179:.M179];[.N179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2849. Indica cuál es la cifra de las UNIDADES DE MILLAR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6" office:value-type="string">
            <text:p>8</text:p>
          </table:table-cell>
          <table:table-cell table:style-name="ce6" office:value-type="string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0];0;[.F180])" office:value-type="string" office:string-value="2">
            <text:p>2</text:p>
          </table:table-cell>
          <table:table-cell/>
          <table:table-cell table:style-name="ce10" table:formula="of:=VLOOKUP([.B180];[Listado.$A$2:.$D$19];4;0)" office:value-type="float" office:value="0">
            <text:p>#N/D</text:p>
          </table:table-cell>
          <table:table-cell table:style-name="ce10" table:formula="of:=VLOOKUP([.C180];[Listado.$A$2:.$D$19];4;0)" office:value-type="float" office:value="0">
            <text:p>#N/D</text:p>
          </table:table-cell>
          <table:table-cell table:style-name="ce10" table:formula="of:=VLOOKUP([.D180];[Listado.$A$2:.$D$19];4;0)" office:value-type="float" office:value="0">
            <text:p>#N/D</text:p>
          </table:table-cell>
          <table:table-cell table:style-name="ce10" table:formula="of:=VLOOKUP([.E180];[Listado.$A$2:.$D$19];4;0)" office:value-type="float" office:value="0">
            <text:p>#N/D</text:p>
          </table:table-cell>
          <table:table-cell table:style-name="ce10" table:formula="of:=VLOOKUP([.H180];[Listado.$A$2:.$D$19];4;0)" office:value-type="float" office:value="0">
            <text:p>#N/D</text:p>
          </table:table-cell>
          <table:table-cell table:style-name="ce10" table:formula="of:=COUNTIF([.J180:.M180];[.N180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5743. Indica cuál es la cifra de las UNIDADES DE MILLAR:</text:p>
          </table:table-cell>
          <table:table-cell table:style-name="ce6" office:value-type="string">
            <text:p>4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1];0;[.F181])" office:value-type="string" office:string-value="5">
            <text:p>5</text:p>
          </table:table-cell>
          <table:table-cell/>
          <table:table-cell table:style-name="ce10" table:formula="of:=VLOOKUP([.B181];[Listado.$A$2:.$D$19];4;0)" office:value-type="float" office:value="0">
            <text:p>#N/D</text:p>
          </table:table-cell>
          <table:table-cell table:style-name="ce10" table:formula="of:=VLOOKUP([.C181];[Listado.$A$2:.$D$19];4;0)" office:value-type="float" office:value="0">
            <text:p>#N/D</text:p>
          </table:table-cell>
          <table:table-cell table:style-name="ce10" table:formula="of:=VLOOKUP([.D181];[Listado.$A$2:.$D$19];4;0)" office:value-type="float" office:value="0">
            <text:p>#N/D</text:p>
          </table:table-cell>
          <table:table-cell table:style-name="ce10" table:formula="of:=VLOOKUP([.E181];[Listado.$A$2:.$D$19];4;0)" office:value-type="float" office:value="0">
            <text:p>#N/D</text:p>
          </table:table-cell>
          <table:table-cell table:style-name="ce10" table:formula="of:=VLOOKUP([.H181];[Listado.$A$2:.$D$19];4;0)" office:value-type="float" office:value="0">
            <text:p>#N/D</text:p>
          </table:table-cell>
          <table:table-cell table:style-name="ce10" table:formula="of:=COUNTIF([.J181:.M181];[.N181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4072. Indica cuál es la cifra de las UNIDADES DE MILLAR:</text:p>
          </table:table-cell>
          <table:table-cell table:style-name="ce7" office:value-type="string">
            <text:p>7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La cifra de los millares es la cuarta de la parte entera contando desde la derecha.</text:p>
          </table:table-cell>
          <table:table-cell table:style-name="ce9" table:formula="of:=OFFSET([.A182];0;[.F182])" office:value-type="string" office:string-value="4">
            <text:p>4</text:p>
          </table:table-cell>
          <table:table-cell table:style-name="ce9"/>
          <table:table-cell table:style-name="ce9" table:formula="of:=VLOOKUP([.B182];[Listado.$A$2:.$D$19];4;0)" office:value-type="float" office:value="0">
            <text:p>#N/D</text:p>
          </table:table-cell>
          <table:table-cell table:style-name="ce9" table:formula="of:=VLOOKUP([.C182];[Listado.$A$2:.$D$19];4;0)" office:value-type="float" office:value="0">
            <text:p>#N/D</text:p>
          </table:table-cell>
          <table:table-cell table:style-name="ce9" table:formula="of:=VLOOKUP([.D182];[Listado.$A$2:.$D$19];4;0)" office:value-type="float" office:value="0">
            <text:p>#N/D</text:p>
          </table:table-cell>
          <table:table-cell table:style-name="ce9" table:formula="of:=VLOOKUP([.E182];[Listado.$A$2:.$D$19];4;0)" office:value-type="float" office:value="0">
            <text:p>#N/D</text:p>
          </table:table-cell>
          <table:table-cell table:style-name="ce9" table:formula="of:=VLOOKUP([.H182];[Listado.$A$2:.$D$19];4;0)" office:value-type="float" office:value="0">
            <text:p>#N/D</text:p>
          </table:table-cell>
          <table:table-cell table:style-name="ce9" table:formula="of:=COUNTIF([.J182:.M182];[.N182])" office:value-type="float" office:value="0">
            <text:p>#N/D</text:p>
          </table:table-cell>
          <table:table-cell table:style-name="ce9" table:number-columns-repeated="1009"/>
        </table:table-row>
        <table:table-row table:style-name="ro4">
          <table:table-cell table:style-name="ce3" office:value-type="string">
            <text:p>Observa el número 7986. Indica cuál es la cifra de las UNIDADES DE MILLAR:</text:p>
          </table:table-cell>
          <table:table-cell table:style-name="ce6" office:value-type="string">
            <text:p>0</text:p>
          </table:table-cell>
          <table:table-cell table:style-name="ce6" office:value-type="string">
            <text:p>7</text:p>
          </table:table-cell>
          <table:table-cell table:style-name="ce6" office:value-type="string">
            <text:p>1</text:p>
          </table:table-cell>
          <table:table-cell table:style-name="ce6" office:value-type="string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3];0;[.F183])" office:value-type="string" office:string-value="7">
            <text:p>7</text:p>
          </table:table-cell>
          <table:table-cell/>
          <table:table-cell table:style-name="ce10" table:formula="of:=VLOOKUP([.B183];[Listado.$A$2:.$D$19];4;0)" office:value-type="float" office:value="0">
            <text:p>#N/D</text:p>
          </table:table-cell>
          <table:table-cell table:style-name="ce10" table:formula="of:=VLOOKUP([.C183];[Listado.$A$2:.$D$19];4;0)" office:value-type="float" office:value="0">
            <text:p>#N/D</text:p>
          </table:table-cell>
          <table:table-cell table:style-name="ce10" table:formula="of:=VLOOKUP([.D183];[Listado.$A$2:.$D$19];4;0)" office:value-type="float" office:value="0">
            <text:p>#N/D</text:p>
          </table:table-cell>
          <table:table-cell table:style-name="ce10" table:formula="of:=VLOOKUP([.E183];[Listado.$A$2:.$D$19];4;0)" office:value-type="float" office:value="0">
            <text:p>#N/D</text:p>
          </table:table-cell>
          <table:table-cell table:style-name="ce10" table:formula="of:=VLOOKUP([.H183];[Listado.$A$2:.$D$19];4;0)" office:value-type="float" office:value="0">
            <text:p>#N/D</text:p>
          </table:table-cell>
          <table:table-cell table:style-name="ce10" table:formula="of:=COUNTIF([.J183:.M183];[.N183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165. Indica cuál es la cifra de las UNIDADES DE MILLAR:</text:p>
          </table:table-cell>
          <table:table-cell table:style-name="ce6" office:value-type="string">
            <text:p>1</text:p>
          </table:table-cell>
          <table:table-cell table:style-name="ce6" office:value-type="string">
            <text:p>7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4];0;[.F184])" office:value-type="string" office:string-value="1">
            <text:p>1</text:p>
          </table:table-cell>
          <table:table-cell/>
          <table:table-cell table:style-name="ce10" table:formula="of:=VLOOKUP([.B184];[Listado.$A$2:.$D$19];4;0)" office:value-type="float" office:value="0">
            <text:p>#N/D</text:p>
          </table:table-cell>
          <table:table-cell table:style-name="ce10" table:formula="of:=VLOOKUP([.C184];[Listado.$A$2:.$D$19];4;0)" office:value-type="float" office:value="0">
            <text:p>#N/D</text:p>
          </table:table-cell>
          <table:table-cell table:style-name="ce10" table:formula="of:=VLOOKUP([.D184];[Listado.$A$2:.$D$19];4;0)" office:value-type="float" office:value="0">
            <text:p>#N/D</text:p>
          </table:table-cell>
          <table:table-cell table:style-name="ce10" table:formula="of:=VLOOKUP([.E184];[Listado.$A$2:.$D$19];4;0)" office:value-type="float" office:value="0">
            <text:p>#N/D</text:p>
          </table:table-cell>
          <table:table-cell table:style-name="ce10" table:formula="of:=VLOOKUP([.H184];[Listado.$A$2:.$D$19];4;0)" office:value-type="float" office:value="0">
            <text:p>#N/D</text:p>
          </table:table-cell>
          <table:table-cell table:style-name="ce10" table:formula="of:=COUNTIF([.J184:.M184];[.N184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8594. Indica cuál es la cifra de las UNIDADES DE MILLAR:</text:p>
          </table:table-cell>
          <table:table-cell table:style-name="ce6" office:value-type="string">
            <text:p>6</text:p>
          </table:table-cell>
          <table:table-cell table:style-name="ce6" office:value-type="string">
            <text:p>8</text:p>
          </table:table-cell>
          <table:table-cell table:style-name="ce6" office:value-type="string">
            <text:p>5</text:p>
          </table:table-cell>
          <table:table-cell table:style-name="ce6" office:value-type="string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5];0;[.F185])" office:value-type="string" office:string-value="8">
            <text:p>8</text:p>
          </table:table-cell>
          <table:table-cell/>
          <table:table-cell table:style-name="ce10" table:formula="of:=VLOOKUP([.B185];[Listado.$A$2:.$D$19];4;0)" office:value-type="float" office:value="0">
            <text:p>#N/D</text:p>
          </table:table-cell>
          <table:table-cell table:style-name="ce10" table:formula="of:=VLOOKUP([.C185];[Listado.$A$2:.$D$19];4;0)" office:value-type="float" office:value="0">
            <text:p>#N/D</text:p>
          </table:table-cell>
          <table:table-cell table:style-name="ce10" table:formula="of:=VLOOKUP([.D185];[Listado.$A$2:.$D$19];4;0)" office:value-type="float" office:value="0">
            <text:p>#N/D</text:p>
          </table:table-cell>
          <table:table-cell table:style-name="ce10" table:formula="of:=VLOOKUP([.E185];[Listado.$A$2:.$D$19];4;0)" office:value-type="float" office:value="0">
            <text:p>#N/D</text:p>
          </table:table-cell>
          <table:table-cell table:style-name="ce10" table:formula="of:=VLOOKUP([.H185];[Listado.$A$2:.$D$19];4;0)" office:value-type="float" office:value="0">
            <text:p>#N/D</text:p>
          </table:table-cell>
          <table:table-cell table:style-name="ce10" table:formula="of:=COUNTIF([.J185:.M185];[.N185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564. Indica cuál es la cifra de las UNIDADES DE MILLAR:</text:p>
          </table:table-cell>
          <table:table-cell table:style-name="ce6" office:value-type="string">
            <text:p>2</text:p>
          </table:table-cell>
          <table:table-cell table:style-name="ce6" office:value-type="string">
            <text:p>4</text:p>
          </table:table-cell>
          <table:table-cell table:style-name="ce6" office:value-type="string">
            <text:p>1</text:p>
          </table:table-cell>
          <table:table-cell table:style-name="ce6" office:value-type="string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6];0;[.F186])" office:value-type="string" office:string-value="1">
            <text:p>1</text:p>
          </table:table-cell>
          <table:table-cell/>
          <table:table-cell table:style-name="ce10" table:formula="of:=VLOOKUP([.B186];[Listado.$A$2:.$D$19];4;0)" office:value-type="float" office:value="0">
            <text:p>#N/D</text:p>
          </table:table-cell>
          <table:table-cell table:style-name="ce10" table:formula="of:=VLOOKUP([.C186];[Listado.$A$2:.$D$19];4;0)" office:value-type="float" office:value="0">
            <text:p>#N/D</text:p>
          </table:table-cell>
          <table:table-cell table:style-name="ce10" table:formula="of:=VLOOKUP([.D186];[Listado.$A$2:.$D$19];4;0)" office:value-type="float" office:value="0">
            <text:p>#N/D</text:p>
          </table:table-cell>
          <table:table-cell table:style-name="ce10" table:formula="of:=VLOOKUP([.E186];[Listado.$A$2:.$D$19];4;0)" office:value-type="float" office:value="0">
            <text:p>#N/D</text:p>
          </table:table-cell>
          <table:table-cell table:style-name="ce10" table:formula="of:=VLOOKUP([.H186];[Listado.$A$2:.$D$19];4;0)" office:value-type="float" office:value="0">
            <text:p>#N/D</text:p>
          </table:table-cell>
          <table:table-cell table:style-name="ce10" table:formula="of:=COUNTIF([.J186:.M186];[.N186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253. Indica cuál es la cifra de las UNIDADES DE MILLAR:</text:p>
          </table:table-cell>
          <table:table-cell table:style-name="ce6" office:value-type="string">
            <text:p>6</text:p>
          </table:table-cell>
          <table:table-cell table:style-name="ce6" office:value-type="string">
            <text:p>1</text:p>
          </table:table-cell>
          <table:table-cell table:style-name="ce6" office:value-type="string">
            <text:p>8</text:p>
          </table:table-cell>
          <table:table-cell table:style-name="ce6" office:value-type="string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7];0;[.F187])" office:value-type="string" office:string-value="1">
            <text:p>1</text:p>
          </table:table-cell>
          <table:table-cell/>
          <table:table-cell table:style-name="ce10" table:formula="of:=VLOOKUP([.B187];[Listado.$A$2:.$D$19];4;0)" office:value-type="float" office:value="0">
            <text:p>#N/D</text:p>
          </table:table-cell>
          <table:table-cell table:style-name="ce10" table:formula="of:=VLOOKUP([.C187];[Listado.$A$2:.$D$19];4;0)" office:value-type="float" office:value="0">
            <text:p>#N/D</text:p>
          </table:table-cell>
          <table:table-cell table:style-name="ce10" table:formula="of:=VLOOKUP([.D187];[Listado.$A$2:.$D$19];4;0)" office:value-type="float" office:value="0">
            <text:p>#N/D</text:p>
          </table:table-cell>
          <table:table-cell table:style-name="ce10" table:formula="of:=VLOOKUP([.E187];[Listado.$A$2:.$D$19];4;0)" office:value-type="float" office:value="0">
            <text:p>#N/D</text:p>
          </table:table-cell>
          <table:table-cell table:style-name="ce10" table:formula="of:=VLOOKUP([.H187];[Listado.$A$2:.$D$19];4;0)" office:value-type="float" office:value="0">
            <text:p>#N/D</text:p>
          </table:table-cell>
          <table:table-cell table:style-name="ce10" table:formula="of:=COUNTIF([.J187:.M187];[.N187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423. Indica cuál es la cifra de las UNIDADES DE MILLAR:</text:p>
          </table:table-cell>
          <table:table-cell table:style-name="ce6" office:value-type="string">
            <text:p>2</text:p>
          </table:table-cell>
          <table:table-cell table:style-name="ce6" office:value-type="string">
            <text:p>4</text:p>
          </table:table-cell>
          <table:table-cell table:style-name="ce6" office:value-type="string">
            <text:p>3</text:p>
          </table:table-cell>
          <table:table-cell table:style-name="ce6" office:value-type="string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8];0;[.F188])" office:value-type="string" office:string-value="1">
            <text:p>1</text:p>
          </table:table-cell>
          <table:table-cell/>
          <table:table-cell table:style-name="ce10" table:formula="of:=VLOOKUP([.B188];[Listado.$A$2:.$D$19];4;0)" office:value-type="float" office:value="0">
            <text:p>#N/D</text:p>
          </table:table-cell>
          <table:table-cell table:style-name="ce10" table:formula="of:=VLOOKUP([.C188];[Listado.$A$2:.$D$19];4;0)" office:value-type="float" office:value="0">
            <text:p>#N/D</text:p>
          </table:table-cell>
          <table:table-cell table:style-name="ce10" table:formula="of:=VLOOKUP([.D188];[Listado.$A$2:.$D$19];4;0)" office:value-type="float" office:value="0">
            <text:p>#N/D</text:p>
          </table:table-cell>
          <table:table-cell table:style-name="ce10" table:formula="of:=VLOOKUP([.E188];[Listado.$A$2:.$D$19];4;0)" office:value-type="float" office:value="0">
            <text:p>#N/D</text:p>
          </table:table-cell>
          <table:table-cell table:style-name="ce10" table:formula="of:=VLOOKUP([.H188];[Listado.$A$2:.$D$19];4;0)" office:value-type="float" office:value="0">
            <text:p>#N/D</text:p>
          </table:table-cell>
          <table:table-cell table:style-name="ce10" table:formula="of:=COUNTIF([.J188:.M188];[.N188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Observa el número 1784. Indica cuál es la cifra de las UNIDADES DE MILLAR:</text:p>
          </table:table-cell>
          <table:table-cell table:style-name="ce6" office:value-type="string">
            <text:p>5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6" office:value-type="string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 cifra de los millares es la cuarta de la parte entera contando desde la derecha.</text:p>
          </table:table-cell>
          <table:table-cell table:formula="of:=OFFSET([.A189];0;[.F189])" office:value-type="string" office:string-value="1">
            <text:p>1</text:p>
          </table:table-cell>
          <table:table-cell/>
          <table:table-cell table:style-name="ce10" table:formula="of:=VLOOKUP([.B189];[Listado.$A$2:.$D$19];4;0)" office:value-type="float" office:value="0">
            <text:p>#N/D</text:p>
          </table:table-cell>
          <table:table-cell table:style-name="ce10" table:formula="of:=VLOOKUP([.C189];[Listado.$A$2:.$D$19];4;0)" office:value-type="float" office:value="0">
            <text:p>#N/D</text:p>
          </table:table-cell>
          <table:table-cell table:style-name="ce10" table:formula="of:=VLOOKUP([.D189];[Listado.$A$2:.$D$19];4;0)" office:value-type="float" office:value="0">
            <text:p>#N/D</text:p>
          </table:table-cell>
          <table:table-cell table:style-name="ce10" table:formula="of:=VLOOKUP([.E189];[Listado.$A$2:.$D$19];4;0)" office:value-type="float" office:value="0">
            <text:p>#N/D</text:p>
          </table:table-cell>
          <table:table-cell table:style-name="ce10" table:formula="of:=VLOOKUP([.H189];[Listado.$A$2:.$D$19];4;0)" office:value-type="float" office:value="0">
            <text:p>#N/D</text:p>
          </table:table-cell>
          <table:table-cell table:style-name="ce10" table:formula="of:=COUNTIF([.J189:.M189];[.N189])" office:value-type="float" office:value="0">
            <text:p>#N/D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Observa el número 9705. Indica cuál es la cifra de las UNIDADES DE MILLAR: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5</text:p>
          </table:table-cell>
          <table:table-cell table:style-name="ce7" office:value-type="string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La cifra de los millares es la cuarta de la parte entera contando desde la derecha.</text:p>
          </table:table-cell>
          <table:table-cell table:style-name="ce9" table:formula="of:=OFFSET([.A190];0;[.F190])" office:value-type="string" office:string-value="9">
            <text:p>9</text:p>
          </table:table-cell>
          <table:table-cell table:style-name="ce9"/>
          <table:table-cell table:style-name="ce9" table:formula="of:=VLOOKUP([.B190];[Listado.$A$2:.$D$19];4;0)" office:value-type="float" office:value="0">
            <text:p>#N/D</text:p>
          </table:table-cell>
          <table:table-cell table:style-name="ce9" table:formula="of:=VLOOKUP([.C190];[Listado.$A$2:.$D$19];4;0)" office:value-type="float" office:value="0">
            <text:p>#N/D</text:p>
          </table:table-cell>
          <table:table-cell table:style-name="ce9" table:formula="of:=VLOOKUP([.D190];[Listado.$A$2:.$D$19];4;0)" office:value-type="float" office:value="0">
            <text:p>#N/D</text:p>
          </table:table-cell>
          <table:table-cell table:style-name="ce9" table:formula="of:=VLOOKUP([.E190];[Listado.$A$2:.$D$19];4;0)" office:value-type="float" office:value="0">
            <text:p>#N/D</text:p>
          </table:table-cell>
          <table:table-cell table:style-name="ce9" table:formula="of:=VLOOKUP([.H190];[Listado.$A$2:.$D$19];4;0)" office:value-type="float" office:value="0">
            <text:p>#N/D</text:p>
          </table:table-cell>
          <table:table-cell table:style-name="ce9" table:formula="of:=COUNTIF([.J190:.M190];[.N19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3"/>
          <table:table-cell table:number-columns-repeated="4" table:style-name="ce6"/>
          <table:table-cell table:number-columns-repeated="2" table:style-name="ce5"/>
          <table:table-cell table:formula="of:=OFFSET([.A191];0;[.F191])" office:value-type="float" office:value="0">
            <text:p>0</text:p>
          </table:table-cell>
          <table:table-cell/>
          <table:table-cell table:style-name="ce10" table:formula="of:=VLOOKUP([.B191];[Listado.$A$2:.$D$19];4;0)" office:value-type="float" office:value="0">
            <text:p>#N/D</text:p>
          </table:table-cell>
          <table:table-cell table:style-name="ce10" table:formula="of:=VLOOKUP([.C191];[Listado.$A$2:.$D$19];4;0)" office:value-type="float" office:value="0">
            <text:p>#N/D</text:p>
          </table:table-cell>
          <table:table-cell table:style-name="ce10" table:formula="of:=VLOOKUP([.D191];[Listado.$A$2:.$D$19];4;0)" office:value-type="float" office:value="0">
            <text:p>#N/D</text:p>
          </table:table-cell>
          <table:table-cell table:style-name="ce10" table:formula="of:=VLOOKUP([.E191];[Listado.$A$2:.$D$19];4;0)" office:value-type="float" office:value="0">
            <text:p>#N/D</text:p>
          </table:table-cell>
          <table:table-cell table:style-name="ce10" table:formula="of:=VLOOKUP([.H191];[Listado.$A$2:.$D$19];4;0)" office:value-type="float" office:value="0">
            <text:p>#N/D</text:p>
          </table:table-cell>
          <table:table-cell table:style-name="ce10" table:formula="of:=COUNTIF([.J191:.M191];[.N191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3"/>
          <table:table-cell table:number-columns-repeated="4" table:style-name="ce6"/>
          <table:table-cell table:number-columns-repeated="2" table:style-name="ce5"/>
          <table:table-cell table:formula="of:=OFFSET([.A192];0;[.F192])" office:value-type="float" office:value="0">
            <text:p>0</text:p>
          </table:table-cell>
          <table:table-cell/>
          <table:table-cell table:style-name="ce10" table:formula="of:=VLOOKUP([.B192];[Listado.$A$2:.$D$19];4;0)" office:value-type="float" office:value="0">
            <text:p>#N/D</text:p>
          </table:table-cell>
          <table:table-cell table:style-name="ce10" table:formula="of:=VLOOKUP([.C192];[Listado.$A$2:.$D$19];4;0)" office:value-type="float" office:value="0">
            <text:p>#N/D</text:p>
          </table:table-cell>
          <table:table-cell table:style-name="ce10" table:formula="of:=VLOOKUP([.D192];[Listado.$A$2:.$D$19];4;0)" office:value-type="float" office:value="0">
            <text:p>#N/D</text:p>
          </table:table-cell>
          <table:table-cell table:style-name="ce10" table:formula="of:=VLOOKUP([.E192];[Listado.$A$2:.$D$19];4;0)" office:value-type="float" office:value="0">
            <text:p>#N/D</text:p>
          </table:table-cell>
          <table:table-cell table:style-name="ce10" table:formula="of:=VLOOKUP([.H192];[Listado.$A$2:.$D$19];4;0)" office:value-type="float" office:value="0">
            <text:p>#N/D</text:p>
          </table:table-cell>
          <table:table-cell table:style-name="ce10" table:formula="of:=COUNTIF([.J192:.M192];[.N192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193];0;[.F193])" office:value-type="float" office:value="0">
            <text:p>0</text:p>
          </table:table-cell>
          <table:table-cell table:style-name="ce9"/>
          <table:table-cell table:style-name="ce9" table:formula="of:=VLOOKUP([.B193];[Listado.$A$2:.$D$19];4;0)" office:value-type="float" office:value="0">
            <text:p>#N/D</text:p>
          </table:table-cell>
          <table:table-cell table:style-name="ce9" table:formula="of:=VLOOKUP([.C193];[Listado.$A$2:.$D$19];4;0)" office:value-type="float" office:value="0">
            <text:p>#N/D</text:p>
          </table:table-cell>
          <table:table-cell table:style-name="ce9" table:formula="of:=VLOOKUP([.D193];[Listado.$A$2:.$D$19];4;0)" office:value-type="float" office:value="0">
            <text:p>#N/D</text:p>
          </table:table-cell>
          <table:table-cell table:style-name="ce9" table:formula="of:=VLOOKUP([.E193];[Listado.$A$2:.$D$19];4;0)" office:value-type="float" office:value="0">
            <text:p>#N/D</text:p>
          </table:table-cell>
          <table:table-cell table:style-name="ce9" table:formula="of:=VLOOKUP([.H193];[Listado.$A$2:.$D$19];4;0)" office:value-type="float" office:value="0">
            <text:p>#N/D</text:p>
          </table:table-cell>
          <table:table-cell table:style-name="ce9" table:formula="of:=COUNTIF([.J193:.M193];[.N19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194];0;[.F194])" office:value-type="float" office:value="0">
            <text:p>0</text:p>
          </table:table-cell>
          <table:table-cell table:style-name="ce9"/>
          <table:table-cell table:style-name="ce9" table:formula="of:=VLOOKUP([.B194];[Listado.$A$2:.$D$19];4;0)" office:value-type="float" office:value="0">
            <text:p>#N/D</text:p>
          </table:table-cell>
          <table:table-cell table:style-name="ce9" table:formula="of:=VLOOKUP([.C194];[Listado.$A$2:.$D$19];4;0)" office:value-type="float" office:value="0">
            <text:p>#N/D</text:p>
          </table:table-cell>
          <table:table-cell table:style-name="ce9" table:formula="of:=VLOOKUP([.D194];[Listado.$A$2:.$D$19];4;0)" office:value-type="float" office:value="0">
            <text:p>#N/D</text:p>
          </table:table-cell>
          <table:table-cell table:style-name="ce9" table:formula="of:=VLOOKUP([.E194];[Listado.$A$2:.$D$19];4;0)" office:value-type="float" office:value="0">
            <text:p>#N/D</text:p>
          </table:table-cell>
          <table:table-cell table:style-name="ce9" table:formula="of:=VLOOKUP([.H194];[Listado.$A$2:.$D$19];4;0)" office:value-type="float" office:value="0">
            <text:p>#N/D</text:p>
          </table:table-cell>
          <table:table-cell table:style-name="ce9" table:formula="of:=COUNTIF([.J194:.M194];[.N19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3"/>
          <table:table-cell table:number-columns-repeated="4" table:style-name="ce6"/>
          <table:table-cell table:number-columns-repeated="2" table:style-name="ce5"/>
          <table:table-cell table:formula="of:=OFFSET([.A195];0;[.F195])" office:value-type="float" office:value="0">
            <text:p>0</text:p>
          </table:table-cell>
          <table:table-cell/>
          <table:table-cell table:style-name="ce10" table:formula="of:=VLOOKUP([.B195];[Listado.$A$2:.$D$19];4;0)" office:value-type="float" office:value="0">
            <text:p>#N/D</text:p>
          </table:table-cell>
          <table:table-cell table:style-name="ce10" table:formula="of:=VLOOKUP([.C195];[Listado.$A$2:.$D$19];4;0)" office:value-type="float" office:value="0">
            <text:p>#N/D</text:p>
          </table:table-cell>
          <table:table-cell table:style-name="ce10" table:formula="of:=VLOOKUP([.D195];[Listado.$A$2:.$D$19];4;0)" office:value-type="float" office:value="0">
            <text:p>#N/D</text:p>
          </table:table-cell>
          <table:table-cell table:style-name="ce10" table:formula="of:=VLOOKUP([.E195];[Listado.$A$2:.$D$19];4;0)" office:value-type="float" office:value="0">
            <text:p>#N/D</text:p>
          </table:table-cell>
          <table:table-cell table:style-name="ce10" table:formula="of:=VLOOKUP([.H195];[Listado.$A$2:.$D$19];4;0)" office:value-type="float" office:value="0">
            <text:p>#N/D</text:p>
          </table:table-cell>
          <table:table-cell table:style-name="ce10" table:formula="of:=COUNTIF([.J195:.M195];[.N195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3"/>
          <table:table-cell table:number-columns-repeated="4" table:style-name="ce6"/>
          <table:table-cell table:number-columns-repeated="2" table:style-name="ce5"/>
          <table:table-cell table:formula="of:=OFFSET([.A196];0;[.F196])" office:value-type="float" office:value="0">
            <text:p>0</text:p>
          </table:table-cell>
          <table:table-cell/>
          <table:table-cell table:style-name="ce10" table:formula="of:=VLOOKUP([.B196];[Listado.$A$2:.$D$19];4;0)" office:value-type="float" office:value="0">
            <text:p>#N/D</text:p>
          </table:table-cell>
          <table:table-cell table:style-name="ce10" table:formula="of:=VLOOKUP([.C196];[Listado.$A$2:.$D$19];4;0)" office:value-type="float" office:value="0">
            <text:p>#N/D</text:p>
          </table:table-cell>
          <table:table-cell table:style-name="ce10" table:formula="of:=VLOOKUP([.D196];[Listado.$A$2:.$D$19];4;0)" office:value-type="float" office:value="0">
            <text:p>#N/D</text:p>
          </table:table-cell>
          <table:table-cell table:style-name="ce10" table:formula="of:=VLOOKUP([.E196];[Listado.$A$2:.$D$19];4;0)" office:value-type="float" office:value="0">
            <text:p>#N/D</text:p>
          </table:table-cell>
          <table:table-cell table:style-name="ce10" table:formula="of:=VLOOKUP([.H196];[Listado.$A$2:.$D$19];4;0)" office:value-type="float" office:value="0">
            <text:p>#N/D</text:p>
          </table:table-cell>
          <table:table-cell table:style-name="ce10" table:formula="of:=COUNTIF([.J196:.M196];[.N196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5"/>
          <table:table-cell table:number-columns-repeated="4" table:style-name="ce6"/>
          <table:table-cell table:number-columns-repeated="2" table:style-name="ce5"/>
          <table:table-cell table:formula="of:=OFFSET([.A197];0;[.F197])" office:value-type="float" office:value="0">
            <text:p>0</text:p>
          </table:table-cell>
          <table:table-cell/>
          <table:table-cell table:style-name="ce10" table:formula="of:=VLOOKUP([.B197];[Listado.$A$2:.$D$19];4;0)" office:value-type="float" office:value="0">
            <text:p>#N/D</text:p>
          </table:table-cell>
          <table:table-cell table:style-name="ce10" table:formula="of:=VLOOKUP([.C197];[Listado.$A$2:.$D$19];4;0)" office:value-type="float" office:value="0">
            <text:p>#N/D</text:p>
          </table:table-cell>
          <table:table-cell table:style-name="ce10" table:formula="of:=VLOOKUP([.D197];[Listado.$A$2:.$D$19];4;0)" office:value-type="float" office:value="0">
            <text:p>#N/D</text:p>
          </table:table-cell>
          <table:table-cell table:style-name="ce10" table:formula="of:=VLOOKUP([.E197];[Listado.$A$2:.$D$19];4;0)" office:value-type="float" office:value="0">
            <text:p>#N/D</text:p>
          </table:table-cell>
          <table:table-cell table:style-name="ce10" table:formula="of:=VLOOKUP([.H197];[Listado.$A$2:.$D$19];4;0)" office:value-type="float" office:value="0">
            <text:p>#N/D</text:p>
          </table:table-cell>
          <table:table-cell table:style-name="ce10" table:formula="of:=COUNTIF([.J197:.M197];[.N197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4"/>
          <table:table-cell table:number-columns-repeated="4" table:style-name="ce6"/>
          <table:table-cell table:number-columns-repeated="2" table:style-name="ce5"/>
          <table:table-cell table:formula="of:=OFFSET([.A198];0;[.F198])" office:value-type="float" office:value="0">
            <text:p>0</text:p>
          </table:table-cell>
          <table:table-cell/>
          <table:table-cell table:style-name="ce10" table:formula="of:=VLOOKUP([.B198];[Listado.$A$2:.$D$19];4;0)" office:value-type="float" office:value="0">
            <text:p>#N/D</text:p>
          </table:table-cell>
          <table:table-cell table:style-name="ce10" table:formula="of:=VLOOKUP([.C198];[Listado.$A$2:.$D$19];4;0)" office:value-type="float" office:value="0">
            <text:p>#N/D</text:p>
          </table:table-cell>
          <table:table-cell table:style-name="ce10" table:formula="of:=VLOOKUP([.D198];[Listado.$A$2:.$D$19];4;0)" office:value-type="float" office:value="0">
            <text:p>#N/D</text:p>
          </table:table-cell>
          <table:table-cell table:style-name="ce10" table:formula="of:=VLOOKUP([.E198];[Listado.$A$2:.$D$19];4;0)" office:value-type="float" office:value="0">
            <text:p>#N/D</text:p>
          </table:table-cell>
          <table:table-cell table:style-name="ce10" table:formula="of:=VLOOKUP([.H198];[Listado.$A$2:.$D$19];4;0)" office:value-type="float" office:value="0">
            <text:p>#N/D</text:p>
          </table:table-cell>
          <table:table-cell table:style-name="ce10" table:formula="of:=COUNTIF([.J198:.M198];[.N198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4"/>
          <table:table-cell table:number-columns-repeated="4" table:style-name="ce6"/>
          <table:table-cell table:number-columns-repeated="2" table:style-name="ce5"/>
          <table:table-cell table:formula="of:=OFFSET([.A199];0;[.F199])" office:value-type="float" office:value="0">
            <text:p>0</text:p>
          </table:table-cell>
          <table:table-cell/>
          <table:table-cell table:style-name="ce10" table:formula="of:=VLOOKUP([.B199];[Listado.$A$2:.$D$19];4;0)" office:value-type="float" office:value="0">
            <text:p>#N/D</text:p>
          </table:table-cell>
          <table:table-cell table:style-name="ce10" table:formula="of:=VLOOKUP([.C199];[Listado.$A$2:.$D$19];4;0)" office:value-type="float" office:value="0">
            <text:p>#N/D</text:p>
          </table:table-cell>
          <table:table-cell table:style-name="ce10" table:formula="of:=VLOOKUP([.D199];[Listado.$A$2:.$D$19];4;0)" office:value-type="float" office:value="0">
            <text:p>#N/D</text:p>
          </table:table-cell>
          <table:table-cell table:style-name="ce10" table:formula="of:=VLOOKUP([.E199];[Listado.$A$2:.$D$19];4;0)" office:value-type="float" office:value="0">
            <text:p>#N/D</text:p>
          </table:table-cell>
          <table:table-cell table:style-name="ce10" table:formula="of:=VLOOKUP([.H199];[Listado.$A$2:.$D$19];4;0)" office:value-type="float" office:value="0">
            <text:p>#N/D</text:p>
          </table:table-cell>
          <table:table-cell table:style-name="ce10" table:formula="of:=COUNTIF([.J199:.M199];[.N199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0];0;[.F200])" office:value-type="float" office:value="0">
            <text:p>0</text:p>
          </table:table-cell>
          <table:table-cell table:style-name="ce9"/>
          <table:table-cell table:style-name="ce9" table:formula="of:=VLOOKUP([.B200];[Listado.$A$2:.$D$19];4;0)" office:value-type="float" office:value="0">
            <text:p>#N/D</text:p>
          </table:table-cell>
          <table:table-cell table:style-name="ce9" table:formula="of:=VLOOKUP([.C200];[Listado.$A$2:.$D$19];4;0)" office:value-type="float" office:value="0">
            <text:p>#N/D</text:p>
          </table:table-cell>
          <table:table-cell table:style-name="ce9" table:formula="of:=VLOOKUP([.D200];[Listado.$A$2:.$D$19];4;0)" office:value-type="float" office:value="0">
            <text:p>#N/D</text:p>
          </table:table-cell>
          <table:table-cell table:style-name="ce9" table:formula="of:=VLOOKUP([.E200];[Listado.$A$2:.$D$19];4;0)" office:value-type="float" office:value="0">
            <text:p>#N/D</text:p>
          </table:table-cell>
          <table:table-cell table:style-name="ce9" table:formula="of:=VLOOKUP([.H200];[Listado.$A$2:.$D$19];4;0)" office:value-type="float" office:value="0">
            <text:p>#N/D</text:p>
          </table:table-cell>
          <table:table-cell table:style-name="ce9" table:formula="of:=COUNTIF([.J200:.M200];[.N200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1];0;[.F201])" office:value-type="float" office:value="0">
            <text:p>0</text:p>
          </table:table-cell>
          <table:table-cell table:style-name="ce9"/>
          <table:table-cell table:style-name="ce9" table:formula="of:=VLOOKUP([.B201];[Listado.$A$2:.$D$19];4;0)" office:value-type="float" office:value="0">
            <text:p>#N/D</text:p>
          </table:table-cell>
          <table:table-cell table:style-name="ce9" table:formula="of:=VLOOKUP([.C201];[Listado.$A$2:.$D$19];4;0)" office:value-type="float" office:value="0">
            <text:p>#N/D</text:p>
          </table:table-cell>
          <table:table-cell table:style-name="ce9" table:formula="of:=VLOOKUP([.D201];[Listado.$A$2:.$D$19];4;0)" office:value-type="float" office:value="0">
            <text:p>#N/D</text:p>
          </table:table-cell>
          <table:table-cell table:style-name="ce9" table:formula="of:=VLOOKUP([.E201];[Listado.$A$2:.$D$19];4;0)" office:value-type="float" office:value="0">
            <text:p>#N/D</text:p>
          </table:table-cell>
          <table:table-cell table:style-name="ce9" table:formula="of:=VLOOKUP([.H201];[Listado.$A$2:.$D$19];4;0)" office:value-type="float" office:value="0">
            <text:p>#N/D</text:p>
          </table:table-cell>
          <table:table-cell table:style-name="ce9" table:formula="of:=COUNTIF([.J201:.M201];[.N20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2];0;[.F202])" office:value-type="float" office:value="0">
            <text:p>0</text:p>
          </table:table-cell>
          <table:table-cell table:style-name="ce9"/>
          <table:table-cell table:style-name="ce9" table:formula="of:=VLOOKUP([.B202];[Listado.$A$2:.$D$19];4;0)" office:value-type="float" office:value="0">
            <text:p>#N/D</text:p>
          </table:table-cell>
          <table:table-cell table:style-name="ce9" table:formula="of:=VLOOKUP([.C202];[Listado.$A$2:.$D$19];4;0)" office:value-type="float" office:value="0">
            <text:p>#N/D</text:p>
          </table:table-cell>
          <table:table-cell table:style-name="ce9" table:formula="of:=VLOOKUP([.D202];[Listado.$A$2:.$D$19];4;0)" office:value-type="float" office:value="0">
            <text:p>#N/D</text:p>
          </table:table-cell>
          <table:table-cell table:style-name="ce9" table:formula="of:=VLOOKUP([.E202];[Listado.$A$2:.$D$19];4;0)" office:value-type="float" office:value="0">
            <text:p>#N/D</text:p>
          </table:table-cell>
          <table:table-cell table:style-name="ce9" table:formula="of:=VLOOKUP([.H202];[Listado.$A$2:.$D$19];4;0)" office:value-type="float" office:value="0">
            <text:p>#N/D</text:p>
          </table:table-cell>
          <table:table-cell table:style-name="ce9" table:formula="of:=COUNTIF([.J202:.M202];[.N20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3];0;[.F203])" office:value-type="float" office:value="0">
            <text:p>0</text:p>
          </table:table-cell>
          <table:table-cell table:style-name="ce9"/>
          <table:table-cell table:style-name="ce11" table:formula="of:=VLOOKUP([.B203];[Listado.$A$2:.$D$19];4;0)" office:value-type="float" office:value="0">
            <text:p>#N/D</text:p>
          </table:table-cell>
          <table:table-cell table:style-name="ce11" table:formula="of:=VLOOKUP([.C203];[Listado.$A$2:.$D$19];4;0)" office:value-type="float" office:value="0">
            <text:p>#N/D</text:p>
          </table:table-cell>
          <table:table-cell table:style-name="ce11" table:formula="of:=VLOOKUP([.D203];[Listado.$A$2:.$D$19];4;0)" office:value-type="float" office:value="0">
            <text:p>#N/D</text:p>
          </table:table-cell>
          <table:table-cell table:style-name="ce11" table:formula="of:=VLOOKUP([.E203];[Listado.$A$2:.$D$19];4;0)" office:value-type="float" office:value="0">
            <text:p>#N/D</text:p>
          </table:table-cell>
          <table:table-cell table:style-name="ce11" table:formula="of:=VLOOKUP([.H203];[Listado.$A$2:.$D$19];4;0)" office:value-type="float" office:value="0">
            <text:p>#N/D</text:p>
          </table:table-cell>
          <table:table-cell table:style-name="ce11" table:formula="of:=COUNTIF([.J203:.M203];[.N203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4];0;[.F204])" office:value-type="float" office:value="0">
            <text:p>0</text:p>
          </table:table-cell>
          <table:table-cell table:style-name="ce9"/>
          <table:table-cell table:style-name="ce11" table:formula="of:=VLOOKUP([.B204];[Listado.$A$2:.$D$19];4;0)" office:value-type="float" office:value="0">
            <text:p>#N/D</text:p>
          </table:table-cell>
          <table:table-cell table:style-name="ce11" table:formula="of:=VLOOKUP([.C204];[Listado.$A$2:.$D$19];4;0)" office:value-type="float" office:value="0">
            <text:p>#N/D</text:p>
          </table:table-cell>
          <table:table-cell table:style-name="ce11" table:formula="of:=VLOOKUP([.D204];[Listado.$A$2:.$D$19];4;0)" office:value-type="float" office:value="0">
            <text:p>#N/D</text:p>
          </table:table-cell>
          <table:table-cell table:style-name="ce11" table:formula="of:=VLOOKUP([.E204];[Listado.$A$2:.$D$19];4;0)" office:value-type="float" office:value="0">
            <text:p>#N/D</text:p>
          </table:table-cell>
          <table:table-cell table:style-name="ce11" table:formula="of:=VLOOKUP([.H204];[Listado.$A$2:.$D$19];4;0)" office:value-type="float" office:value="0">
            <text:p>#N/D</text:p>
          </table:table-cell>
          <table:table-cell table:style-name="ce11" table:formula="of:=COUNTIF([.J204:.M204];[.N20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5];0;[.F205])" office:value-type="float" office:value="0">
            <text:p>0</text:p>
          </table:table-cell>
          <table:table-cell table:style-name="ce9"/>
          <table:table-cell table:style-name="ce11" table:formula="of:=VLOOKUP([.B205];[Listado.$A$2:.$D$19];4;0)" office:value-type="float" office:value="0">
            <text:p>#N/D</text:p>
          </table:table-cell>
          <table:table-cell table:style-name="ce11" table:formula="of:=VLOOKUP([.C205];[Listado.$A$2:.$D$19];4;0)" office:value-type="float" office:value="0">
            <text:p>#N/D</text:p>
          </table:table-cell>
          <table:table-cell table:style-name="ce11" table:formula="of:=VLOOKUP([.D205];[Listado.$A$2:.$D$19];4;0)" office:value-type="float" office:value="0">
            <text:p>#N/D</text:p>
          </table:table-cell>
          <table:table-cell table:style-name="ce11" table:formula="of:=VLOOKUP([.E205];[Listado.$A$2:.$D$19];4;0)" office:value-type="float" office:value="0">
            <text:p>#N/D</text:p>
          </table:table-cell>
          <table:table-cell table:style-name="ce11" table:formula="of:=VLOOKUP([.H205];[Listado.$A$2:.$D$19];4;0)" office:value-type="float" office:value="0">
            <text:p>#N/D</text:p>
          </table:table-cell>
          <table:table-cell table:style-name="ce11" table:formula="of:=COUNTIF([.J205:.M205];[.N20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6];0;[.F206])" office:value-type="float" office:value="0">
            <text:p>0</text:p>
          </table:table-cell>
          <table:table-cell table:style-name="ce9"/>
          <table:table-cell table:style-name="ce11" table:formula="of:=VLOOKUP([.B206];[Listado.$A$2:.$D$19];4;0)" office:value-type="float" office:value="0">
            <text:p>#N/D</text:p>
          </table:table-cell>
          <table:table-cell table:style-name="ce11" table:formula="of:=VLOOKUP([.C206];[Listado.$A$2:.$D$19];4;0)" office:value-type="float" office:value="0">
            <text:p>#N/D</text:p>
          </table:table-cell>
          <table:table-cell table:style-name="ce11" table:formula="of:=VLOOKUP([.D206];[Listado.$A$2:.$D$19];4;0)" office:value-type="float" office:value="0">
            <text:p>#N/D</text:p>
          </table:table-cell>
          <table:table-cell table:style-name="ce11" table:formula="of:=VLOOKUP([.E206];[Listado.$A$2:.$D$19];4;0)" office:value-type="float" office:value="0">
            <text:p>#N/D</text:p>
          </table:table-cell>
          <table:table-cell table:style-name="ce11" table:formula="of:=VLOOKUP([.H206];[Listado.$A$2:.$D$19];4;0)" office:value-type="float" office:value="0">
            <text:p>#N/D</text:p>
          </table:table-cell>
          <table:table-cell table:style-name="ce11" table:formula="of:=COUNTIF([.J206:.M206];[.N20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7];0;[.F207])" office:value-type="float" office:value="0">
            <text:p>0</text:p>
          </table:table-cell>
          <table:table-cell table:style-name="ce9"/>
          <table:table-cell table:style-name="ce11" table:formula="of:=VLOOKUP([.B207];[Listado.$A$2:.$D$19];4;0)" office:value-type="float" office:value="0">
            <text:p>#N/D</text:p>
          </table:table-cell>
          <table:table-cell table:style-name="ce11" table:formula="of:=VLOOKUP([.C207];[Listado.$A$2:.$D$19];4;0)" office:value-type="float" office:value="0">
            <text:p>#N/D</text:p>
          </table:table-cell>
          <table:table-cell table:style-name="ce11" table:formula="of:=VLOOKUP([.D207];[Listado.$A$2:.$D$19];4;0)" office:value-type="float" office:value="0">
            <text:p>#N/D</text:p>
          </table:table-cell>
          <table:table-cell table:style-name="ce11" table:formula="of:=VLOOKUP([.E207];[Listado.$A$2:.$D$19];4;0)" office:value-type="float" office:value="0">
            <text:p>#N/D</text:p>
          </table:table-cell>
          <table:table-cell table:style-name="ce11" table:formula="of:=VLOOKUP([.H207];[Listado.$A$2:.$D$19];4;0)" office:value-type="float" office:value="0">
            <text:p>#N/D</text:p>
          </table:table-cell>
          <table:table-cell table:style-name="ce11" table:formula="of:=COUNTIF([.J207:.M207];[.N20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8];0;[.F208])" office:value-type="float" office:value="0">
            <text:p>0</text:p>
          </table:table-cell>
          <table:table-cell table:style-name="ce9"/>
          <table:table-cell table:style-name="ce11" table:formula="of:=VLOOKUP([.B208];[Listado.$A$2:.$D$19];4;0)" office:value-type="float" office:value="0">
            <text:p>#N/D</text:p>
          </table:table-cell>
          <table:table-cell table:style-name="ce11" table:formula="of:=VLOOKUP([.C208];[Listado.$A$2:.$D$19];4;0)" office:value-type="float" office:value="0">
            <text:p>#N/D</text:p>
          </table:table-cell>
          <table:table-cell table:style-name="ce11" table:formula="of:=VLOOKUP([.D208];[Listado.$A$2:.$D$19];4;0)" office:value-type="float" office:value="0">
            <text:p>#N/D</text:p>
          </table:table-cell>
          <table:table-cell table:style-name="ce11" table:formula="of:=VLOOKUP([.E208];[Listado.$A$2:.$D$19];4;0)" office:value-type="float" office:value="0">
            <text:p>#N/D</text:p>
          </table:table-cell>
          <table:table-cell table:style-name="ce11" table:formula="of:=VLOOKUP([.H208];[Listado.$A$2:.$D$19];4;0)" office:value-type="float" office:value="0">
            <text:p>#N/D</text:p>
          </table:table-cell>
          <table:table-cell table:style-name="ce11" table:formula="of:=COUNTIF([.J208:.M208];[.N20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09];0;[.F209])" office:value-type="float" office:value="0">
            <text:p>0</text:p>
          </table:table-cell>
          <table:table-cell table:style-name="ce9"/>
          <table:table-cell table:style-name="ce11" table:formula="of:=VLOOKUP([.B209];[Listado.$A$2:.$D$19];4;0)" office:value-type="float" office:value="0">
            <text:p>#N/D</text:p>
          </table:table-cell>
          <table:table-cell table:style-name="ce11" table:formula="of:=VLOOKUP([.C209];[Listado.$A$2:.$D$19];4;0)" office:value-type="float" office:value="0">
            <text:p>#N/D</text:p>
          </table:table-cell>
          <table:table-cell table:style-name="ce11" table:formula="of:=VLOOKUP([.D209];[Listado.$A$2:.$D$19];4;0)" office:value-type="float" office:value="0">
            <text:p>#N/D</text:p>
          </table:table-cell>
          <table:table-cell table:style-name="ce11" table:formula="of:=VLOOKUP([.E209];[Listado.$A$2:.$D$19];4;0)" office:value-type="float" office:value="0">
            <text:p>#N/D</text:p>
          </table:table-cell>
          <table:table-cell table:style-name="ce11" table:formula="of:=VLOOKUP([.H209];[Listado.$A$2:.$D$19];4;0)" office:value-type="float" office:value="0">
            <text:p>#N/D</text:p>
          </table:table-cell>
          <table:table-cell table:style-name="ce11" table:formula="of:=COUNTIF([.J209:.M209];[.N20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0];0;[.F210])" office:value-type="float" office:value="0">
            <text:p>0</text:p>
          </table:table-cell>
          <table:table-cell table:style-name="ce9"/>
          <table:table-cell table:style-name="ce11" table:formula="of:=VLOOKUP([.B210];[Listado.$A$2:.$D$19];4;0)" office:value-type="float" office:value="0">
            <text:p>#N/D</text:p>
          </table:table-cell>
          <table:table-cell table:style-name="ce11" table:formula="of:=VLOOKUP([.C210];[Listado.$A$2:.$D$19];4;0)" office:value-type="float" office:value="0">
            <text:p>#N/D</text:p>
          </table:table-cell>
          <table:table-cell table:style-name="ce11" table:formula="of:=VLOOKUP([.D210];[Listado.$A$2:.$D$19];4;0)" office:value-type="float" office:value="0">
            <text:p>#N/D</text:p>
          </table:table-cell>
          <table:table-cell table:style-name="ce11" table:formula="of:=VLOOKUP([.E210];[Listado.$A$2:.$D$19];4;0)" office:value-type="float" office:value="0">
            <text:p>#N/D</text:p>
          </table:table-cell>
          <table:table-cell table:style-name="ce11" table:formula="of:=VLOOKUP([.H210];[Listado.$A$2:.$D$19];4;0)" office:value-type="float" office:value="0">
            <text:p>#N/D</text:p>
          </table:table-cell>
          <table:table-cell table:style-name="ce11" table:formula="of:=COUNTIF([.J210:.M210];[.N21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1];0;[.F211])" office:value-type="float" office:value="0">
            <text:p>0</text:p>
          </table:table-cell>
          <table:table-cell table:style-name="ce9"/>
          <table:table-cell table:style-name="ce11" table:formula="of:=VLOOKUP([.B211];[Listado.$A$2:.$D$19];4;0)" office:value-type="float" office:value="0">
            <text:p>#N/D</text:p>
          </table:table-cell>
          <table:table-cell table:style-name="ce11" table:formula="of:=VLOOKUP([.C211];[Listado.$A$2:.$D$19];4;0)" office:value-type="float" office:value="0">
            <text:p>#N/D</text:p>
          </table:table-cell>
          <table:table-cell table:style-name="ce11" table:formula="of:=VLOOKUP([.D211];[Listado.$A$2:.$D$19];4;0)" office:value-type="float" office:value="0">
            <text:p>#N/D</text:p>
          </table:table-cell>
          <table:table-cell table:style-name="ce11" table:formula="of:=VLOOKUP([.E211];[Listado.$A$2:.$D$19];4;0)" office:value-type="float" office:value="0">
            <text:p>#N/D</text:p>
          </table:table-cell>
          <table:table-cell table:style-name="ce11" table:formula="of:=VLOOKUP([.H211];[Listado.$A$2:.$D$19];4;0)" office:value-type="float" office:value="0">
            <text:p>#N/D</text:p>
          </table:table-cell>
          <table:table-cell table:style-name="ce11" table:formula="of:=COUNTIF([.J211:.M211];[.N21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2];0;[.F212])" office:value-type="float" office:value="0">
            <text:p>0</text:p>
          </table:table-cell>
          <table:table-cell table:style-name="ce9"/>
          <table:table-cell table:style-name="ce11" table:formula="of:=VLOOKUP([.B212];[Listado.$A$2:.$D$19];4;0)" office:value-type="float" office:value="0">
            <text:p>#N/D</text:p>
          </table:table-cell>
          <table:table-cell table:style-name="ce11" table:formula="of:=VLOOKUP([.C212];[Listado.$A$2:.$D$19];4;0)" office:value-type="float" office:value="0">
            <text:p>#N/D</text:p>
          </table:table-cell>
          <table:table-cell table:style-name="ce11" table:formula="of:=VLOOKUP([.D212];[Listado.$A$2:.$D$19];4;0)" office:value-type="float" office:value="0">
            <text:p>#N/D</text:p>
          </table:table-cell>
          <table:table-cell table:style-name="ce11" table:formula="of:=VLOOKUP([.E212];[Listado.$A$2:.$D$19];4;0)" office:value-type="float" office:value="0">
            <text:p>#N/D</text:p>
          </table:table-cell>
          <table:table-cell table:style-name="ce11" table:formula="of:=VLOOKUP([.H212];[Listado.$A$2:.$D$19];4;0)" office:value-type="float" office:value="0">
            <text:p>#N/D</text:p>
          </table:table-cell>
          <table:table-cell table:style-name="ce11" table:formula="of:=COUNTIF([.J212:.M212];[.N21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3];0;[.F213])" office:value-type="float" office:value="0">
            <text:p>0</text:p>
          </table:table-cell>
          <table:table-cell table:style-name="ce9"/>
          <table:table-cell table:style-name="ce11" table:formula="of:=VLOOKUP([.B213];[Listado.$A$2:.$D$19];4;0)" office:value-type="float" office:value="0">
            <text:p>#N/D</text:p>
          </table:table-cell>
          <table:table-cell table:style-name="ce11" table:formula="of:=VLOOKUP([.C213];[Listado.$A$2:.$D$19];4;0)" office:value-type="float" office:value="0">
            <text:p>#N/D</text:p>
          </table:table-cell>
          <table:table-cell table:style-name="ce11" table:formula="of:=VLOOKUP([.D213];[Listado.$A$2:.$D$19];4;0)" office:value-type="float" office:value="0">
            <text:p>#N/D</text:p>
          </table:table-cell>
          <table:table-cell table:style-name="ce11" table:formula="of:=VLOOKUP([.E213];[Listado.$A$2:.$D$19];4;0)" office:value-type="float" office:value="0">
            <text:p>#N/D</text:p>
          </table:table-cell>
          <table:table-cell table:style-name="ce11" table:formula="of:=VLOOKUP([.H213];[Listado.$A$2:.$D$19];4;0)" office:value-type="float" office:value="0">
            <text:p>#N/D</text:p>
          </table:table-cell>
          <table:table-cell table:style-name="ce11" table:formula="of:=COUNTIF([.J213:.M213];[.N21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4];0;[.F214])" office:value-type="float" office:value="0">
            <text:p>0</text:p>
          </table:table-cell>
          <table:table-cell table:style-name="ce9"/>
          <table:table-cell table:style-name="ce11" table:formula="of:=VLOOKUP([.B214];[Listado.$A$2:.$D$19];4;0)" office:value-type="float" office:value="0">
            <text:p>#N/D</text:p>
          </table:table-cell>
          <table:table-cell table:style-name="ce11" table:formula="of:=VLOOKUP([.C214];[Listado.$A$2:.$D$19];4;0)" office:value-type="float" office:value="0">
            <text:p>#N/D</text:p>
          </table:table-cell>
          <table:table-cell table:style-name="ce11" table:formula="of:=VLOOKUP([.D214];[Listado.$A$2:.$D$19];4;0)" office:value-type="float" office:value="0">
            <text:p>#N/D</text:p>
          </table:table-cell>
          <table:table-cell table:style-name="ce11" table:formula="of:=VLOOKUP([.E214];[Listado.$A$2:.$D$19];4;0)" office:value-type="float" office:value="0">
            <text:p>#N/D</text:p>
          </table:table-cell>
          <table:table-cell table:style-name="ce11" table:formula="of:=VLOOKUP([.H214];[Listado.$A$2:.$D$19];4;0)" office:value-type="float" office:value="0">
            <text:p>#N/D</text:p>
          </table:table-cell>
          <table:table-cell table:style-name="ce11" table:formula="of:=COUNTIF([.J214:.M214];[.N21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5];0;[.F215])" office:value-type="float" office:value="0">
            <text:p>0</text:p>
          </table:table-cell>
          <table:table-cell table:style-name="ce9"/>
          <table:table-cell table:style-name="ce11" table:formula="of:=VLOOKUP([.B215];[Listado.$A$2:.$D$19];4;0)" office:value-type="float" office:value="0">
            <text:p>#N/D</text:p>
          </table:table-cell>
          <table:table-cell table:style-name="ce11" table:formula="of:=VLOOKUP([.C215];[Listado.$A$2:.$D$19];4;0)" office:value-type="float" office:value="0">
            <text:p>#N/D</text:p>
          </table:table-cell>
          <table:table-cell table:style-name="ce11" table:formula="of:=VLOOKUP([.D215];[Listado.$A$2:.$D$19];4;0)" office:value-type="float" office:value="0">
            <text:p>#N/D</text:p>
          </table:table-cell>
          <table:table-cell table:style-name="ce11" table:formula="of:=VLOOKUP([.E215];[Listado.$A$2:.$D$19];4;0)" office:value-type="float" office:value="0">
            <text:p>#N/D</text:p>
          </table:table-cell>
          <table:table-cell table:style-name="ce11" table:formula="of:=VLOOKUP([.H215];[Listado.$A$2:.$D$19];4;0)" office:value-type="float" office:value="0">
            <text:p>#N/D</text:p>
          </table:table-cell>
          <table:table-cell table:style-name="ce11" table:formula="of:=COUNTIF([.J215:.M215];[.N21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6];0;[.F216])" office:value-type="float" office:value="0">
            <text:p>0</text:p>
          </table:table-cell>
          <table:table-cell table:style-name="ce9"/>
          <table:table-cell table:style-name="ce11" table:formula="of:=VLOOKUP([.B216];[Listado.$A$2:.$D$19];4;0)" office:value-type="float" office:value="0">
            <text:p>#N/D</text:p>
          </table:table-cell>
          <table:table-cell table:style-name="ce11" table:formula="of:=VLOOKUP([.C216];[Listado.$A$2:.$D$19];4;0)" office:value-type="float" office:value="0">
            <text:p>#N/D</text:p>
          </table:table-cell>
          <table:table-cell table:style-name="ce11" table:formula="of:=VLOOKUP([.D216];[Listado.$A$2:.$D$19];4;0)" office:value-type="float" office:value="0">
            <text:p>#N/D</text:p>
          </table:table-cell>
          <table:table-cell table:style-name="ce11" table:formula="of:=VLOOKUP([.E216];[Listado.$A$2:.$D$19];4;0)" office:value-type="float" office:value="0">
            <text:p>#N/D</text:p>
          </table:table-cell>
          <table:table-cell table:style-name="ce11" table:formula="of:=VLOOKUP([.H216];[Listado.$A$2:.$D$19];4;0)" office:value-type="float" office:value="0">
            <text:p>#N/D</text:p>
          </table:table-cell>
          <table:table-cell table:style-name="ce11" table:formula="of:=COUNTIF([.J216:.M216];[.N21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7];0;[.F217])" office:value-type="float" office:value="0">
            <text:p>0</text:p>
          </table:table-cell>
          <table:table-cell table:style-name="ce9"/>
          <table:table-cell table:style-name="ce11" table:formula="of:=VLOOKUP([.B217];[Listado.$A$2:.$D$19];4;0)" office:value-type="float" office:value="0">
            <text:p>#N/D</text:p>
          </table:table-cell>
          <table:table-cell table:style-name="ce11" table:formula="of:=VLOOKUP([.C217];[Listado.$A$2:.$D$19];4;0)" office:value-type="float" office:value="0">
            <text:p>#N/D</text:p>
          </table:table-cell>
          <table:table-cell table:style-name="ce11" table:formula="of:=VLOOKUP([.D217];[Listado.$A$2:.$D$19];4;0)" office:value-type="float" office:value="0">
            <text:p>#N/D</text:p>
          </table:table-cell>
          <table:table-cell table:style-name="ce11" table:formula="of:=VLOOKUP([.E217];[Listado.$A$2:.$D$19];4;0)" office:value-type="float" office:value="0">
            <text:p>#N/D</text:p>
          </table:table-cell>
          <table:table-cell table:style-name="ce11" table:formula="of:=VLOOKUP([.H217];[Listado.$A$2:.$D$19];4;0)" office:value-type="float" office:value="0">
            <text:p>#N/D</text:p>
          </table:table-cell>
          <table:table-cell table:style-name="ce11" table:formula="of:=COUNTIF([.J217:.M217];[.N21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8];0;[.F218])" office:value-type="float" office:value="0">
            <text:p>0</text:p>
          </table:table-cell>
          <table:table-cell table:style-name="ce9"/>
          <table:table-cell table:style-name="ce11" table:formula="of:=VLOOKUP([.B218];[Listado.$A$2:.$D$19];4;0)" office:value-type="float" office:value="0">
            <text:p>#N/D</text:p>
          </table:table-cell>
          <table:table-cell table:style-name="ce11" table:formula="of:=VLOOKUP([.C218];[Listado.$A$2:.$D$19];4;0)" office:value-type="float" office:value="0">
            <text:p>#N/D</text:p>
          </table:table-cell>
          <table:table-cell table:style-name="ce11" table:formula="of:=VLOOKUP([.D218];[Listado.$A$2:.$D$19];4;0)" office:value-type="float" office:value="0">
            <text:p>#N/D</text:p>
          </table:table-cell>
          <table:table-cell table:style-name="ce11" table:formula="of:=VLOOKUP([.E218];[Listado.$A$2:.$D$19];4;0)" office:value-type="float" office:value="0">
            <text:p>#N/D</text:p>
          </table:table-cell>
          <table:table-cell table:style-name="ce11" table:formula="of:=VLOOKUP([.H218];[Listado.$A$2:.$D$19];4;0)" office:value-type="float" office:value="0">
            <text:p>#N/D</text:p>
          </table:table-cell>
          <table:table-cell table:style-name="ce11" table:formula="of:=COUNTIF([.J218:.M218];[.N21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19];0;[.F219])" office:value-type="float" office:value="0">
            <text:p>0</text:p>
          </table:table-cell>
          <table:table-cell table:style-name="ce9"/>
          <table:table-cell table:style-name="ce11" table:formula="of:=VLOOKUP([.B219];[Listado.$A$2:.$D$19];4;0)" office:value-type="float" office:value="0">
            <text:p>#N/D</text:p>
          </table:table-cell>
          <table:table-cell table:style-name="ce11" table:formula="of:=VLOOKUP([.C219];[Listado.$A$2:.$D$19];4;0)" office:value-type="float" office:value="0">
            <text:p>#N/D</text:p>
          </table:table-cell>
          <table:table-cell table:style-name="ce11" table:formula="of:=VLOOKUP([.D219];[Listado.$A$2:.$D$19];4;0)" office:value-type="float" office:value="0">
            <text:p>#N/D</text:p>
          </table:table-cell>
          <table:table-cell table:style-name="ce11" table:formula="of:=VLOOKUP([.E219];[Listado.$A$2:.$D$19];4;0)" office:value-type="float" office:value="0">
            <text:p>#N/D</text:p>
          </table:table-cell>
          <table:table-cell table:style-name="ce11" table:formula="of:=VLOOKUP([.H219];[Listado.$A$2:.$D$19];4;0)" office:value-type="float" office:value="0">
            <text:p>#N/D</text:p>
          </table:table-cell>
          <table:table-cell table:style-name="ce11" table:formula="of:=COUNTIF([.J219:.M219];[.N21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20];0;[.F220])" office:value-type="float" office:value="0">
            <text:p>0</text:p>
          </table:table-cell>
          <table:table-cell table:style-name="ce9"/>
          <table:table-cell table:style-name="ce11" table:formula="of:=VLOOKUP([.B220];[Listado.$A$2:.$D$19];4;0)" office:value-type="float" office:value="0">
            <text:p>#N/D</text:p>
          </table:table-cell>
          <table:table-cell table:style-name="ce11" table:formula="of:=VLOOKUP([.C220];[Listado.$A$2:.$D$19];4;0)" office:value-type="float" office:value="0">
            <text:p>#N/D</text:p>
          </table:table-cell>
          <table:table-cell table:style-name="ce11" table:formula="of:=VLOOKUP([.D220];[Listado.$A$2:.$D$19];4;0)" office:value-type="float" office:value="0">
            <text:p>#N/D</text:p>
          </table:table-cell>
          <table:table-cell table:style-name="ce11" table:formula="of:=VLOOKUP([.E220];[Listado.$A$2:.$D$19];4;0)" office:value-type="float" office:value="0">
            <text:p>#N/D</text:p>
          </table:table-cell>
          <table:table-cell table:style-name="ce11" table:formula="of:=VLOOKUP([.H220];[Listado.$A$2:.$D$19];4;0)" office:value-type="float" office:value="0">
            <text:p>#N/D</text:p>
          </table:table-cell>
          <table:table-cell table:style-name="ce11" table:formula="of:=COUNTIF([.J220:.M220];[.N22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5"/>
          <table:table-cell table:number-columns-repeated="4" table:style-name="ce6"/>
          <table:table-cell table:number-columns-repeated="2" table:style-name="ce5"/>
          <table:table-cell table:formula="of:=OFFSET([.A221];0;[.F221])" office:value-type="float" office:value="0">
            <text:p>0</text:p>
          </table:table-cell>
          <table:table-cell/>
          <table:table-cell table:style-name="ce10" table:formula="of:=VLOOKUP([.B221];[Listado.$A$2:.$D$19];4;0)" office:value-type="float" office:value="0">
            <text:p>#N/D</text:p>
          </table:table-cell>
          <table:table-cell table:style-name="ce10" table:formula="of:=VLOOKUP([.C221];[Listado.$A$2:.$D$19];4;0)" office:value-type="float" office:value="0">
            <text:p>#N/D</text:p>
          </table:table-cell>
          <table:table-cell table:style-name="ce10" table:formula="of:=VLOOKUP([.D221];[Listado.$A$2:.$D$19];4;0)" office:value-type="float" office:value="0">
            <text:p>#N/D</text:p>
          </table:table-cell>
          <table:table-cell table:style-name="ce10" table:formula="of:=VLOOKUP([.E221];[Listado.$A$2:.$D$19];4;0)" office:value-type="float" office:value="0">
            <text:p>#N/D</text:p>
          </table:table-cell>
          <table:table-cell table:style-name="ce10" table:formula="of:=VLOOKUP([.H221];[Listado.$A$2:.$D$19];4;0)" office:value-type="float" office:value="0">
            <text:p>#N/D</text:p>
          </table:table-cell>
          <table:table-cell table:style-name="ce10" table:formula="of:=COUNTIF([.J221:.M221];[.N221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5"/>
          <table:table-cell table:number-columns-repeated="4" table:style-name="ce6"/>
          <table:table-cell table:number-columns-repeated="2" table:style-name="ce5"/>
          <table:table-cell table:formula="of:=OFFSET([.A222];0;[.F222])" office:value-type="float" office:value="0">
            <text:p>0</text:p>
          </table:table-cell>
          <table:table-cell/>
          <table:table-cell table:style-name="ce10" table:formula="of:=VLOOKUP([.B222];[Listado.$A$2:.$D$19];4;0)" office:value-type="float" office:value="0">
            <text:p>#N/D</text:p>
          </table:table-cell>
          <table:table-cell table:style-name="ce10" table:formula="of:=VLOOKUP([.C222];[Listado.$A$2:.$D$19];4;0)" office:value-type="float" office:value="0">
            <text:p>#N/D</text:p>
          </table:table-cell>
          <table:table-cell table:style-name="ce10" table:formula="of:=VLOOKUP([.D222];[Listado.$A$2:.$D$19];4;0)" office:value-type="float" office:value="0">
            <text:p>#N/D</text:p>
          </table:table-cell>
          <table:table-cell table:style-name="ce10" table:formula="of:=VLOOKUP([.E222];[Listado.$A$2:.$D$19];4;0)" office:value-type="float" office:value="0">
            <text:p>#N/D</text:p>
          </table:table-cell>
          <table:table-cell table:style-name="ce10" table:formula="of:=VLOOKUP([.H222];[Listado.$A$2:.$D$19];4;0)" office:value-type="float" office:value="0">
            <text:p>#N/D</text:p>
          </table:table-cell>
          <table:table-cell table:style-name="ce10" table:formula="of:=COUNTIF([.J222:.M222];[.N222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5"/>
          <table:table-cell table:number-columns-repeated="4" table:style-name="ce6"/>
          <table:table-cell table:number-columns-repeated="2" table:style-name="ce5"/>
          <table:table-cell table:formula="of:=OFFSET([.A223];0;[.F223])" office:value-type="float" office:value="0">
            <text:p>0</text:p>
          </table:table-cell>
          <table:table-cell/>
          <table:table-cell table:style-name="ce10" table:formula="of:=VLOOKUP([.B223];[Listado.$A$2:.$D$19];4;0)" office:value-type="float" office:value="0">
            <text:p>#N/D</text:p>
          </table:table-cell>
          <table:table-cell table:style-name="ce10" table:formula="of:=VLOOKUP([.C223];[Listado.$A$2:.$D$19];4;0)" office:value-type="float" office:value="0">
            <text:p>#N/D</text:p>
          </table:table-cell>
          <table:table-cell table:style-name="ce10" table:formula="of:=VLOOKUP([.D223];[Listado.$A$2:.$D$19];4;0)" office:value-type="float" office:value="0">
            <text:p>#N/D</text:p>
          </table:table-cell>
          <table:table-cell table:style-name="ce10" table:formula="of:=VLOOKUP([.E223];[Listado.$A$2:.$D$19];4;0)" office:value-type="float" office:value="0">
            <text:p>#N/D</text:p>
          </table:table-cell>
          <table:table-cell table:style-name="ce10" table:formula="of:=VLOOKUP([.H223];[Listado.$A$2:.$D$19];4;0)" office:value-type="float" office:value="0">
            <text:p>#N/D</text:p>
          </table:table-cell>
          <table:table-cell table:style-name="ce10" table:formula="of:=COUNTIF([.J223:.M223];[.N223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5"/>
          <table:table-cell table:number-columns-repeated="4" table:style-name="ce8"/>
          <table:table-cell table:number-columns-repeated="2" table:style-name="ce5"/>
          <table:table-cell table:formula="of:=OFFSET([.A224];0;[.F224])" office:value-type="float" office:value="0">
            <text:p>0</text:p>
          </table:table-cell>
          <table:table-cell/>
          <table:table-cell table:style-name="ce10" table:formula="of:=VLOOKUP([.B224];[Listado.$A$2:.$D$19];4;0)" office:value-type="float" office:value="0">
            <text:p>#N/D</text:p>
          </table:table-cell>
          <table:table-cell table:style-name="ce10" table:formula="of:=VLOOKUP([.C224];[Listado.$A$2:.$D$19];4;0)" office:value-type="float" office:value="0">
            <text:p>#N/D</text:p>
          </table:table-cell>
          <table:table-cell table:style-name="ce10" table:formula="of:=VLOOKUP([.D224];[Listado.$A$2:.$D$19];4;0)" office:value-type="float" office:value="0">
            <text:p>#N/D</text:p>
          </table:table-cell>
          <table:table-cell table:style-name="ce10" table:formula="of:=VLOOKUP([.E224];[Listado.$A$2:.$D$19];4;0)" office:value-type="float" office:value="0">
            <text:p>#N/D</text:p>
          </table:table-cell>
          <table:table-cell table:style-name="ce10" table:formula="of:=VLOOKUP([.H224];[Listado.$A$2:.$D$19];4;0)" office:value-type="float" office:value="0">
            <text:p>#N/D</text:p>
          </table:table-cell>
          <table:table-cell table:style-name="ce10" table:formula="of:=COUNTIF([.J224:.M224];[.N224])" office:value-type="float" office:value="0">
            <text:p>#N/D</text:p>
          </table:table-cell>
          <table:table-cell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25];0;[.F225])" office:value-type="float" office:value="0">
            <text:p>0</text:p>
          </table:table-cell>
          <table:table-cell table:style-name="ce9"/>
          <table:table-cell table:style-name="ce11" table:formula="of:=VLOOKUP([.B225];[Listado.$A$2:.$D$19];4;0)" office:value-type="float" office:value="0">
            <text:p>#N/D</text:p>
          </table:table-cell>
          <table:table-cell table:style-name="ce11" table:formula="of:=VLOOKUP([.C225];[Listado.$A$2:.$D$19];4;0)" office:value-type="float" office:value="0">
            <text:p>#N/D</text:p>
          </table:table-cell>
          <table:table-cell table:style-name="ce11" table:formula="of:=VLOOKUP([.D225];[Listado.$A$2:.$D$19];4;0)" office:value-type="float" office:value="0">
            <text:p>#N/D</text:p>
          </table:table-cell>
          <table:table-cell table:style-name="ce11" table:formula="of:=VLOOKUP([.E225];[Listado.$A$2:.$D$19];4;0)" office:value-type="float" office:value="0">
            <text:p>#N/D</text:p>
          </table:table-cell>
          <table:table-cell table:style-name="ce11" table:formula="of:=VLOOKUP([.H225];[Listado.$A$2:.$D$19];4;0)" office:value-type="float" office:value="0">
            <text:p>#N/D</text:p>
          </table:table-cell>
          <table:table-cell table:style-name="ce11" table:formula="of:=COUNTIF([.J225:.M225];[.N22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26];0;[.F226])" office:value-type="float" office:value="0">
            <text:p>0</text:p>
          </table:table-cell>
          <table:table-cell table:style-name="ce9"/>
          <table:table-cell table:style-name="ce11" table:formula="of:=VLOOKUP([.B226];[Listado.$A$2:.$D$19];4;0)" office:value-type="float" office:value="0">
            <text:p>#N/D</text:p>
          </table:table-cell>
          <table:table-cell table:style-name="ce11" table:formula="of:=VLOOKUP([.C226];[Listado.$A$2:.$D$19];4;0)" office:value-type="float" office:value="0">
            <text:p>#N/D</text:p>
          </table:table-cell>
          <table:table-cell table:style-name="ce11" table:formula="of:=VLOOKUP([.D226];[Listado.$A$2:.$D$19];4;0)" office:value-type="float" office:value="0">
            <text:p>#N/D</text:p>
          </table:table-cell>
          <table:table-cell table:style-name="ce11" table:formula="of:=VLOOKUP([.E226];[Listado.$A$2:.$D$19];4;0)" office:value-type="float" office:value="0">
            <text:p>#N/D</text:p>
          </table:table-cell>
          <table:table-cell table:style-name="ce11" table:formula="of:=VLOOKUP([.H226];[Listado.$A$2:.$D$19];4;0)" office:value-type="float" office:value="0">
            <text:p>#N/D</text:p>
          </table:table-cell>
          <table:table-cell table:style-name="ce11" table:formula="of:=COUNTIF([.J226:.M226];[.N22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27];0;[.F227])" office:value-type="float" office:value="0">
            <text:p>0</text:p>
          </table:table-cell>
          <table:table-cell table:style-name="ce9"/>
          <table:table-cell table:style-name="ce11" table:formula="of:=VLOOKUP([.B227];[Listado.$A$2:.$D$19];4;0)" office:value-type="float" office:value="0">
            <text:p>#N/D</text:p>
          </table:table-cell>
          <table:table-cell table:style-name="ce11" table:formula="of:=VLOOKUP([.C227];[Listado.$A$2:.$D$19];4;0)" office:value-type="float" office:value="0">
            <text:p>#N/D</text:p>
          </table:table-cell>
          <table:table-cell table:style-name="ce11" table:formula="of:=VLOOKUP([.D227];[Listado.$A$2:.$D$19];4;0)" office:value-type="float" office:value="0">
            <text:p>#N/D</text:p>
          </table:table-cell>
          <table:table-cell table:style-name="ce11" table:formula="of:=VLOOKUP([.E227];[Listado.$A$2:.$D$19];4;0)" office:value-type="float" office:value="0">
            <text:p>#N/D</text:p>
          </table:table-cell>
          <table:table-cell table:style-name="ce11" table:formula="of:=VLOOKUP([.H227];[Listado.$A$2:.$D$19];4;0)" office:value-type="float" office:value="0">
            <text:p>#N/D</text:p>
          </table:table-cell>
          <table:table-cell table:style-name="ce11" table:formula="of:=COUNTIF([.J227:.M227];[.N22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28];0;[.F228])" office:value-type="float" office:value="0">
            <text:p>0</text:p>
          </table:table-cell>
          <table:table-cell table:style-name="ce9"/>
          <table:table-cell table:style-name="ce11" table:formula="of:=VLOOKUP([.B228];[Listado.$A$2:.$D$19];4;0)" office:value-type="float" office:value="0">
            <text:p>#N/D</text:p>
          </table:table-cell>
          <table:table-cell table:style-name="ce11" table:formula="of:=VLOOKUP([.C228];[Listado.$A$2:.$D$19];4;0)" office:value-type="float" office:value="0">
            <text:p>#N/D</text:p>
          </table:table-cell>
          <table:table-cell table:style-name="ce11" table:formula="of:=VLOOKUP([.D228];[Listado.$A$2:.$D$19];4;0)" office:value-type="float" office:value="0">
            <text:p>#N/D</text:p>
          </table:table-cell>
          <table:table-cell table:style-name="ce11" table:formula="of:=VLOOKUP([.E228];[Listado.$A$2:.$D$19];4;0)" office:value-type="float" office:value="0">
            <text:p>#N/D</text:p>
          </table:table-cell>
          <table:table-cell table:style-name="ce11" table:formula="of:=VLOOKUP([.H228];[Listado.$A$2:.$D$19];4;0)" office:value-type="float" office:value="0">
            <text:p>#N/D</text:p>
          </table:table-cell>
          <table:table-cell table:style-name="ce11" table:formula="of:=COUNTIF([.J228:.M228];[.N22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29];0;[.F229])" office:value-type="float" office:value="0">
            <text:p>0</text:p>
          </table:table-cell>
          <table:table-cell table:style-name="ce9"/>
          <table:table-cell table:style-name="ce11" table:formula="of:=VLOOKUP([.B229];[Listado.$A$2:.$D$19];4;0)" office:value-type="float" office:value="0">
            <text:p>#N/D</text:p>
          </table:table-cell>
          <table:table-cell table:style-name="ce11" table:formula="of:=VLOOKUP([.C229];[Listado.$A$2:.$D$19];4;0)" office:value-type="float" office:value="0">
            <text:p>#N/D</text:p>
          </table:table-cell>
          <table:table-cell table:style-name="ce11" table:formula="of:=VLOOKUP([.D229];[Listado.$A$2:.$D$19];4;0)" office:value-type="float" office:value="0">
            <text:p>#N/D</text:p>
          </table:table-cell>
          <table:table-cell table:style-name="ce11" table:formula="of:=VLOOKUP([.E229];[Listado.$A$2:.$D$19];4;0)" office:value-type="float" office:value="0">
            <text:p>#N/D</text:p>
          </table:table-cell>
          <table:table-cell table:style-name="ce11" table:formula="of:=VLOOKUP([.H229];[Listado.$A$2:.$D$19];4;0)" office:value-type="float" office:value="0">
            <text:p>#N/D</text:p>
          </table:table-cell>
          <table:table-cell table:style-name="ce11" table:formula="of:=COUNTIF([.J229:.M229];[.N22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0];0;[.F230])" office:value-type="float" office:value="0">
            <text:p>0</text:p>
          </table:table-cell>
          <table:table-cell table:style-name="ce9"/>
          <table:table-cell table:style-name="ce11" table:formula="of:=VLOOKUP([.B230];[Listado.$A$2:.$D$19];4;0)" office:value-type="float" office:value="0">
            <text:p>#N/D</text:p>
          </table:table-cell>
          <table:table-cell table:style-name="ce11" table:formula="of:=VLOOKUP([.C230];[Listado.$A$2:.$D$19];4;0)" office:value-type="float" office:value="0">
            <text:p>#N/D</text:p>
          </table:table-cell>
          <table:table-cell table:style-name="ce11" table:formula="of:=VLOOKUP([.D230];[Listado.$A$2:.$D$19];4;0)" office:value-type="float" office:value="0">
            <text:p>#N/D</text:p>
          </table:table-cell>
          <table:table-cell table:style-name="ce11" table:formula="of:=VLOOKUP([.E230];[Listado.$A$2:.$D$19];4;0)" office:value-type="float" office:value="0">
            <text:p>#N/D</text:p>
          </table:table-cell>
          <table:table-cell table:style-name="ce11" table:formula="of:=VLOOKUP([.H230];[Listado.$A$2:.$D$19];4;0)" office:value-type="float" office:value="0">
            <text:p>#N/D</text:p>
          </table:table-cell>
          <table:table-cell table:style-name="ce11" table:formula="of:=COUNTIF([.J230:.M230];[.N23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1];0;[.F231])" office:value-type="float" office:value="0">
            <text:p>0</text:p>
          </table:table-cell>
          <table:table-cell table:style-name="ce9"/>
          <table:table-cell table:style-name="ce11" table:formula="of:=VLOOKUP([.B231];[Listado.$A$2:.$D$19];4;0)" office:value-type="float" office:value="0">
            <text:p>#N/D</text:p>
          </table:table-cell>
          <table:table-cell table:style-name="ce11" table:formula="of:=VLOOKUP([.C231];[Listado.$A$2:.$D$19];4;0)" office:value-type="float" office:value="0">
            <text:p>#N/D</text:p>
          </table:table-cell>
          <table:table-cell table:style-name="ce11" table:formula="of:=VLOOKUP([.D231];[Listado.$A$2:.$D$19];4;0)" office:value-type="float" office:value="0">
            <text:p>#N/D</text:p>
          </table:table-cell>
          <table:table-cell table:style-name="ce11" table:formula="of:=VLOOKUP([.E231];[Listado.$A$2:.$D$19];4;0)" office:value-type="float" office:value="0">
            <text:p>#N/D</text:p>
          </table:table-cell>
          <table:table-cell table:style-name="ce11" table:formula="of:=VLOOKUP([.H231];[Listado.$A$2:.$D$19];4;0)" office:value-type="float" office:value="0">
            <text:p>#N/D</text:p>
          </table:table-cell>
          <table:table-cell table:style-name="ce11" table:formula="of:=COUNTIF([.J231:.M231];[.N23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2];0;[.F232])" office:value-type="float" office:value="0">
            <text:p>0</text:p>
          </table:table-cell>
          <table:table-cell table:style-name="ce9"/>
          <table:table-cell table:style-name="ce11" table:formula="of:=VLOOKUP([.B232];[Listado.$A$2:.$D$19];4;0)" office:value-type="float" office:value="0">
            <text:p>#N/D</text:p>
          </table:table-cell>
          <table:table-cell table:style-name="ce11" table:formula="of:=VLOOKUP([.C232];[Listado.$A$2:.$D$19];4;0)" office:value-type="float" office:value="0">
            <text:p>#N/D</text:p>
          </table:table-cell>
          <table:table-cell table:style-name="ce11" table:formula="of:=VLOOKUP([.D232];[Listado.$A$2:.$D$19];4;0)" office:value-type="float" office:value="0">
            <text:p>#N/D</text:p>
          </table:table-cell>
          <table:table-cell table:style-name="ce11" table:formula="of:=VLOOKUP([.E232];[Listado.$A$2:.$D$19];4;0)" office:value-type="float" office:value="0">
            <text:p>#N/D</text:p>
          </table:table-cell>
          <table:table-cell table:style-name="ce11" table:formula="of:=VLOOKUP([.H232];[Listado.$A$2:.$D$19];4;0)" office:value-type="float" office:value="0">
            <text:p>#N/D</text:p>
          </table:table-cell>
          <table:table-cell table:style-name="ce11" table:formula="of:=COUNTIF([.J232:.M232];[.N23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3];0;[.F233])" office:value-type="float" office:value="0">
            <text:p>0</text:p>
          </table:table-cell>
          <table:table-cell table:style-name="ce9"/>
          <table:table-cell table:style-name="ce11" table:formula="of:=VLOOKUP([.B233];[Listado.$A$2:.$D$19];4;0)" office:value-type="float" office:value="0">
            <text:p>#N/D</text:p>
          </table:table-cell>
          <table:table-cell table:style-name="ce11" table:formula="of:=VLOOKUP([.C233];[Listado.$A$2:.$D$19];4;0)" office:value-type="float" office:value="0">
            <text:p>#N/D</text:p>
          </table:table-cell>
          <table:table-cell table:style-name="ce11" table:formula="of:=VLOOKUP([.D233];[Listado.$A$2:.$D$19];4;0)" office:value-type="float" office:value="0">
            <text:p>#N/D</text:p>
          </table:table-cell>
          <table:table-cell table:style-name="ce11" table:formula="of:=VLOOKUP([.E233];[Listado.$A$2:.$D$19];4;0)" office:value-type="float" office:value="0">
            <text:p>#N/D</text:p>
          </table:table-cell>
          <table:table-cell table:style-name="ce11" table:formula="of:=VLOOKUP([.H233];[Listado.$A$2:.$D$19];4;0)" office:value-type="float" office:value="0">
            <text:p>#N/D</text:p>
          </table:table-cell>
          <table:table-cell table:style-name="ce11" table:formula="of:=COUNTIF([.J233:.M233];[.N23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4];0;[.F234])" office:value-type="float" office:value="0">
            <text:p>0</text:p>
          </table:table-cell>
          <table:table-cell table:style-name="ce9"/>
          <table:table-cell table:style-name="ce11" table:formula="of:=VLOOKUP([.B234];[Listado.$A$2:.$D$19];4;0)" office:value-type="float" office:value="0">
            <text:p>#N/D</text:p>
          </table:table-cell>
          <table:table-cell table:style-name="ce11" table:formula="of:=VLOOKUP([.C234];[Listado.$A$2:.$D$19];4;0)" office:value-type="float" office:value="0">
            <text:p>#N/D</text:p>
          </table:table-cell>
          <table:table-cell table:style-name="ce11" table:formula="of:=VLOOKUP([.D234];[Listado.$A$2:.$D$19];4;0)" office:value-type="float" office:value="0">
            <text:p>#N/D</text:p>
          </table:table-cell>
          <table:table-cell table:style-name="ce11" table:formula="of:=VLOOKUP([.E234];[Listado.$A$2:.$D$19];4;0)" office:value-type="float" office:value="0">
            <text:p>#N/D</text:p>
          </table:table-cell>
          <table:table-cell table:style-name="ce11" table:formula="of:=VLOOKUP([.H234];[Listado.$A$2:.$D$19];4;0)" office:value-type="float" office:value="0">
            <text:p>#N/D</text:p>
          </table:table-cell>
          <table:table-cell table:style-name="ce11" table:formula="of:=COUNTIF([.J234:.M234];[.N23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5];0;[.F235])" office:value-type="float" office:value="0">
            <text:p>0</text:p>
          </table:table-cell>
          <table:table-cell table:style-name="ce9"/>
          <table:table-cell table:style-name="ce11" table:formula="of:=VLOOKUP([.B235];[Listado.$A$2:.$D$19];4;0)" office:value-type="float" office:value="0">
            <text:p>#N/D</text:p>
          </table:table-cell>
          <table:table-cell table:style-name="ce11" table:formula="of:=VLOOKUP([.C235];[Listado.$A$2:.$D$19];4;0)" office:value-type="float" office:value="0">
            <text:p>#N/D</text:p>
          </table:table-cell>
          <table:table-cell table:style-name="ce11" table:formula="of:=VLOOKUP([.D235];[Listado.$A$2:.$D$19];4;0)" office:value-type="float" office:value="0">
            <text:p>#N/D</text:p>
          </table:table-cell>
          <table:table-cell table:style-name="ce11" table:formula="of:=VLOOKUP([.E235];[Listado.$A$2:.$D$19];4;0)" office:value-type="float" office:value="0">
            <text:p>#N/D</text:p>
          </table:table-cell>
          <table:table-cell table:style-name="ce11" table:formula="of:=VLOOKUP([.H235];[Listado.$A$2:.$D$19];4;0)" office:value-type="float" office:value="0">
            <text:p>#N/D</text:p>
          </table:table-cell>
          <table:table-cell table:style-name="ce11" table:formula="of:=COUNTIF([.J235:.M235];[.N23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6];0;[.F236])" office:value-type="float" office:value="0">
            <text:p>0</text:p>
          </table:table-cell>
          <table:table-cell table:style-name="ce9"/>
          <table:table-cell table:style-name="ce11" table:formula="of:=VLOOKUP([.B236];[Listado.$A$2:.$D$19];4;0)" office:value-type="float" office:value="0">
            <text:p>#N/D</text:p>
          </table:table-cell>
          <table:table-cell table:style-name="ce11" table:formula="of:=VLOOKUP([.C236];[Listado.$A$2:.$D$19];4;0)" office:value-type="float" office:value="0">
            <text:p>#N/D</text:p>
          </table:table-cell>
          <table:table-cell table:style-name="ce11" table:formula="of:=VLOOKUP([.D236];[Listado.$A$2:.$D$19];4;0)" office:value-type="float" office:value="0">
            <text:p>#N/D</text:p>
          </table:table-cell>
          <table:table-cell table:style-name="ce11" table:formula="of:=VLOOKUP([.E236];[Listado.$A$2:.$D$19];4;0)" office:value-type="float" office:value="0">
            <text:p>#N/D</text:p>
          </table:table-cell>
          <table:table-cell table:style-name="ce11" table:formula="of:=VLOOKUP([.H236];[Listado.$A$2:.$D$19];4;0)" office:value-type="float" office:value="0">
            <text:p>#N/D</text:p>
          </table:table-cell>
          <table:table-cell table:style-name="ce11" table:formula="of:=COUNTIF([.J236:.M236];[.N23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7];0;[.F237])" office:value-type="float" office:value="0">
            <text:p>0</text:p>
          </table:table-cell>
          <table:table-cell table:style-name="ce9"/>
          <table:table-cell table:style-name="ce11" table:formula="of:=VLOOKUP([.B237];[Listado.$A$2:.$D$19];4;0)" office:value-type="float" office:value="0">
            <text:p>#N/D</text:p>
          </table:table-cell>
          <table:table-cell table:style-name="ce11" table:formula="of:=VLOOKUP([.C237];[Listado.$A$2:.$D$19];4;0)" office:value-type="float" office:value="0">
            <text:p>#N/D</text:p>
          </table:table-cell>
          <table:table-cell table:style-name="ce11" table:formula="of:=VLOOKUP([.D237];[Listado.$A$2:.$D$19];4;0)" office:value-type="float" office:value="0">
            <text:p>#N/D</text:p>
          </table:table-cell>
          <table:table-cell table:style-name="ce11" table:formula="of:=VLOOKUP([.E237];[Listado.$A$2:.$D$19];4;0)" office:value-type="float" office:value="0">
            <text:p>#N/D</text:p>
          </table:table-cell>
          <table:table-cell table:style-name="ce11" table:formula="of:=VLOOKUP([.H237];[Listado.$A$2:.$D$19];4;0)" office:value-type="float" office:value="0">
            <text:p>#N/D</text:p>
          </table:table-cell>
          <table:table-cell table:style-name="ce11" table:formula="of:=COUNTIF([.J237:.M237];[.N23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8];0;[.F238])" office:value-type="float" office:value="0">
            <text:p>0</text:p>
          </table:table-cell>
          <table:table-cell table:style-name="ce9"/>
          <table:table-cell table:style-name="ce11" table:formula="of:=VLOOKUP([.B238];[Listado.$A$2:.$D$19];4;0)" office:value-type="float" office:value="0">
            <text:p>#N/D</text:p>
          </table:table-cell>
          <table:table-cell table:style-name="ce11" table:formula="of:=VLOOKUP([.C238];[Listado.$A$2:.$D$19];4;0)" office:value-type="float" office:value="0">
            <text:p>#N/D</text:p>
          </table:table-cell>
          <table:table-cell table:style-name="ce11" table:formula="of:=VLOOKUP([.D238];[Listado.$A$2:.$D$19];4;0)" office:value-type="float" office:value="0">
            <text:p>#N/D</text:p>
          </table:table-cell>
          <table:table-cell table:style-name="ce11" table:formula="of:=VLOOKUP([.E238];[Listado.$A$2:.$D$19];4;0)" office:value-type="float" office:value="0">
            <text:p>#N/D</text:p>
          </table:table-cell>
          <table:table-cell table:style-name="ce11" table:formula="of:=VLOOKUP([.H238];[Listado.$A$2:.$D$19];4;0)" office:value-type="float" office:value="0">
            <text:p>#N/D</text:p>
          </table:table-cell>
          <table:table-cell table:style-name="ce11" table:formula="of:=COUNTIF([.J238:.M238];[.N23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39];0;[.F239])" office:value-type="float" office:value="0">
            <text:p>0</text:p>
          </table:table-cell>
          <table:table-cell table:style-name="ce9"/>
          <table:table-cell table:style-name="ce11" table:formula="of:=VLOOKUP([.B239];[Listado.$A$2:.$D$19];4;0)" office:value-type="float" office:value="0">
            <text:p>#N/D</text:p>
          </table:table-cell>
          <table:table-cell table:style-name="ce11" table:formula="of:=VLOOKUP([.C239];[Listado.$A$2:.$D$19];4;0)" office:value-type="float" office:value="0">
            <text:p>#N/D</text:p>
          </table:table-cell>
          <table:table-cell table:style-name="ce11" table:formula="of:=VLOOKUP([.D239];[Listado.$A$2:.$D$19];4;0)" office:value-type="float" office:value="0">
            <text:p>#N/D</text:p>
          </table:table-cell>
          <table:table-cell table:style-name="ce11" table:formula="of:=VLOOKUP([.E239];[Listado.$A$2:.$D$19];4;0)" office:value-type="float" office:value="0">
            <text:p>#N/D</text:p>
          </table:table-cell>
          <table:table-cell table:style-name="ce11" table:formula="of:=VLOOKUP([.H239];[Listado.$A$2:.$D$19];4;0)" office:value-type="float" office:value="0">
            <text:p>#N/D</text:p>
          </table:table-cell>
          <table:table-cell table:style-name="ce11" table:formula="of:=COUNTIF([.J239:.M239];[.N23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0];0;[.F240])" office:value-type="float" office:value="0">
            <text:p>0</text:p>
          </table:table-cell>
          <table:table-cell table:style-name="ce9"/>
          <table:table-cell table:style-name="ce11" table:formula="of:=VLOOKUP([.B240];[Listado.$A$2:.$D$19];4;0)" office:value-type="float" office:value="0">
            <text:p>#N/D</text:p>
          </table:table-cell>
          <table:table-cell table:style-name="ce11" table:formula="of:=VLOOKUP([.C240];[Listado.$A$2:.$D$19];4;0)" office:value-type="float" office:value="0">
            <text:p>#N/D</text:p>
          </table:table-cell>
          <table:table-cell table:style-name="ce11" table:formula="of:=VLOOKUP([.D240];[Listado.$A$2:.$D$19];4;0)" office:value-type="float" office:value="0">
            <text:p>#N/D</text:p>
          </table:table-cell>
          <table:table-cell table:style-name="ce11" table:formula="of:=VLOOKUP([.E240];[Listado.$A$2:.$D$19];4;0)" office:value-type="float" office:value="0">
            <text:p>#N/D</text:p>
          </table:table-cell>
          <table:table-cell table:style-name="ce11" table:formula="of:=VLOOKUP([.H240];[Listado.$A$2:.$D$19];4;0)" office:value-type="float" office:value="0">
            <text:p>#N/D</text:p>
          </table:table-cell>
          <table:table-cell table:style-name="ce11" table:formula="of:=COUNTIF([.J240:.M240];[.N24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1];0;[.F241])" office:value-type="float" office:value="0">
            <text:p>0</text:p>
          </table:table-cell>
          <table:table-cell table:style-name="ce9"/>
          <table:table-cell table:style-name="ce11" table:formula="of:=VLOOKUP([.B241];[Listado.$A$2:.$D$19];4;0)" office:value-type="float" office:value="0">
            <text:p>#N/D</text:p>
          </table:table-cell>
          <table:table-cell table:style-name="ce11" table:formula="of:=VLOOKUP([.C241];[Listado.$A$2:.$D$19];4;0)" office:value-type="float" office:value="0">
            <text:p>#N/D</text:p>
          </table:table-cell>
          <table:table-cell table:style-name="ce11" table:formula="of:=VLOOKUP([.D241];[Listado.$A$2:.$D$19];4;0)" office:value-type="float" office:value="0">
            <text:p>#N/D</text:p>
          </table:table-cell>
          <table:table-cell table:style-name="ce11" table:formula="of:=VLOOKUP([.E241];[Listado.$A$2:.$D$19];4;0)" office:value-type="float" office:value="0">
            <text:p>#N/D</text:p>
          </table:table-cell>
          <table:table-cell table:style-name="ce11" table:formula="of:=VLOOKUP([.H241];[Listado.$A$2:.$D$19];4;0)" office:value-type="float" office:value="0">
            <text:p>#N/D</text:p>
          </table:table-cell>
          <table:table-cell table:style-name="ce11" table:formula="of:=COUNTIF([.J241:.M241];[.N24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2];0;[.F242])" office:value-type="float" office:value="0">
            <text:p>0</text:p>
          </table:table-cell>
          <table:table-cell table:style-name="ce9"/>
          <table:table-cell table:style-name="ce11" table:formula="of:=VLOOKUP([.B242];[Listado.$A$2:.$D$19];4;0)" office:value-type="float" office:value="0">
            <text:p>#N/D</text:p>
          </table:table-cell>
          <table:table-cell table:style-name="ce11" table:formula="of:=VLOOKUP([.C242];[Listado.$A$2:.$D$19];4;0)" office:value-type="float" office:value="0">
            <text:p>#N/D</text:p>
          </table:table-cell>
          <table:table-cell table:style-name="ce11" table:formula="of:=VLOOKUP([.D242];[Listado.$A$2:.$D$19];4;0)" office:value-type="float" office:value="0">
            <text:p>#N/D</text:p>
          </table:table-cell>
          <table:table-cell table:style-name="ce11" table:formula="of:=VLOOKUP([.E242];[Listado.$A$2:.$D$19];4;0)" office:value-type="float" office:value="0">
            <text:p>#N/D</text:p>
          </table:table-cell>
          <table:table-cell table:style-name="ce11" table:formula="of:=VLOOKUP([.H242];[Listado.$A$2:.$D$19];4;0)" office:value-type="float" office:value="0">
            <text:p>#N/D</text:p>
          </table:table-cell>
          <table:table-cell table:style-name="ce11" table:formula="of:=COUNTIF([.J242:.M242];[.N24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3];0;[.F243])" office:value-type="float" office:value="0">
            <text:p>0</text:p>
          </table:table-cell>
          <table:table-cell table:style-name="ce9"/>
          <table:table-cell table:style-name="ce11" table:formula="of:=VLOOKUP([.B243];[Listado.$A$2:.$D$19];4;0)" office:value-type="float" office:value="0">
            <text:p>#N/D</text:p>
          </table:table-cell>
          <table:table-cell table:style-name="ce11" table:formula="of:=VLOOKUP([.C243];[Listado.$A$2:.$D$19];4;0)" office:value-type="float" office:value="0">
            <text:p>#N/D</text:p>
          </table:table-cell>
          <table:table-cell table:style-name="ce11" table:formula="of:=VLOOKUP([.D243];[Listado.$A$2:.$D$19];4;0)" office:value-type="float" office:value="0">
            <text:p>#N/D</text:p>
          </table:table-cell>
          <table:table-cell table:style-name="ce11" table:formula="of:=VLOOKUP([.E243];[Listado.$A$2:.$D$19];4;0)" office:value-type="float" office:value="0">
            <text:p>#N/D</text:p>
          </table:table-cell>
          <table:table-cell table:style-name="ce11" table:formula="of:=VLOOKUP([.H243];[Listado.$A$2:.$D$19];4;0)" office:value-type="float" office:value="0">
            <text:p>#N/D</text:p>
          </table:table-cell>
          <table:table-cell table:style-name="ce11" table:formula="of:=COUNTIF([.J243:.M243];[.N24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4];0;[.F244])" office:value-type="float" office:value="0">
            <text:p>0</text:p>
          </table:table-cell>
          <table:table-cell table:style-name="ce9"/>
          <table:table-cell table:style-name="ce11" table:formula="of:=VLOOKUP([.B244];[Listado.$A$2:.$D$19];4;0)" office:value-type="float" office:value="0">
            <text:p>#N/D</text:p>
          </table:table-cell>
          <table:table-cell table:style-name="ce11" table:formula="of:=VLOOKUP([.C244];[Listado.$A$2:.$D$19];4;0)" office:value-type="float" office:value="0">
            <text:p>#N/D</text:p>
          </table:table-cell>
          <table:table-cell table:style-name="ce11" table:formula="of:=VLOOKUP([.D244];[Listado.$A$2:.$D$19];4;0)" office:value-type="float" office:value="0">
            <text:p>#N/D</text:p>
          </table:table-cell>
          <table:table-cell table:style-name="ce11" table:formula="of:=VLOOKUP([.E244];[Listado.$A$2:.$D$19];4;0)" office:value-type="float" office:value="0">
            <text:p>#N/D</text:p>
          </table:table-cell>
          <table:table-cell table:style-name="ce11" table:formula="of:=VLOOKUP([.H244];[Listado.$A$2:.$D$19];4;0)" office:value-type="float" office:value="0">
            <text:p>#N/D</text:p>
          </table:table-cell>
          <table:table-cell table:style-name="ce11" table:formula="of:=COUNTIF([.J244:.M244];[.N24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5];0;[.F245])" office:value-type="float" office:value="0">
            <text:p>0</text:p>
          </table:table-cell>
          <table:table-cell table:style-name="ce9"/>
          <table:table-cell table:style-name="ce11" table:formula="of:=VLOOKUP([.B245];[Listado.$A$2:.$D$19];4;0)" office:value-type="float" office:value="0">
            <text:p>#N/D</text:p>
          </table:table-cell>
          <table:table-cell table:style-name="ce11" table:formula="of:=VLOOKUP([.C245];[Listado.$A$2:.$D$19];4;0)" office:value-type="float" office:value="0">
            <text:p>#N/D</text:p>
          </table:table-cell>
          <table:table-cell table:style-name="ce11" table:formula="of:=VLOOKUP([.D245];[Listado.$A$2:.$D$19];4;0)" office:value-type="float" office:value="0">
            <text:p>#N/D</text:p>
          </table:table-cell>
          <table:table-cell table:style-name="ce11" table:formula="of:=VLOOKUP([.E245];[Listado.$A$2:.$D$19];4;0)" office:value-type="float" office:value="0">
            <text:p>#N/D</text:p>
          </table:table-cell>
          <table:table-cell table:style-name="ce11" table:formula="of:=VLOOKUP([.H245];[Listado.$A$2:.$D$19];4;0)" office:value-type="float" office:value="0">
            <text:p>#N/D</text:p>
          </table:table-cell>
          <table:table-cell table:style-name="ce11" table:formula="of:=COUNTIF([.J245:.M245];[.N24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6];0;[.F246])" office:value-type="float" office:value="0">
            <text:p>0</text:p>
          </table:table-cell>
          <table:table-cell table:style-name="ce9"/>
          <table:table-cell table:style-name="ce11" table:formula="of:=VLOOKUP([.B246];[Listado.$A$2:.$D$19];4;0)" office:value-type="float" office:value="0">
            <text:p>#N/D</text:p>
          </table:table-cell>
          <table:table-cell table:style-name="ce11" table:formula="of:=VLOOKUP([.C246];[Listado.$A$2:.$D$19];4;0)" office:value-type="float" office:value="0">
            <text:p>#N/D</text:p>
          </table:table-cell>
          <table:table-cell table:style-name="ce11" table:formula="of:=VLOOKUP([.D246];[Listado.$A$2:.$D$19];4;0)" office:value-type="float" office:value="0">
            <text:p>#N/D</text:p>
          </table:table-cell>
          <table:table-cell table:style-name="ce11" table:formula="of:=VLOOKUP([.E246];[Listado.$A$2:.$D$19];4;0)" office:value-type="float" office:value="0">
            <text:p>#N/D</text:p>
          </table:table-cell>
          <table:table-cell table:style-name="ce11" table:formula="of:=VLOOKUP([.H246];[Listado.$A$2:.$D$19];4;0)" office:value-type="float" office:value="0">
            <text:p>#N/D</text:p>
          </table:table-cell>
          <table:table-cell table:style-name="ce11" table:formula="of:=COUNTIF([.J246:.M246];[.N24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7];0;[.F247])" office:value-type="float" office:value="0">
            <text:p>0</text:p>
          </table:table-cell>
          <table:table-cell table:style-name="ce9"/>
          <table:table-cell table:style-name="ce11" table:formula="of:=VLOOKUP([.B247];[Listado.$A$2:.$D$19];4;0)" office:value-type="float" office:value="0">
            <text:p>#N/D</text:p>
          </table:table-cell>
          <table:table-cell table:style-name="ce11" table:formula="of:=VLOOKUP([.C247];[Listado.$A$2:.$D$19];4;0)" office:value-type="float" office:value="0">
            <text:p>#N/D</text:p>
          </table:table-cell>
          <table:table-cell table:style-name="ce11" table:formula="of:=VLOOKUP([.D247];[Listado.$A$2:.$D$19];4;0)" office:value-type="float" office:value="0">
            <text:p>#N/D</text:p>
          </table:table-cell>
          <table:table-cell table:style-name="ce11" table:formula="of:=VLOOKUP([.E247];[Listado.$A$2:.$D$19];4;0)" office:value-type="float" office:value="0">
            <text:p>#N/D</text:p>
          </table:table-cell>
          <table:table-cell table:style-name="ce11" table:formula="of:=VLOOKUP([.H247];[Listado.$A$2:.$D$19];4;0)" office:value-type="float" office:value="0">
            <text:p>#N/D</text:p>
          </table:table-cell>
          <table:table-cell table:style-name="ce11" table:formula="of:=COUNTIF([.J247:.M247];[.N24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8];0;[.F248])" office:value-type="float" office:value="0">
            <text:p>0</text:p>
          </table:table-cell>
          <table:table-cell table:style-name="ce9"/>
          <table:table-cell table:style-name="ce11" table:formula="of:=VLOOKUP([.B248];[Listado.$A$2:.$D$19];4;0)" office:value-type="float" office:value="0">
            <text:p>#N/D</text:p>
          </table:table-cell>
          <table:table-cell table:style-name="ce11" table:formula="of:=VLOOKUP([.C248];[Listado.$A$2:.$D$19];4;0)" office:value-type="float" office:value="0">
            <text:p>#N/D</text:p>
          </table:table-cell>
          <table:table-cell table:style-name="ce11" table:formula="of:=VLOOKUP([.D248];[Listado.$A$2:.$D$19];4;0)" office:value-type="float" office:value="0">
            <text:p>#N/D</text:p>
          </table:table-cell>
          <table:table-cell table:style-name="ce11" table:formula="of:=VLOOKUP([.E248];[Listado.$A$2:.$D$19];4;0)" office:value-type="float" office:value="0">
            <text:p>#N/D</text:p>
          </table:table-cell>
          <table:table-cell table:style-name="ce11" table:formula="of:=VLOOKUP([.H248];[Listado.$A$2:.$D$19];4;0)" office:value-type="float" office:value="0">
            <text:p>#N/D</text:p>
          </table:table-cell>
          <table:table-cell table:style-name="ce11" table:formula="of:=COUNTIF([.J248:.M248];[.N24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49];0;[.F249])" office:value-type="float" office:value="0">
            <text:p>0</text:p>
          </table:table-cell>
          <table:table-cell table:style-name="ce9"/>
          <table:table-cell table:style-name="ce11" table:formula="of:=VLOOKUP([.B249];[Listado.$A$2:.$D$19];4;0)" office:value-type="float" office:value="0">
            <text:p>#N/D</text:p>
          </table:table-cell>
          <table:table-cell table:style-name="ce11" table:formula="of:=VLOOKUP([.C249];[Listado.$A$2:.$D$19];4;0)" office:value-type="float" office:value="0">
            <text:p>#N/D</text:p>
          </table:table-cell>
          <table:table-cell table:style-name="ce11" table:formula="of:=VLOOKUP([.D249];[Listado.$A$2:.$D$19];4;0)" office:value-type="float" office:value="0">
            <text:p>#N/D</text:p>
          </table:table-cell>
          <table:table-cell table:style-name="ce11" table:formula="of:=VLOOKUP([.E249];[Listado.$A$2:.$D$19];4;0)" office:value-type="float" office:value="0">
            <text:p>#N/D</text:p>
          </table:table-cell>
          <table:table-cell table:style-name="ce11" table:formula="of:=VLOOKUP([.H249];[Listado.$A$2:.$D$19];4;0)" office:value-type="float" office:value="0">
            <text:p>#N/D</text:p>
          </table:table-cell>
          <table:table-cell table:style-name="ce11" table:formula="of:=COUNTIF([.J249:.M249];[.N24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0];0;[.F250])" office:value-type="float" office:value="0">
            <text:p>0</text:p>
          </table:table-cell>
          <table:table-cell table:style-name="ce9"/>
          <table:table-cell table:style-name="ce11" table:formula="of:=VLOOKUP([.B250];[Listado.$A$2:.$D$19];4;0)" office:value-type="float" office:value="0">
            <text:p>#N/D</text:p>
          </table:table-cell>
          <table:table-cell table:style-name="ce11" table:formula="of:=VLOOKUP([.C250];[Listado.$A$2:.$D$19];4;0)" office:value-type="float" office:value="0">
            <text:p>#N/D</text:p>
          </table:table-cell>
          <table:table-cell table:style-name="ce11" table:formula="of:=VLOOKUP([.D250];[Listado.$A$2:.$D$19];4;0)" office:value-type="float" office:value="0">
            <text:p>#N/D</text:p>
          </table:table-cell>
          <table:table-cell table:style-name="ce11" table:formula="of:=VLOOKUP([.E250];[Listado.$A$2:.$D$19];4;0)" office:value-type="float" office:value="0">
            <text:p>#N/D</text:p>
          </table:table-cell>
          <table:table-cell table:style-name="ce11" table:formula="of:=VLOOKUP([.H250];[Listado.$A$2:.$D$19];4;0)" office:value-type="float" office:value="0">
            <text:p>#N/D</text:p>
          </table:table-cell>
          <table:table-cell table:style-name="ce11" table:formula="of:=COUNTIF([.J250:.M250];[.N25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1];0;[.F251])" office:value-type="float" office:value="0">
            <text:p>0</text:p>
          </table:table-cell>
          <table:table-cell table:style-name="ce9"/>
          <table:table-cell table:style-name="ce11" table:formula="of:=VLOOKUP([.B251];[Listado.$A$2:.$D$19];4;0)" office:value-type="float" office:value="0">
            <text:p>#N/D</text:p>
          </table:table-cell>
          <table:table-cell table:style-name="ce11" table:formula="of:=VLOOKUP([.C251];[Listado.$A$2:.$D$19];4;0)" office:value-type="float" office:value="0">
            <text:p>#N/D</text:p>
          </table:table-cell>
          <table:table-cell table:style-name="ce11" table:formula="of:=VLOOKUP([.D251];[Listado.$A$2:.$D$19];4;0)" office:value-type="float" office:value="0">
            <text:p>#N/D</text:p>
          </table:table-cell>
          <table:table-cell table:style-name="ce11" table:formula="of:=VLOOKUP([.E251];[Listado.$A$2:.$D$19];4;0)" office:value-type="float" office:value="0">
            <text:p>#N/D</text:p>
          </table:table-cell>
          <table:table-cell table:style-name="ce11" table:formula="of:=VLOOKUP([.H251];[Listado.$A$2:.$D$19];4;0)" office:value-type="float" office:value="0">
            <text:p>#N/D</text:p>
          </table:table-cell>
          <table:table-cell table:style-name="ce11" table:formula="of:=COUNTIF([.J251:.M251];[.N25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2];0;[.F252])" office:value-type="float" office:value="0">
            <text:p>0</text:p>
          </table:table-cell>
          <table:table-cell table:style-name="ce9"/>
          <table:table-cell table:style-name="ce11" table:formula="of:=VLOOKUP([.B252];[Listado.$A$2:.$D$19];4;0)" office:value-type="float" office:value="0">
            <text:p>#N/D</text:p>
          </table:table-cell>
          <table:table-cell table:style-name="ce11" table:formula="of:=VLOOKUP([.C252];[Listado.$A$2:.$D$19];4;0)" office:value-type="float" office:value="0">
            <text:p>#N/D</text:p>
          </table:table-cell>
          <table:table-cell table:style-name="ce11" table:formula="of:=VLOOKUP([.D252];[Listado.$A$2:.$D$19];4;0)" office:value-type="float" office:value="0">
            <text:p>#N/D</text:p>
          </table:table-cell>
          <table:table-cell table:style-name="ce11" table:formula="of:=VLOOKUP([.E252];[Listado.$A$2:.$D$19];4;0)" office:value-type="float" office:value="0">
            <text:p>#N/D</text:p>
          </table:table-cell>
          <table:table-cell table:style-name="ce11" table:formula="of:=VLOOKUP([.H252];[Listado.$A$2:.$D$19];4;0)" office:value-type="float" office:value="0">
            <text:p>#N/D</text:p>
          </table:table-cell>
          <table:table-cell table:style-name="ce11" table:formula="of:=COUNTIF([.J252:.M252];[.N25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3];0;[.F253])" office:value-type="float" office:value="0">
            <text:p>0</text:p>
          </table:table-cell>
          <table:table-cell table:style-name="ce9"/>
          <table:table-cell table:style-name="ce11" table:formula="of:=VLOOKUP([.B253];[Listado.$A$2:.$D$19];4;0)" office:value-type="float" office:value="0">
            <text:p>#N/D</text:p>
          </table:table-cell>
          <table:table-cell table:style-name="ce11" table:formula="of:=VLOOKUP([.C253];[Listado.$A$2:.$D$19];4;0)" office:value-type="float" office:value="0">
            <text:p>#N/D</text:p>
          </table:table-cell>
          <table:table-cell table:style-name="ce11" table:formula="of:=VLOOKUP([.D253];[Listado.$A$2:.$D$19];4;0)" office:value-type="float" office:value="0">
            <text:p>#N/D</text:p>
          </table:table-cell>
          <table:table-cell table:style-name="ce11" table:formula="of:=VLOOKUP([.E253];[Listado.$A$2:.$D$19];4;0)" office:value-type="float" office:value="0">
            <text:p>#N/D</text:p>
          </table:table-cell>
          <table:table-cell table:style-name="ce11" table:formula="of:=VLOOKUP([.H253];[Listado.$A$2:.$D$19];4;0)" office:value-type="float" office:value="0">
            <text:p>#N/D</text:p>
          </table:table-cell>
          <table:table-cell table:style-name="ce11" table:formula="of:=COUNTIF([.J253:.M253];[.N25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4];0;[.F254])" office:value-type="float" office:value="0">
            <text:p>0</text:p>
          </table:table-cell>
          <table:table-cell table:style-name="ce9"/>
          <table:table-cell table:style-name="ce11" table:formula="of:=VLOOKUP([.B254];[Listado.$A$2:.$D$19];4;0)" office:value-type="float" office:value="0">
            <text:p>#N/D</text:p>
          </table:table-cell>
          <table:table-cell table:style-name="ce11" table:formula="of:=VLOOKUP([.C254];[Listado.$A$2:.$D$19];4;0)" office:value-type="float" office:value="0">
            <text:p>#N/D</text:p>
          </table:table-cell>
          <table:table-cell table:style-name="ce11" table:formula="of:=VLOOKUP([.D254];[Listado.$A$2:.$D$19];4;0)" office:value-type="float" office:value="0">
            <text:p>#N/D</text:p>
          </table:table-cell>
          <table:table-cell table:style-name="ce11" table:formula="of:=VLOOKUP([.E254];[Listado.$A$2:.$D$19];4;0)" office:value-type="float" office:value="0">
            <text:p>#N/D</text:p>
          </table:table-cell>
          <table:table-cell table:style-name="ce11" table:formula="of:=VLOOKUP([.H254];[Listado.$A$2:.$D$19];4;0)" office:value-type="float" office:value="0">
            <text:p>#N/D</text:p>
          </table:table-cell>
          <table:table-cell table:style-name="ce11" table:formula="of:=COUNTIF([.J254:.M254];[.N25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5];0;[.F255])" office:value-type="float" office:value="0">
            <text:p>0</text:p>
          </table:table-cell>
          <table:table-cell table:style-name="ce9"/>
          <table:table-cell table:style-name="ce11" table:formula="of:=VLOOKUP([.B255];[Listado.$A$2:.$D$19];4;0)" office:value-type="float" office:value="0">
            <text:p>#N/D</text:p>
          </table:table-cell>
          <table:table-cell table:style-name="ce11" table:formula="of:=VLOOKUP([.C255];[Listado.$A$2:.$D$19];4;0)" office:value-type="float" office:value="0">
            <text:p>#N/D</text:p>
          </table:table-cell>
          <table:table-cell table:style-name="ce11" table:formula="of:=VLOOKUP([.D255];[Listado.$A$2:.$D$19];4;0)" office:value-type="float" office:value="0">
            <text:p>#N/D</text:p>
          </table:table-cell>
          <table:table-cell table:style-name="ce11" table:formula="of:=VLOOKUP([.E255];[Listado.$A$2:.$D$19];4;0)" office:value-type="float" office:value="0">
            <text:p>#N/D</text:p>
          </table:table-cell>
          <table:table-cell table:style-name="ce11" table:formula="of:=VLOOKUP([.H255];[Listado.$A$2:.$D$19];4;0)" office:value-type="float" office:value="0">
            <text:p>#N/D</text:p>
          </table:table-cell>
          <table:table-cell table:style-name="ce11" table:formula="of:=COUNTIF([.J255:.M255];[.N25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6];0;[.F256])" office:value-type="float" office:value="0">
            <text:p>0</text:p>
          </table:table-cell>
          <table:table-cell table:style-name="ce9"/>
          <table:table-cell table:style-name="ce11" table:formula="of:=VLOOKUP([.B256];[Listado.$A$2:.$D$19];4;0)" office:value-type="float" office:value="0">
            <text:p>#N/D</text:p>
          </table:table-cell>
          <table:table-cell table:style-name="ce11" table:formula="of:=VLOOKUP([.C256];[Listado.$A$2:.$D$19];4;0)" office:value-type="float" office:value="0">
            <text:p>#N/D</text:p>
          </table:table-cell>
          <table:table-cell table:style-name="ce11" table:formula="of:=VLOOKUP([.D256];[Listado.$A$2:.$D$19];4;0)" office:value-type="float" office:value="0">
            <text:p>#N/D</text:p>
          </table:table-cell>
          <table:table-cell table:style-name="ce11" table:formula="of:=VLOOKUP([.E256];[Listado.$A$2:.$D$19];4;0)" office:value-type="float" office:value="0">
            <text:p>#N/D</text:p>
          </table:table-cell>
          <table:table-cell table:style-name="ce11" table:formula="of:=VLOOKUP([.H256];[Listado.$A$2:.$D$19];4;0)" office:value-type="float" office:value="0">
            <text:p>#N/D</text:p>
          </table:table-cell>
          <table:table-cell table:style-name="ce11" table:formula="of:=COUNTIF([.J256:.M256];[.N25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7];0;[.F257])" office:value-type="float" office:value="0">
            <text:p>0</text:p>
          </table:table-cell>
          <table:table-cell table:style-name="ce9"/>
          <table:table-cell table:style-name="ce11" table:formula="of:=VLOOKUP([.B257];[Listado.$A$2:.$D$19];4;0)" office:value-type="float" office:value="0">
            <text:p>#N/D</text:p>
          </table:table-cell>
          <table:table-cell table:style-name="ce11" table:formula="of:=VLOOKUP([.C257];[Listado.$A$2:.$D$19];4;0)" office:value-type="float" office:value="0">
            <text:p>#N/D</text:p>
          </table:table-cell>
          <table:table-cell table:style-name="ce11" table:formula="of:=VLOOKUP([.D257];[Listado.$A$2:.$D$19];4;0)" office:value-type="float" office:value="0">
            <text:p>#N/D</text:p>
          </table:table-cell>
          <table:table-cell table:style-name="ce11" table:formula="of:=VLOOKUP([.E257];[Listado.$A$2:.$D$19];4;0)" office:value-type="float" office:value="0">
            <text:p>#N/D</text:p>
          </table:table-cell>
          <table:table-cell table:style-name="ce11" table:formula="of:=VLOOKUP([.H257];[Listado.$A$2:.$D$19];4;0)" office:value-type="float" office:value="0">
            <text:p>#N/D</text:p>
          </table:table-cell>
          <table:table-cell table:style-name="ce11" table:formula="of:=COUNTIF([.J257:.M257];[.N25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8];0;[.F258])" office:value-type="float" office:value="0">
            <text:p>0</text:p>
          </table:table-cell>
          <table:table-cell table:style-name="ce9"/>
          <table:table-cell table:style-name="ce11" table:formula="of:=VLOOKUP([.B258];[Listado.$A$2:.$D$19];4;0)" office:value-type="float" office:value="0">
            <text:p>#N/D</text:p>
          </table:table-cell>
          <table:table-cell table:style-name="ce11" table:formula="of:=VLOOKUP([.C258];[Listado.$A$2:.$D$19];4;0)" office:value-type="float" office:value="0">
            <text:p>#N/D</text:p>
          </table:table-cell>
          <table:table-cell table:style-name="ce11" table:formula="of:=VLOOKUP([.D258];[Listado.$A$2:.$D$19];4;0)" office:value-type="float" office:value="0">
            <text:p>#N/D</text:p>
          </table:table-cell>
          <table:table-cell table:style-name="ce11" table:formula="of:=VLOOKUP([.E258];[Listado.$A$2:.$D$19];4;0)" office:value-type="float" office:value="0">
            <text:p>#N/D</text:p>
          </table:table-cell>
          <table:table-cell table:style-name="ce11" table:formula="of:=VLOOKUP([.H258];[Listado.$A$2:.$D$19];4;0)" office:value-type="float" office:value="0">
            <text:p>#N/D</text:p>
          </table:table-cell>
          <table:table-cell table:style-name="ce11" table:formula="of:=COUNTIF([.J258:.M258];[.N25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59];0;[.F259])" office:value-type="float" office:value="0">
            <text:p>0</text:p>
          </table:table-cell>
          <table:table-cell table:style-name="ce9"/>
          <table:table-cell table:style-name="ce11" table:formula="of:=VLOOKUP([.B259];[Listado.$A$2:.$D$19];4;0)" office:value-type="float" office:value="0">
            <text:p>#N/D</text:p>
          </table:table-cell>
          <table:table-cell table:style-name="ce11" table:formula="of:=VLOOKUP([.C259];[Listado.$A$2:.$D$19];4;0)" office:value-type="float" office:value="0">
            <text:p>#N/D</text:p>
          </table:table-cell>
          <table:table-cell table:style-name="ce11" table:formula="of:=VLOOKUP([.D259];[Listado.$A$2:.$D$19];4;0)" office:value-type="float" office:value="0">
            <text:p>#N/D</text:p>
          </table:table-cell>
          <table:table-cell table:style-name="ce11" table:formula="of:=VLOOKUP([.E259];[Listado.$A$2:.$D$19];4;0)" office:value-type="float" office:value="0">
            <text:p>#N/D</text:p>
          </table:table-cell>
          <table:table-cell table:style-name="ce11" table:formula="of:=VLOOKUP([.H259];[Listado.$A$2:.$D$19];4;0)" office:value-type="float" office:value="0">
            <text:p>#N/D</text:p>
          </table:table-cell>
          <table:table-cell table:style-name="ce11" table:formula="of:=COUNTIF([.J259:.M259];[.N25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0];0;[.F260])" office:value-type="float" office:value="0">
            <text:p>0</text:p>
          </table:table-cell>
          <table:table-cell table:style-name="ce9"/>
          <table:table-cell table:style-name="ce11" table:formula="of:=VLOOKUP([.B260];[Listado.$A$2:.$D$19];4;0)" office:value-type="float" office:value="0">
            <text:p>#N/D</text:p>
          </table:table-cell>
          <table:table-cell table:style-name="ce11" table:formula="of:=VLOOKUP([.C260];[Listado.$A$2:.$D$19];4;0)" office:value-type="float" office:value="0">
            <text:p>#N/D</text:p>
          </table:table-cell>
          <table:table-cell table:style-name="ce11" table:formula="of:=VLOOKUP([.D260];[Listado.$A$2:.$D$19];4;0)" office:value-type="float" office:value="0">
            <text:p>#N/D</text:p>
          </table:table-cell>
          <table:table-cell table:style-name="ce11" table:formula="of:=VLOOKUP([.E260];[Listado.$A$2:.$D$19];4;0)" office:value-type="float" office:value="0">
            <text:p>#N/D</text:p>
          </table:table-cell>
          <table:table-cell table:style-name="ce11" table:formula="of:=VLOOKUP([.H260];[Listado.$A$2:.$D$19];4;0)" office:value-type="float" office:value="0">
            <text:p>#N/D</text:p>
          </table:table-cell>
          <table:table-cell table:style-name="ce11" table:formula="of:=COUNTIF([.J260:.M260];[.N26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1];0;[.F261])" office:value-type="float" office:value="0">
            <text:p>0</text:p>
          </table:table-cell>
          <table:table-cell table:style-name="ce9"/>
          <table:table-cell table:style-name="ce11" table:formula="of:=VLOOKUP([.B261];[Listado.$A$2:.$D$19];4;0)" office:value-type="float" office:value="0">
            <text:p>#N/D</text:p>
          </table:table-cell>
          <table:table-cell table:style-name="ce11" table:formula="of:=VLOOKUP([.C261];[Listado.$A$2:.$D$19];4;0)" office:value-type="float" office:value="0">
            <text:p>#N/D</text:p>
          </table:table-cell>
          <table:table-cell table:style-name="ce11" table:formula="of:=VLOOKUP([.D261];[Listado.$A$2:.$D$19];4;0)" office:value-type="float" office:value="0">
            <text:p>#N/D</text:p>
          </table:table-cell>
          <table:table-cell table:style-name="ce11" table:formula="of:=VLOOKUP([.E261];[Listado.$A$2:.$D$19];4;0)" office:value-type="float" office:value="0">
            <text:p>#N/D</text:p>
          </table:table-cell>
          <table:table-cell table:style-name="ce11" table:formula="of:=VLOOKUP([.H261];[Listado.$A$2:.$D$19];4;0)" office:value-type="float" office:value="0">
            <text:p>#N/D</text:p>
          </table:table-cell>
          <table:table-cell table:style-name="ce11" table:formula="of:=COUNTIF([.J261:.M261];[.N26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2];0;[.F262])" office:value-type="float" office:value="0">
            <text:p>0</text:p>
          </table:table-cell>
          <table:table-cell table:style-name="ce9"/>
          <table:table-cell table:style-name="ce11" table:formula="of:=VLOOKUP([.B262];[Listado.$A$2:.$D$19];4;0)" office:value-type="float" office:value="0">
            <text:p>#N/D</text:p>
          </table:table-cell>
          <table:table-cell table:style-name="ce11" table:formula="of:=VLOOKUP([.C262];[Listado.$A$2:.$D$19];4;0)" office:value-type="float" office:value="0">
            <text:p>#N/D</text:p>
          </table:table-cell>
          <table:table-cell table:style-name="ce11" table:formula="of:=VLOOKUP([.D262];[Listado.$A$2:.$D$19];4;0)" office:value-type="float" office:value="0">
            <text:p>#N/D</text:p>
          </table:table-cell>
          <table:table-cell table:style-name="ce11" table:formula="of:=VLOOKUP([.E262];[Listado.$A$2:.$D$19];4;0)" office:value-type="float" office:value="0">
            <text:p>#N/D</text:p>
          </table:table-cell>
          <table:table-cell table:style-name="ce11" table:formula="of:=VLOOKUP([.H262];[Listado.$A$2:.$D$19];4;0)" office:value-type="float" office:value="0">
            <text:p>#N/D</text:p>
          </table:table-cell>
          <table:table-cell table:style-name="ce11" table:formula="of:=COUNTIF([.J262:.M262];[.N26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3];0;[.F263])" office:value-type="float" office:value="0">
            <text:p>0</text:p>
          </table:table-cell>
          <table:table-cell table:style-name="ce9"/>
          <table:table-cell table:style-name="ce11" table:formula="of:=VLOOKUP([.B263];[Listado.$A$2:.$D$19];4;0)" office:value-type="float" office:value="0">
            <text:p>#N/D</text:p>
          </table:table-cell>
          <table:table-cell table:style-name="ce11" table:formula="of:=VLOOKUP([.C263];[Listado.$A$2:.$D$19];4;0)" office:value-type="float" office:value="0">
            <text:p>#N/D</text:p>
          </table:table-cell>
          <table:table-cell table:style-name="ce11" table:formula="of:=VLOOKUP([.D263];[Listado.$A$2:.$D$19];4;0)" office:value-type="float" office:value="0">
            <text:p>#N/D</text:p>
          </table:table-cell>
          <table:table-cell table:style-name="ce11" table:formula="of:=VLOOKUP([.E263];[Listado.$A$2:.$D$19];4;0)" office:value-type="float" office:value="0">
            <text:p>#N/D</text:p>
          </table:table-cell>
          <table:table-cell table:style-name="ce11" table:formula="of:=VLOOKUP([.H263];[Listado.$A$2:.$D$19];4;0)" office:value-type="float" office:value="0">
            <text:p>#N/D</text:p>
          </table:table-cell>
          <table:table-cell table:style-name="ce11" table:formula="of:=COUNTIF([.J263:.M263];[.N26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4];0;[.F264])" office:value-type="float" office:value="0">
            <text:p>0</text:p>
          </table:table-cell>
          <table:table-cell table:style-name="ce9"/>
          <table:table-cell table:style-name="ce11" table:formula="of:=VLOOKUP([.B264];[Listado.$A$2:.$D$19];4;0)" office:value-type="float" office:value="0">
            <text:p>#N/D</text:p>
          </table:table-cell>
          <table:table-cell table:style-name="ce11" table:formula="of:=VLOOKUP([.C264];[Listado.$A$2:.$D$19];4;0)" office:value-type="float" office:value="0">
            <text:p>#N/D</text:p>
          </table:table-cell>
          <table:table-cell table:style-name="ce11" table:formula="of:=VLOOKUP([.D264];[Listado.$A$2:.$D$19];4;0)" office:value-type="float" office:value="0">
            <text:p>#N/D</text:p>
          </table:table-cell>
          <table:table-cell table:style-name="ce11" table:formula="of:=VLOOKUP([.E264];[Listado.$A$2:.$D$19];4;0)" office:value-type="float" office:value="0">
            <text:p>#N/D</text:p>
          </table:table-cell>
          <table:table-cell table:style-name="ce11" table:formula="of:=VLOOKUP([.H264];[Listado.$A$2:.$D$19];4;0)" office:value-type="float" office:value="0">
            <text:p>#N/D</text:p>
          </table:table-cell>
          <table:table-cell table:style-name="ce11" table:formula="of:=COUNTIF([.J264:.M264];[.N26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5];0;[.F265])" office:value-type="float" office:value="0">
            <text:p>0</text:p>
          </table:table-cell>
          <table:table-cell table:style-name="ce9"/>
          <table:table-cell table:style-name="ce11" table:formula="of:=VLOOKUP([.B265];[Listado.$A$2:.$D$19];4;0)" office:value-type="float" office:value="0">
            <text:p>#N/D</text:p>
          </table:table-cell>
          <table:table-cell table:style-name="ce11" table:formula="of:=VLOOKUP([.C265];[Listado.$A$2:.$D$19];4;0)" office:value-type="float" office:value="0">
            <text:p>#N/D</text:p>
          </table:table-cell>
          <table:table-cell table:style-name="ce11" table:formula="of:=VLOOKUP([.D265];[Listado.$A$2:.$D$19];4;0)" office:value-type="float" office:value="0">
            <text:p>#N/D</text:p>
          </table:table-cell>
          <table:table-cell table:style-name="ce11" table:formula="of:=VLOOKUP([.E265];[Listado.$A$2:.$D$19];4;0)" office:value-type="float" office:value="0">
            <text:p>#N/D</text:p>
          </table:table-cell>
          <table:table-cell table:style-name="ce11" table:formula="of:=VLOOKUP([.H265];[Listado.$A$2:.$D$19];4;0)" office:value-type="float" office:value="0">
            <text:p>#N/D</text:p>
          </table:table-cell>
          <table:table-cell table:style-name="ce11" table:formula="of:=COUNTIF([.J265:.M265];[.N26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6];0;[.F266])" office:value-type="float" office:value="0">
            <text:p>0</text:p>
          </table:table-cell>
          <table:table-cell table:style-name="ce9"/>
          <table:table-cell table:style-name="ce11" table:formula="of:=VLOOKUP([.B266];[Listado.$A$2:.$D$19];4;0)" office:value-type="float" office:value="0">
            <text:p>#N/D</text:p>
          </table:table-cell>
          <table:table-cell table:style-name="ce11" table:formula="of:=VLOOKUP([.C266];[Listado.$A$2:.$D$19];4;0)" office:value-type="float" office:value="0">
            <text:p>#N/D</text:p>
          </table:table-cell>
          <table:table-cell table:style-name="ce11" table:formula="of:=VLOOKUP([.D266];[Listado.$A$2:.$D$19];4;0)" office:value-type="float" office:value="0">
            <text:p>#N/D</text:p>
          </table:table-cell>
          <table:table-cell table:style-name="ce11" table:formula="of:=VLOOKUP([.E266];[Listado.$A$2:.$D$19];4;0)" office:value-type="float" office:value="0">
            <text:p>#N/D</text:p>
          </table:table-cell>
          <table:table-cell table:style-name="ce11" table:formula="of:=VLOOKUP([.H266];[Listado.$A$2:.$D$19];4;0)" office:value-type="float" office:value="0">
            <text:p>#N/D</text:p>
          </table:table-cell>
          <table:table-cell table:style-name="ce11" table:formula="of:=COUNTIF([.J266:.M266];[.N26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7];0;[.F267])" office:value-type="float" office:value="0">
            <text:p>0</text:p>
          </table:table-cell>
          <table:table-cell table:style-name="ce9"/>
          <table:table-cell table:style-name="ce11" table:formula="of:=VLOOKUP([.B267];[Listado.$A$2:.$D$19];4;0)" office:value-type="float" office:value="0">
            <text:p>#N/D</text:p>
          </table:table-cell>
          <table:table-cell table:style-name="ce11" table:formula="of:=VLOOKUP([.C267];[Listado.$A$2:.$D$19];4;0)" office:value-type="float" office:value="0">
            <text:p>#N/D</text:p>
          </table:table-cell>
          <table:table-cell table:style-name="ce11" table:formula="of:=VLOOKUP([.D267];[Listado.$A$2:.$D$19];4;0)" office:value-type="float" office:value="0">
            <text:p>#N/D</text:p>
          </table:table-cell>
          <table:table-cell table:style-name="ce11" table:formula="of:=VLOOKUP([.E267];[Listado.$A$2:.$D$19];4;0)" office:value-type="float" office:value="0">
            <text:p>#N/D</text:p>
          </table:table-cell>
          <table:table-cell table:style-name="ce11" table:formula="of:=VLOOKUP([.H267];[Listado.$A$2:.$D$19];4;0)" office:value-type="float" office:value="0">
            <text:p>#N/D</text:p>
          </table:table-cell>
          <table:table-cell table:style-name="ce11" table:formula="of:=COUNTIF([.J267:.M267];[.N26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8];0;[.F268])" office:value-type="float" office:value="0">
            <text:p>0</text:p>
          </table:table-cell>
          <table:table-cell table:style-name="ce9"/>
          <table:table-cell table:style-name="ce11" table:formula="of:=VLOOKUP([.B268];[Listado.$A$2:.$D$19];4;0)" office:value-type="float" office:value="0">
            <text:p>#N/D</text:p>
          </table:table-cell>
          <table:table-cell table:style-name="ce11" table:formula="of:=VLOOKUP([.C268];[Listado.$A$2:.$D$19];4;0)" office:value-type="float" office:value="0">
            <text:p>#N/D</text:p>
          </table:table-cell>
          <table:table-cell table:style-name="ce11" table:formula="of:=VLOOKUP([.D268];[Listado.$A$2:.$D$19];4;0)" office:value-type="float" office:value="0">
            <text:p>#N/D</text:p>
          </table:table-cell>
          <table:table-cell table:style-name="ce11" table:formula="of:=VLOOKUP([.E268];[Listado.$A$2:.$D$19];4;0)" office:value-type="float" office:value="0">
            <text:p>#N/D</text:p>
          </table:table-cell>
          <table:table-cell table:style-name="ce11" table:formula="of:=VLOOKUP([.H268];[Listado.$A$2:.$D$19];4;0)" office:value-type="float" office:value="0">
            <text:p>#N/D</text:p>
          </table:table-cell>
          <table:table-cell table:style-name="ce11" table:formula="of:=COUNTIF([.J268:.M268];[.N26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69];0;[.F269])" office:value-type="float" office:value="0">
            <text:p>0</text:p>
          </table:table-cell>
          <table:table-cell table:style-name="ce9"/>
          <table:table-cell table:style-name="ce11" table:formula="of:=VLOOKUP([.B269];[Listado.$A$2:.$D$19];4;0)" office:value-type="float" office:value="0">
            <text:p>#N/D</text:p>
          </table:table-cell>
          <table:table-cell table:style-name="ce11" table:formula="of:=VLOOKUP([.C269];[Listado.$A$2:.$D$19];4;0)" office:value-type="float" office:value="0">
            <text:p>#N/D</text:p>
          </table:table-cell>
          <table:table-cell table:style-name="ce11" table:formula="of:=VLOOKUP([.D269];[Listado.$A$2:.$D$19];4;0)" office:value-type="float" office:value="0">
            <text:p>#N/D</text:p>
          </table:table-cell>
          <table:table-cell table:style-name="ce11" table:formula="of:=VLOOKUP([.E269];[Listado.$A$2:.$D$19];4;0)" office:value-type="float" office:value="0">
            <text:p>#N/D</text:p>
          </table:table-cell>
          <table:table-cell table:style-name="ce11" table:formula="of:=VLOOKUP([.H269];[Listado.$A$2:.$D$19];4;0)" office:value-type="float" office:value="0">
            <text:p>#N/D</text:p>
          </table:table-cell>
          <table:table-cell table:style-name="ce11" table:formula="of:=COUNTIF([.J269:.M269];[.N26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0];0;[.F270])" office:value-type="float" office:value="0">
            <text:p>0</text:p>
          </table:table-cell>
          <table:table-cell table:style-name="ce9"/>
          <table:table-cell table:style-name="ce11" table:formula="of:=VLOOKUP([.B270];[Listado.$A$2:.$D$19];4;0)" office:value-type="float" office:value="0">
            <text:p>#N/D</text:p>
          </table:table-cell>
          <table:table-cell table:style-name="ce11" table:formula="of:=VLOOKUP([.C270];[Listado.$A$2:.$D$19];4;0)" office:value-type="float" office:value="0">
            <text:p>#N/D</text:p>
          </table:table-cell>
          <table:table-cell table:style-name="ce11" table:formula="of:=VLOOKUP([.D270];[Listado.$A$2:.$D$19];4;0)" office:value-type="float" office:value="0">
            <text:p>#N/D</text:p>
          </table:table-cell>
          <table:table-cell table:style-name="ce11" table:formula="of:=VLOOKUP([.E270];[Listado.$A$2:.$D$19];4;0)" office:value-type="float" office:value="0">
            <text:p>#N/D</text:p>
          </table:table-cell>
          <table:table-cell table:style-name="ce11" table:formula="of:=VLOOKUP([.H270];[Listado.$A$2:.$D$19];4;0)" office:value-type="float" office:value="0">
            <text:p>#N/D</text:p>
          </table:table-cell>
          <table:table-cell table:style-name="ce11" table:formula="of:=COUNTIF([.J270:.M270];[.N27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1];0;[.F271])" office:value-type="float" office:value="0">
            <text:p>0</text:p>
          </table:table-cell>
          <table:table-cell table:style-name="ce9"/>
          <table:table-cell table:style-name="ce11" table:formula="of:=VLOOKUP([.B271];[Listado.$A$2:.$D$19];4;0)" office:value-type="float" office:value="0">
            <text:p>#N/D</text:p>
          </table:table-cell>
          <table:table-cell table:style-name="ce11" table:formula="of:=VLOOKUP([.C271];[Listado.$A$2:.$D$19];4;0)" office:value-type="float" office:value="0">
            <text:p>#N/D</text:p>
          </table:table-cell>
          <table:table-cell table:style-name="ce11" table:formula="of:=VLOOKUP([.D271];[Listado.$A$2:.$D$19];4;0)" office:value-type="float" office:value="0">
            <text:p>#N/D</text:p>
          </table:table-cell>
          <table:table-cell table:style-name="ce11" table:formula="of:=VLOOKUP([.E271];[Listado.$A$2:.$D$19];4;0)" office:value-type="float" office:value="0">
            <text:p>#N/D</text:p>
          </table:table-cell>
          <table:table-cell table:style-name="ce11" table:formula="of:=VLOOKUP([.H271];[Listado.$A$2:.$D$19];4;0)" office:value-type="float" office:value="0">
            <text:p>#N/D</text:p>
          </table:table-cell>
          <table:table-cell table:style-name="ce11" table:formula="of:=COUNTIF([.J271:.M271];[.N27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2];0;[.F272])" office:value-type="float" office:value="0">
            <text:p>0</text:p>
          </table:table-cell>
          <table:table-cell table:style-name="ce9"/>
          <table:table-cell table:style-name="ce11" table:formula="of:=VLOOKUP([.B272];[Listado.$A$2:.$D$19];4;0)" office:value-type="float" office:value="0">
            <text:p>#N/D</text:p>
          </table:table-cell>
          <table:table-cell table:style-name="ce11" table:formula="of:=VLOOKUP([.C272];[Listado.$A$2:.$D$19];4;0)" office:value-type="float" office:value="0">
            <text:p>#N/D</text:p>
          </table:table-cell>
          <table:table-cell table:style-name="ce11" table:formula="of:=VLOOKUP([.D272];[Listado.$A$2:.$D$19];4;0)" office:value-type="float" office:value="0">
            <text:p>#N/D</text:p>
          </table:table-cell>
          <table:table-cell table:style-name="ce11" table:formula="of:=VLOOKUP([.E272];[Listado.$A$2:.$D$19];4;0)" office:value-type="float" office:value="0">
            <text:p>#N/D</text:p>
          </table:table-cell>
          <table:table-cell table:style-name="ce11" table:formula="of:=VLOOKUP([.H272];[Listado.$A$2:.$D$19];4;0)" office:value-type="float" office:value="0">
            <text:p>#N/D</text:p>
          </table:table-cell>
          <table:table-cell table:style-name="ce11" table:formula="of:=COUNTIF([.J272:.M272];[.N27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3];0;[.F273])" office:value-type="float" office:value="0">
            <text:p>0</text:p>
          </table:table-cell>
          <table:table-cell table:style-name="ce9"/>
          <table:table-cell table:style-name="ce11" table:formula="of:=VLOOKUP([.B273];[Listado.$A$2:.$D$19];4;0)" office:value-type="float" office:value="0">
            <text:p>#N/D</text:p>
          </table:table-cell>
          <table:table-cell table:style-name="ce11" table:formula="of:=VLOOKUP([.C273];[Listado.$A$2:.$D$19];4;0)" office:value-type="float" office:value="0">
            <text:p>#N/D</text:p>
          </table:table-cell>
          <table:table-cell table:style-name="ce11" table:formula="of:=VLOOKUP([.D273];[Listado.$A$2:.$D$19];4;0)" office:value-type="float" office:value="0">
            <text:p>#N/D</text:p>
          </table:table-cell>
          <table:table-cell table:style-name="ce11" table:formula="of:=VLOOKUP([.E273];[Listado.$A$2:.$D$19];4;0)" office:value-type="float" office:value="0">
            <text:p>#N/D</text:p>
          </table:table-cell>
          <table:table-cell table:style-name="ce11" table:formula="of:=VLOOKUP([.H273];[Listado.$A$2:.$D$19];4;0)" office:value-type="float" office:value="0">
            <text:p>#N/D</text:p>
          </table:table-cell>
          <table:table-cell table:style-name="ce11" table:formula="of:=COUNTIF([.J273:.M273];[.N27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4];0;[.F274])" office:value-type="float" office:value="0">
            <text:p>0</text:p>
          </table:table-cell>
          <table:table-cell table:style-name="ce9"/>
          <table:table-cell table:style-name="ce11" table:formula="of:=VLOOKUP([.B274];[Listado.$A$2:.$D$19];4;0)" office:value-type="float" office:value="0">
            <text:p>#N/D</text:p>
          </table:table-cell>
          <table:table-cell table:style-name="ce11" table:formula="of:=VLOOKUP([.C274];[Listado.$A$2:.$D$19];4;0)" office:value-type="float" office:value="0">
            <text:p>#N/D</text:p>
          </table:table-cell>
          <table:table-cell table:style-name="ce11" table:formula="of:=VLOOKUP([.D274];[Listado.$A$2:.$D$19];4;0)" office:value-type="float" office:value="0">
            <text:p>#N/D</text:p>
          </table:table-cell>
          <table:table-cell table:style-name="ce11" table:formula="of:=VLOOKUP([.E274];[Listado.$A$2:.$D$19];4;0)" office:value-type="float" office:value="0">
            <text:p>#N/D</text:p>
          </table:table-cell>
          <table:table-cell table:style-name="ce11" table:formula="of:=VLOOKUP([.H274];[Listado.$A$2:.$D$19];4;0)" office:value-type="float" office:value="0">
            <text:p>#N/D</text:p>
          </table:table-cell>
          <table:table-cell table:style-name="ce11" table:formula="of:=COUNTIF([.J274:.M274];[.N27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5];0;[.F275])" office:value-type="float" office:value="0">
            <text:p>0</text:p>
          </table:table-cell>
          <table:table-cell table:style-name="ce9"/>
          <table:table-cell table:style-name="ce11" table:formula="of:=VLOOKUP([.B275];[Listado.$A$2:.$D$19];4;0)" office:value-type="float" office:value="0">
            <text:p>#N/D</text:p>
          </table:table-cell>
          <table:table-cell table:style-name="ce11" table:formula="of:=VLOOKUP([.C275];[Listado.$A$2:.$D$19];4;0)" office:value-type="float" office:value="0">
            <text:p>#N/D</text:p>
          </table:table-cell>
          <table:table-cell table:style-name="ce11" table:formula="of:=VLOOKUP([.D275];[Listado.$A$2:.$D$19];4;0)" office:value-type="float" office:value="0">
            <text:p>#N/D</text:p>
          </table:table-cell>
          <table:table-cell table:style-name="ce11" table:formula="of:=VLOOKUP([.E275];[Listado.$A$2:.$D$19];4;0)" office:value-type="float" office:value="0">
            <text:p>#N/D</text:p>
          </table:table-cell>
          <table:table-cell table:style-name="ce11" table:formula="of:=VLOOKUP([.H275];[Listado.$A$2:.$D$19];4;0)" office:value-type="float" office:value="0">
            <text:p>#N/D</text:p>
          </table:table-cell>
          <table:table-cell table:style-name="ce11" table:formula="of:=COUNTIF([.J275:.M275];[.N27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6];0;[.F276])" office:value-type="float" office:value="0">
            <text:p>0</text:p>
          </table:table-cell>
          <table:table-cell table:style-name="ce9"/>
          <table:table-cell table:style-name="ce11" table:formula="of:=VLOOKUP([.B276];[Listado.$A$2:.$D$19];4;0)" office:value-type="float" office:value="0">
            <text:p>#N/D</text:p>
          </table:table-cell>
          <table:table-cell table:style-name="ce11" table:formula="of:=VLOOKUP([.C276];[Listado.$A$2:.$D$19];4;0)" office:value-type="float" office:value="0">
            <text:p>#N/D</text:p>
          </table:table-cell>
          <table:table-cell table:style-name="ce11" table:formula="of:=VLOOKUP([.D276];[Listado.$A$2:.$D$19];4;0)" office:value-type="float" office:value="0">
            <text:p>#N/D</text:p>
          </table:table-cell>
          <table:table-cell table:style-name="ce11" table:formula="of:=VLOOKUP([.E276];[Listado.$A$2:.$D$19];4;0)" office:value-type="float" office:value="0">
            <text:p>#N/D</text:p>
          </table:table-cell>
          <table:table-cell table:style-name="ce11" table:formula="of:=VLOOKUP([.H276];[Listado.$A$2:.$D$19];4;0)" office:value-type="float" office:value="0">
            <text:p>#N/D</text:p>
          </table:table-cell>
          <table:table-cell table:style-name="ce11" table:formula="of:=COUNTIF([.J276:.M276];[.N27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7];0;[.F277])" office:value-type="float" office:value="0">
            <text:p>0</text:p>
          </table:table-cell>
          <table:table-cell table:style-name="ce9"/>
          <table:table-cell table:style-name="ce11" table:formula="of:=VLOOKUP([.B277];[Listado.$A$2:.$D$19];4;0)" office:value-type="float" office:value="0">
            <text:p>#N/D</text:p>
          </table:table-cell>
          <table:table-cell table:style-name="ce11" table:formula="of:=VLOOKUP([.C277];[Listado.$A$2:.$D$19];4;0)" office:value-type="float" office:value="0">
            <text:p>#N/D</text:p>
          </table:table-cell>
          <table:table-cell table:style-name="ce11" table:formula="of:=VLOOKUP([.D277];[Listado.$A$2:.$D$19];4;0)" office:value-type="float" office:value="0">
            <text:p>#N/D</text:p>
          </table:table-cell>
          <table:table-cell table:style-name="ce11" table:formula="of:=VLOOKUP([.E277];[Listado.$A$2:.$D$19];4;0)" office:value-type="float" office:value="0">
            <text:p>#N/D</text:p>
          </table:table-cell>
          <table:table-cell table:style-name="ce11" table:formula="of:=VLOOKUP([.H277];[Listado.$A$2:.$D$19];4;0)" office:value-type="float" office:value="0">
            <text:p>#N/D</text:p>
          </table:table-cell>
          <table:table-cell table:style-name="ce11" table:formula="of:=COUNTIF([.J277:.M277];[.N27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8];0;[.F278])" office:value-type="float" office:value="0">
            <text:p>0</text:p>
          </table:table-cell>
          <table:table-cell table:style-name="ce9"/>
          <table:table-cell table:style-name="ce11" table:formula="of:=VLOOKUP([.B278];[Listado.$A$2:.$D$19];4;0)" office:value-type="float" office:value="0">
            <text:p>#N/D</text:p>
          </table:table-cell>
          <table:table-cell table:style-name="ce11" table:formula="of:=VLOOKUP([.C278];[Listado.$A$2:.$D$19];4;0)" office:value-type="float" office:value="0">
            <text:p>#N/D</text:p>
          </table:table-cell>
          <table:table-cell table:style-name="ce11" table:formula="of:=VLOOKUP([.D278];[Listado.$A$2:.$D$19];4;0)" office:value-type="float" office:value="0">
            <text:p>#N/D</text:p>
          </table:table-cell>
          <table:table-cell table:style-name="ce11" table:formula="of:=VLOOKUP([.E278];[Listado.$A$2:.$D$19];4;0)" office:value-type="float" office:value="0">
            <text:p>#N/D</text:p>
          </table:table-cell>
          <table:table-cell table:style-name="ce11" table:formula="of:=VLOOKUP([.H278];[Listado.$A$2:.$D$19];4;0)" office:value-type="float" office:value="0">
            <text:p>#N/D</text:p>
          </table:table-cell>
          <table:table-cell table:style-name="ce11" table:formula="of:=COUNTIF([.J278:.M278];[.N27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79];0;[.F279])" office:value-type="float" office:value="0">
            <text:p>0</text:p>
          </table:table-cell>
          <table:table-cell table:style-name="ce9"/>
          <table:table-cell table:style-name="ce11" table:formula="of:=VLOOKUP([.B279];[Listado.$A$2:.$D$19];4;0)" office:value-type="float" office:value="0">
            <text:p>#N/D</text:p>
          </table:table-cell>
          <table:table-cell table:style-name="ce11" table:formula="of:=VLOOKUP([.C279];[Listado.$A$2:.$D$19];4;0)" office:value-type="float" office:value="0">
            <text:p>#N/D</text:p>
          </table:table-cell>
          <table:table-cell table:style-name="ce11" table:formula="of:=VLOOKUP([.D279];[Listado.$A$2:.$D$19];4;0)" office:value-type="float" office:value="0">
            <text:p>#N/D</text:p>
          </table:table-cell>
          <table:table-cell table:style-name="ce11" table:formula="of:=VLOOKUP([.E279];[Listado.$A$2:.$D$19];4;0)" office:value-type="float" office:value="0">
            <text:p>#N/D</text:p>
          </table:table-cell>
          <table:table-cell table:style-name="ce11" table:formula="of:=VLOOKUP([.H279];[Listado.$A$2:.$D$19];4;0)" office:value-type="float" office:value="0">
            <text:p>#N/D</text:p>
          </table:table-cell>
          <table:table-cell table:style-name="ce11" table:formula="of:=COUNTIF([.J279:.M279];[.N27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0];0;[.F280])" office:value-type="float" office:value="0">
            <text:p>0</text:p>
          </table:table-cell>
          <table:table-cell table:style-name="ce9"/>
          <table:table-cell table:style-name="ce11" table:formula="of:=VLOOKUP([.B280];[Listado.$A$2:.$D$19];4;0)" office:value-type="float" office:value="0">
            <text:p>#N/D</text:p>
          </table:table-cell>
          <table:table-cell table:style-name="ce11" table:formula="of:=VLOOKUP([.C280];[Listado.$A$2:.$D$19];4;0)" office:value-type="float" office:value="0">
            <text:p>#N/D</text:p>
          </table:table-cell>
          <table:table-cell table:style-name="ce11" table:formula="of:=VLOOKUP([.D280];[Listado.$A$2:.$D$19];4;0)" office:value-type="float" office:value="0">
            <text:p>#N/D</text:p>
          </table:table-cell>
          <table:table-cell table:style-name="ce11" table:formula="of:=VLOOKUP([.E280];[Listado.$A$2:.$D$19];4;0)" office:value-type="float" office:value="0">
            <text:p>#N/D</text:p>
          </table:table-cell>
          <table:table-cell table:style-name="ce11" table:formula="of:=VLOOKUP([.H280];[Listado.$A$2:.$D$19];4;0)" office:value-type="float" office:value="0">
            <text:p>#N/D</text:p>
          </table:table-cell>
          <table:table-cell table:style-name="ce11" table:formula="of:=COUNTIF([.J280:.M280];[.N28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1];0;[.F281])" office:value-type="float" office:value="0">
            <text:p>0</text:p>
          </table:table-cell>
          <table:table-cell table:style-name="ce9"/>
          <table:table-cell table:style-name="ce11" table:formula="of:=VLOOKUP([.B281];[Listado.$A$2:.$D$19];4;0)" office:value-type="float" office:value="0">
            <text:p>#N/D</text:p>
          </table:table-cell>
          <table:table-cell table:style-name="ce11" table:formula="of:=VLOOKUP([.C281];[Listado.$A$2:.$D$19];4;0)" office:value-type="float" office:value="0">
            <text:p>#N/D</text:p>
          </table:table-cell>
          <table:table-cell table:style-name="ce11" table:formula="of:=VLOOKUP([.D281];[Listado.$A$2:.$D$19];4;0)" office:value-type="float" office:value="0">
            <text:p>#N/D</text:p>
          </table:table-cell>
          <table:table-cell table:style-name="ce11" table:formula="of:=VLOOKUP([.E281];[Listado.$A$2:.$D$19];4;0)" office:value-type="float" office:value="0">
            <text:p>#N/D</text:p>
          </table:table-cell>
          <table:table-cell table:style-name="ce11" table:formula="of:=VLOOKUP([.H281];[Listado.$A$2:.$D$19];4;0)" office:value-type="float" office:value="0">
            <text:p>#N/D</text:p>
          </table:table-cell>
          <table:table-cell table:style-name="ce11" table:formula="of:=COUNTIF([.J281:.M281];[.N28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2];0;[.F282])" office:value-type="float" office:value="0">
            <text:p>0</text:p>
          </table:table-cell>
          <table:table-cell table:style-name="ce9"/>
          <table:table-cell table:style-name="ce11" table:formula="of:=VLOOKUP([.B282];[Listado.$A$2:.$D$19];4;0)" office:value-type="float" office:value="0">
            <text:p>#N/D</text:p>
          </table:table-cell>
          <table:table-cell table:style-name="ce11" table:formula="of:=VLOOKUP([.C282];[Listado.$A$2:.$D$19];4;0)" office:value-type="float" office:value="0">
            <text:p>#N/D</text:p>
          </table:table-cell>
          <table:table-cell table:style-name="ce11" table:formula="of:=VLOOKUP([.D282];[Listado.$A$2:.$D$19];4;0)" office:value-type="float" office:value="0">
            <text:p>#N/D</text:p>
          </table:table-cell>
          <table:table-cell table:style-name="ce11" table:formula="of:=VLOOKUP([.E282];[Listado.$A$2:.$D$19];4;0)" office:value-type="float" office:value="0">
            <text:p>#N/D</text:p>
          </table:table-cell>
          <table:table-cell table:style-name="ce11" table:formula="of:=VLOOKUP([.H282];[Listado.$A$2:.$D$19];4;0)" office:value-type="float" office:value="0">
            <text:p>#N/D</text:p>
          </table:table-cell>
          <table:table-cell table:style-name="ce11" table:formula="of:=COUNTIF([.J282:.M282];[.N28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3];0;[.F283])" office:value-type="float" office:value="0">
            <text:p>0</text:p>
          </table:table-cell>
          <table:table-cell table:style-name="ce9"/>
          <table:table-cell table:style-name="ce11" table:formula="of:=VLOOKUP([.B283];[Listado.$A$2:.$D$19];4;0)" office:value-type="float" office:value="0">
            <text:p>#N/D</text:p>
          </table:table-cell>
          <table:table-cell table:style-name="ce11" table:formula="of:=VLOOKUP([.C283];[Listado.$A$2:.$D$19];4;0)" office:value-type="float" office:value="0">
            <text:p>#N/D</text:p>
          </table:table-cell>
          <table:table-cell table:style-name="ce11" table:formula="of:=VLOOKUP([.D283];[Listado.$A$2:.$D$19];4;0)" office:value-type="float" office:value="0">
            <text:p>#N/D</text:p>
          </table:table-cell>
          <table:table-cell table:style-name="ce11" table:formula="of:=VLOOKUP([.E283];[Listado.$A$2:.$D$19];4;0)" office:value-type="float" office:value="0">
            <text:p>#N/D</text:p>
          </table:table-cell>
          <table:table-cell table:style-name="ce11" table:formula="of:=VLOOKUP([.H283];[Listado.$A$2:.$D$19];4;0)" office:value-type="float" office:value="0">
            <text:p>#N/D</text:p>
          </table:table-cell>
          <table:table-cell table:style-name="ce11" table:formula="of:=COUNTIF([.J283:.M283];[.N28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4];0;[.F284])" office:value-type="float" office:value="0">
            <text:p>0</text:p>
          </table:table-cell>
          <table:table-cell table:style-name="ce9"/>
          <table:table-cell table:style-name="ce11" table:formula="of:=VLOOKUP([.B284];[Listado.$A$2:.$D$19];4;0)" office:value-type="float" office:value="0">
            <text:p>#N/D</text:p>
          </table:table-cell>
          <table:table-cell table:style-name="ce11" table:formula="of:=VLOOKUP([.C284];[Listado.$A$2:.$D$19];4;0)" office:value-type="float" office:value="0">
            <text:p>#N/D</text:p>
          </table:table-cell>
          <table:table-cell table:style-name="ce11" table:formula="of:=VLOOKUP([.D284];[Listado.$A$2:.$D$19];4;0)" office:value-type="float" office:value="0">
            <text:p>#N/D</text:p>
          </table:table-cell>
          <table:table-cell table:style-name="ce11" table:formula="of:=VLOOKUP([.E284];[Listado.$A$2:.$D$19];4;0)" office:value-type="float" office:value="0">
            <text:p>#N/D</text:p>
          </table:table-cell>
          <table:table-cell table:style-name="ce11" table:formula="of:=VLOOKUP([.H284];[Listado.$A$2:.$D$19];4;0)" office:value-type="float" office:value="0">
            <text:p>#N/D</text:p>
          </table:table-cell>
          <table:table-cell table:style-name="ce11" table:formula="of:=COUNTIF([.J284:.M284];[.N28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5];0;[.F285])" office:value-type="float" office:value="0">
            <text:p>0</text:p>
          </table:table-cell>
          <table:table-cell table:style-name="ce9"/>
          <table:table-cell table:style-name="ce11" table:formula="of:=VLOOKUP([.B285];[Listado.$A$2:.$D$19];4;0)" office:value-type="float" office:value="0">
            <text:p>#N/D</text:p>
          </table:table-cell>
          <table:table-cell table:style-name="ce11" table:formula="of:=VLOOKUP([.C285];[Listado.$A$2:.$D$19];4;0)" office:value-type="float" office:value="0">
            <text:p>#N/D</text:p>
          </table:table-cell>
          <table:table-cell table:style-name="ce11" table:formula="of:=VLOOKUP([.D285];[Listado.$A$2:.$D$19];4;0)" office:value-type="float" office:value="0">
            <text:p>#N/D</text:p>
          </table:table-cell>
          <table:table-cell table:style-name="ce11" table:formula="of:=VLOOKUP([.E285];[Listado.$A$2:.$D$19];4;0)" office:value-type="float" office:value="0">
            <text:p>#N/D</text:p>
          </table:table-cell>
          <table:table-cell table:style-name="ce11" table:formula="of:=VLOOKUP([.H285];[Listado.$A$2:.$D$19];4;0)" office:value-type="float" office:value="0">
            <text:p>#N/D</text:p>
          </table:table-cell>
          <table:table-cell table:style-name="ce11" table:formula="of:=COUNTIF([.J285:.M285];[.N28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6];0;[.F286])" office:value-type="float" office:value="0">
            <text:p>0</text:p>
          </table:table-cell>
          <table:table-cell table:style-name="ce9"/>
          <table:table-cell table:style-name="ce11" table:formula="of:=VLOOKUP([.B286];[Listado.$A$2:.$D$19];4;0)" office:value-type="float" office:value="0">
            <text:p>#N/D</text:p>
          </table:table-cell>
          <table:table-cell table:style-name="ce11" table:formula="of:=VLOOKUP([.C286];[Listado.$A$2:.$D$19];4;0)" office:value-type="float" office:value="0">
            <text:p>#N/D</text:p>
          </table:table-cell>
          <table:table-cell table:style-name="ce11" table:formula="of:=VLOOKUP([.D286];[Listado.$A$2:.$D$19];4;0)" office:value-type="float" office:value="0">
            <text:p>#N/D</text:p>
          </table:table-cell>
          <table:table-cell table:style-name="ce11" table:formula="of:=VLOOKUP([.E286];[Listado.$A$2:.$D$19];4;0)" office:value-type="float" office:value="0">
            <text:p>#N/D</text:p>
          </table:table-cell>
          <table:table-cell table:style-name="ce11" table:formula="of:=VLOOKUP([.H286];[Listado.$A$2:.$D$19];4;0)" office:value-type="float" office:value="0">
            <text:p>#N/D</text:p>
          </table:table-cell>
          <table:table-cell table:style-name="ce11" table:formula="of:=COUNTIF([.J286:.M286];[.N28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7];0;[.F287])" office:value-type="float" office:value="0">
            <text:p>0</text:p>
          </table:table-cell>
          <table:table-cell table:style-name="ce9"/>
          <table:table-cell table:style-name="ce11" table:formula="of:=VLOOKUP([.B287];[Listado.$A$2:.$D$19];4;0)" office:value-type="float" office:value="0">
            <text:p>#N/D</text:p>
          </table:table-cell>
          <table:table-cell table:style-name="ce11" table:formula="of:=VLOOKUP([.C287];[Listado.$A$2:.$D$19];4;0)" office:value-type="float" office:value="0">
            <text:p>#N/D</text:p>
          </table:table-cell>
          <table:table-cell table:style-name="ce11" table:formula="of:=VLOOKUP([.D287];[Listado.$A$2:.$D$19];4;0)" office:value-type="float" office:value="0">
            <text:p>#N/D</text:p>
          </table:table-cell>
          <table:table-cell table:style-name="ce11" table:formula="of:=VLOOKUP([.E287];[Listado.$A$2:.$D$19];4;0)" office:value-type="float" office:value="0">
            <text:p>#N/D</text:p>
          </table:table-cell>
          <table:table-cell table:style-name="ce11" table:formula="of:=VLOOKUP([.H287];[Listado.$A$2:.$D$19];4;0)" office:value-type="float" office:value="0">
            <text:p>#N/D</text:p>
          </table:table-cell>
          <table:table-cell table:style-name="ce11" table:formula="of:=COUNTIF([.J287:.M287];[.N28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8];0;[.F288])" office:value-type="float" office:value="0">
            <text:p>0</text:p>
          </table:table-cell>
          <table:table-cell table:style-name="ce9"/>
          <table:table-cell table:style-name="ce11" table:formula="of:=VLOOKUP([.B288];[Listado.$A$2:.$D$19];4;0)" office:value-type="float" office:value="0">
            <text:p>#N/D</text:p>
          </table:table-cell>
          <table:table-cell table:style-name="ce11" table:formula="of:=VLOOKUP([.C288];[Listado.$A$2:.$D$19];4;0)" office:value-type="float" office:value="0">
            <text:p>#N/D</text:p>
          </table:table-cell>
          <table:table-cell table:style-name="ce11" table:formula="of:=VLOOKUP([.D288];[Listado.$A$2:.$D$19];4;0)" office:value-type="float" office:value="0">
            <text:p>#N/D</text:p>
          </table:table-cell>
          <table:table-cell table:style-name="ce11" table:formula="of:=VLOOKUP([.E288];[Listado.$A$2:.$D$19];4;0)" office:value-type="float" office:value="0">
            <text:p>#N/D</text:p>
          </table:table-cell>
          <table:table-cell table:style-name="ce11" table:formula="of:=VLOOKUP([.H288];[Listado.$A$2:.$D$19];4;0)" office:value-type="float" office:value="0">
            <text:p>#N/D</text:p>
          </table:table-cell>
          <table:table-cell table:style-name="ce11" table:formula="of:=COUNTIF([.J288:.M288];[.N28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89];0;[.F289])" office:value-type="float" office:value="0">
            <text:p>0</text:p>
          </table:table-cell>
          <table:table-cell table:style-name="ce9"/>
          <table:table-cell table:style-name="ce11" table:formula="of:=VLOOKUP([.B289];[Listado.$A$2:.$D$19];4;0)" office:value-type="float" office:value="0">
            <text:p>#N/D</text:p>
          </table:table-cell>
          <table:table-cell table:style-name="ce11" table:formula="of:=VLOOKUP([.C289];[Listado.$A$2:.$D$19];4;0)" office:value-type="float" office:value="0">
            <text:p>#N/D</text:p>
          </table:table-cell>
          <table:table-cell table:style-name="ce11" table:formula="of:=VLOOKUP([.D289];[Listado.$A$2:.$D$19];4;0)" office:value-type="float" office:value="0">
            <text:p>#N/D</text:p>
          </table:table-cell>
          <table:table-cell table:style-name="ce11" table:formula="of:=VLOOKUP([.E289];[Listado.$A$2:.$D$19];4;0)" office:value-type="float" office:value="0">
            <text:p>#N/D</text:p>
          </table:table-cell>
          <table:table-cell table:style-name="ce11" table:formula="of:=VLOOKUP([.H289];[Listado.$A$2:.$D$19];4;0)" office:value-type="float" office:value="0">
            <text:p>#N/D</text:p>
          </table:table-cell>
          <table:table-cell table:style-name="ce11" table:formula="of:=COUNTIF([.J289:.M289];[.N28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0];0;[.F290])" office:value-type="float" office:value="0">
            <text:p>0</text:p>
          </table:table-cell>
          <table:table-cell table:style-name="ce9"/>
          <table:table-cell table:style-name="ce11" table:formula="of:=VLOOKUP([.B290];[Listado.$A$2:.$D$19];4;0)" office:value-type="float" office:value="0">
            <text:p>#N/D</text:p>
          </table:table-cell>
          <table:table-cell table:style-name="ce11" table:formula="of:=VLOOKUP([.C290];[Listado.$A$2:.$D$19];4;0)" office:value-type="float" office:value="0">
            <text:p>#N/D</text:p>
          </table:table-cell>
          <table:table-cell table:style-name="ce11" table:formula="of:=VLOOKUP([.D290];[Listado.$A$2:.$D$19];4;0)" office:value-type="float" office:value="0">
            <text:p>#N/D</text:p>
          </table:table-cell>
          <table:table-cell table:style-name="ce11" table:formula="of:=VLOOKUP([.E290];[Listado.$A$2:.$D$19];4;0)" office:value-type="float" office:value="0">
            <text:p>#N/D</text:p>
          </table:table-cell>
          <table:table-cell table:style-name="ce11" table:formula="of:=VLOOKUP([.H290];[Listado.$A$2:.$D$19];4;0)" office:value-type="float" office:value="0">
            <text:p>#N/D</text:p>
          </table:table-cell>
          <table:table-cell table:style-name="ce11" table:formula="of:=COUNTIF([.J290:.M290];[.N29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1];0;[.F291])" office:value-type="float" office:value="0">
            <text:p>0</text:p>
          </table:table-cell>
          <table:table-cell table:style-name="ce9"/>
          <table:table-cell table:style-name="ce11" table:formula="of:=VLOOKUP([.B291];[Listado.$A$2:.$D$19];4;0)" office:value-type="float" office:value="0">
            <text:p>#N/D</text:p>
          </table:table-cell>
          <table:table-cell table:style-name="ce11" table:formula="of:=VLOOKUP([.C291];[Listado.$A$2:.$D$19];4;0)" office:value-type="float" office:value="0">
            <text:p>#N/D</text:p>
          </table:table-cell>
          <table:table-cell table:style-name="ce11" table:formula="of:=VLOOKUP([.D291];[Listado.$A$2:.$D$19];4;0)" office:value-type="float" office:value="0">
            <text:p>#N/D</text:p>
          </table:table-cell>
          <table:table-cell table:style-name="ce11" table:formula="of:=VLOOKUP([.E291];[Listado.$A$2:.$D$19];4;0)" office:value-type="float" office:value="0">
            <text:p>#N/D</text:p>
          </table:table-cell>
          <table:table-cell table:style-name="ce11" table:formula="of:=VLOOKUP([.H291];[Listado.$A$2:.$D$19];4;0)" office:value-type="float" office:value="0">
            <text:p>#N/D</text:p>
          </table:table-cell>
          <table:table-cell table:style-name="ce11" table:formula="of:=COUNTIF([.J291:.M291];[.N29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2];0;[.F292])" office:value-type="float" office:value="0">
            <text:p>0</text:p>
          </table:table-cell>
          <table:table-cell table:style-name="ce9"/>
          <table:table-cell table:style-name="ce11" table:formula="of:=VLOOKUP([.B292];[Listado.$A$2:.$D$19];4;0)" office:value-type="float" office:value="0">
            <text:p>#N/D</text:p>
          </table:table-cell>
          <table:table-cell table:style-name="ce11" table:formula="of:=VLOOKUP([.C292];[Listado.$A$2:.$D$19];4;0)" office:value-type="float" office:value="0">
            <text:p>#N/D</text:p>
          </table:table-cell>
          <table:table-cell table:style-name="ce11" table:formula="of:=VLOOKUP([.D292];[Listado.$A$2:.$D$19];4;0)" office:value-type="float" office:value="0">
            <text:p>#N/D</text:p>
          </table:table-cell>
          <table:table-cell table:style-name="ce11" table:formula="of:=VLOOKUP([.E292];[Listado.$A$2:.$D$19];4;0)" office:value-type="float" office:value="0">
            <text:p>#N/D</text:p>
          </table:table-cell>
          <table:table-cell table:style-name="ce11" table:formula="of:=VLOOKUP([.H292];[Listado.$A$2:.$D$19];4;0)" office:value-type="float" office:value="0">
            <text:p>#N/D</text:p>
          </table:table-cell>
          <table:table-cell table:style-name="ce11" table:formula="of:=COUNTIF([.J292:.M292];[.N292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3];0;[.F293])" office:value-type="float" office:value="0">
            <text:p>0</text:p>
          </table:table-cell>
          <table:table-cell table:style-name="ce9"/>
          <table:table-cell table:style-name="ce11" table:formula="of:=VLOOKUP([.B293];[Listado.$A$2:.$D$19];4;0)" office:value-type="float" office:value="0">
            <text:p>#N/D</text:p>
          </table:table-cell>
          <table:table-cell table:style-name="ce11" table:formula="of:=VLOOKUP([.C293];[Listado.$A$2:.$D$19];4;0)" office:value-type="float" office:value="0">
            <text:p>#N/D</text:p>
          </table:table-cell>
          <table:table-cell table:style-name="ce11" table:formula="of:=VLOOKUP([.D293];[Listado.$A$2:.$D$19];4;0)" office:value-type="float" office:value="0">
            <text:p>#N/D</text:p>
          </table:table-cell>
          <table:table-cell table:style-name="ce11" table:formula="of:=VLOOKUP([.E293];[Listado.$A$2:.$D$19];4;0)" office:value-type="float" office:value="0">
            <text:p>#N/D</text:p>
          </table:table-cell>
          <table:table-cell table:style-name="ce11" table:formula="of:=VLOOKUP([.H293];[Listado.$A$2:.$D$19];4;0)" office:value-type="float" office:value="0">
            <text:p>#N/D</text:p>
          </table:table-cell>
          <table:table-cell table:style-name="ce11" table:formula="of:=COUNTIF([.J293:.M293];[.N293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4];0;[.F294])" office:value-type="float" office:value="0">
            <text:p>0</text:p>
          </table:table-cell>
          <table:table-cell table:style-name="ce9"/>
          <table:table-cell table:style-name="ce11" table:formula="of:=VLOOKUP([.B294];[Listado.$A$2:.$D$19];4;0)" office:value-type="float" office:value="0">
            <text:p>#N/D</text:p>
          </table:table-cell>
          <table:table-cell table:style-name="ce11" table:formula="of:=VLOOKUP([.C294];[Listado.$A$2:.$D$19];4;0)" office:value-type="float" office:value="0">
            <text:p>#N/D</text:p>
          </table:table-cell>
          <table:table-cell table:style-name="ce11" table:formula="of:=VLOOKUP([.D294];[Listado.$A$2:.$D$19];4;0)" office:value-type="float" office:value="0">
            <text:p>#N/D</text:p>
          </table:table-cell>
          <table:table-cell table:style-name="ce11" table:formula="of:=VLOOKUP([.E294];[Listado.$A$2:.$D$19];4;0)" office:value-type="float" office:value="0">
            <text:p>#N/D</text:p>
          </table:table-cell>
          <table:table-cell table:style-name="ce11" table:formula="of:=VLOOKUP([.H294];[Listado.$A$2:.$D$19];4;0)" office:value-type="float" office:value="0">
            <text:p>#N/D</text:p>
          </table:table-cell>
          <table:table-cell table:style-name="ce11" table:formula="of:=COUNTIF([.J294:.M294];[.N294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5];0;[.F295])" office:value-type="float" office:value="0">
            <text:p>0</text:p>
          </table:table-cell>
          <table:table-cell table:style-name="ce9"/>
          <table:table-cell table:style-name="ce11" table:formula="of:=VLOOKUP([.B295];[Listado.$A$2:.$D$19];4;0)" office:value-type="float" office:value="0">
            <text:p>#N/D</text:p>
          </table:table-cell>
          <table:table-cell table:style-name="ce11" table:formula="of:=VLOOKUP([.C295];[Listado.$A$2:.$D$19];4;0)" office:value-type="float" office:value="0">
            <text:p>#N/D</text:p>
          </table:table-cell>
          <table:table-cell table:style-name="ce11" table:formula="of:=VLOOKUP([.D295];[Listado.$A$2:.$D$19];4;0)" office:value-type="float" office:value="0">
            <text:p>#N/D</text:p>
          </table:table-cell>
          <table:table-cell table:style-name="ce11" table:formula="of:=VLOOKUP([.E295];[Listado.$A$2:.$D$19];4;0)" office:value-type="float" office:value="0">
            <text:p>#N/D</text:p>
          </table:table-cell>
          <table:table-cell table:style-name="ce11" table:formula="of:=VLOOKUP([.H295];[Listado.$A$2:.$D$19];4;0)" office:value-type="float" office:value="0">
            <text:p>#N/D</text:p>
          </table:table-cell>
          <table:table-cell table:style-name="ce11" table:formula="of:=COUNTIF([.J295:.M295];[.N295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6];0;[.F296])" office:value-type="float" office:value="0">
            <text:p>0</text:p>
          </table:table-cell>
          <table:table-cell table:style-name="ce9"/>
          <table:table-cell table:style-name="ce11" table:formula="of:=VLOOKUP([.B296];[Listado.$A$2:.$D$19];4;0)" office:value-type="float" office:value="0">
            <text:p>#N/D</text:p>
          </table:table-cell>
          <table:table-cell table:style-name="ce11" table:formula="of:=VLOOKUP([.C296];[Listado.$A$2:.$D$19];4;0)" office:value-type="float" office:value="0">
            <text:p>#N/D</text:p>
          </table:table-cell>
          <table:table-cell table:style-name="ce11" table:formula="of:=VLOOKUP([.D296];[Listado.$A$2:.$D$19];4;0)" office:value-type="float" office:value="0">
            <text:p>#N/D</text:p>
          </table:table-cell>
          <table:table-cell table:style-name="ce11" table:formula="of:=VLOOKUP([.E296];[Listado.$A$2:.$D$19];4;0)" office:value-type="float" office:value="0">
            <text:p>#N/D</text:p>
          </table:table-cell>
          <table:table-cell table:style-name="ce11" table:formula="of:=VLOOKUP([.H296];[Listado.$A$2:.$D$19];4;0)" office:value-type="float" office:value="0">
            <text:p>#N/D</text:p>
          </table:table-cell>
          <table:table-cell table:style-name="ce11" table:formula="of:=COUNTIF([.J296:.M296];[.N296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7];0;[.F297])" office:value-type="float" office:value="0">
            <text:p>0</text:p>
          </table:table-cell>
          <table:table-cell table:style-name="ce9"/>
          <table:table-cell table:style-name="ce11" table:formula="of:=VLOOKUP([.B297];[Listado.$A$2:.$D$19];4;0)" office:value-type="float" office:value="0">
            <text:p>#N/D</text:p>
          </table:table-cell>
          <table:table-cell table:style-name="ce11" table:formula="of:=VLOOKUP([.C297];[Listado.$A$2:.$D$19];4;0)" office:value-type="float" office:value="0">
            <text:p>#N/D</text:p>
          </table:table-cell>
          <table:table-cell table:style-name="ce11" table:formula="of:=VLOOKUP([.D297];[Listado.$A$2:.$D$19];4;0)" office:value-type="float" office:value="0">
            <text:p>#N/D</text:p>
          </table:table-cell>
          <table:table-cell table:style-name="ce11" table:formula="of:=VLOOKUP([.E297];[Listado.$A$2:.$D$19];4;0)" office:value-type="float" office:value="0">
            <text:p>#N/D</text:p>
          </table:table-cell>
          <table:table-cell table:style-name="ce11" table:formula="of:=VLOOKUP([.H297];[Listado.$A$2:.$D$19];4;0)" office:value-type="float" office:value="0">
            <text:p>#N/D</text:p>
          </table:table-cell>
          <table:table-cell table:style-name="ce11" table:formula="of:=COUNTIF([.J297:.M297];[.N297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8];0;[.F298])" office:value-type="float" office:value="0">
            <text:p>0</text:p>
          </table:table-cell>
          <table:table-cell table:style-name="ce9"/>
          <table:table-cell table:style-name="ce11" table:formula="of:=VLOOKUP([.B298];[Listado.$A$2:.$D$19];4;0)" office:value-type="float" office:value="0">
            <text:p>#N/D</text:p>
          </table:table-cell>
          <table:table-cell table:style-name="ce11" table:formula="of:=VLOOKUP([.C298];[Listado.$A$2:.$D$19];4;0)" office:value-type="float" office:value="0">
            <text:p>#N/D</text:p>
          </table:table-cell>
          <table:table-cell table:style-name="ce11" table:formula="of:=VLOOKUP([.D298];[Listado.$A$2:.$D$19];4;0)" office:value-type="float" office:value="0">
            <text:p>#N/D</text:p>
          </table:table-cell>
          <table:table-cell table:style-name="ce11" table:formula="of:=VLOOKUP([.E298];[Listado.$A$2:.$D$19];4;0)" office:value-type="float" office:value="0">
            <text:p>#N/D</text:p>
          </table:table-cell>
          <table:table-cell table:style-name="ce11" table:formula="of:=VLOOKUP([.H298];[Listado.$A$2:.$D$19];4;0)" office:value-type="float" office:value="0">
            <text:p>#N/D</text:p>
          </table:table-cell>
          <table:table-cell table:style-name="ce11" table:formula="of:=COUNTIF([.J298:.M298];[.N298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299];0;[.F299])" office:value-type="float" office:value="0">
            <text:p>0</text:p>
          </table:table-cell>
          <table:table-cell table:style-name="ce9"/>
          <table:table-cell table:style-name="ce11" table:formula="of:=VLOOKUP([.B299];[Listado.$A$2:.$D$19];4;0)" office:value-type="float" office:value="0">
            <text:p>#N/D</text:p>
          </table:table-cell>
          <table:table-cell table:style-name="ce11" table:formula="of:=VLOOKUP([.C299];[Listado.$A$2:.$D$19];4;0)" office:value-type="float" office:value="0">
            <text:p>#N/D</text:p>
          </table:table-cell>
          <table:table-cell table:style-name="ce11" table:formula="of:=VLOOKUP([.D299];[Listado.$A$2:.$D$19];4;0)" office:value-type="float" office:value="0">
            <text:p>#N/D</text:p>
          </table:table-cell>
          <table:table-cell table:style-name="ce11" table:formula="of:=VLOOKUP([.E299];[Listado.$A$2:.$D$19];4;0)" office:value-type="float" office:value="0">
            <text:p>#N/D</text:p>
          </table:table-cell>
          <table:table-cell table:style-name="ce11" table:formula="of:=VLOOKUP([.H299];[Listado.$A$2:.$D$19];4;0)" office:value-type="float" office:value="0">
            <text:p>#N/D</text:p>
          </table:table-cell>
          <table:table-cell table:style-name="ce11" table:formula="of:=COUNTIF([.J299:.M299];[.N299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300];0;[.F300])" office:value-type="float" office:value="0">
            <text:p>0</text:p>
          </table:table-cell>
          <table:table-cell table:style-name="ce9"/>
          <table:table-cell table:style-name="ce11" table:formula="of:=VLOOKUP([.B300];[Listado.$A$2:.$D$19];4;0)" office:value-type="float" office:value="0">
            <text:p>#N/D</text:p>
          </table:table-cell>
          <table:table-cell table:style-name="ce11" table:formula="of:=VLOOKUP([.C300];[Listado.$A$2:.$D$19];4;0)" office:value-type="float" office:value="0">
            <text:p>#N/D</text:p>
          </table:table-cell>
          <table:table-cell table:style-name="ce11" table:formula="of:=VLOOKUP([.D300];[Listado.$A$2:.$D$19];4;0)" office:value-type="float" office:value="0">
            <text:p>#N/D</text:p>
          </table:table-cell>
          <table:table-cell table:style-name="ce11" table:formula="of:=VLOOKUP([.E300];[Listado.$A$2:.$D$19];4;0)" office:value-type="float" office:value="0">
            <text:p>#N/D</text:p>
          </table:table-cell>
          <table:table-cell table:style-name="ce11" table:formula="of:=VLOOKUP([.H300];[Listado.$A$2:.$D$19];4;0)" office:value-type="float" office:value="0">
            <text:p>#N/D</text:p>
          </table:table-cell>
          <table:table-cell table:style-name="ce11" table:formula="of:=COUNTIF([.J300:.M300];[.N300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style-name="ce4"/>
          <table:table-cell table:number-columns-repeated="4" table:style-name="ce7"/>
          <table:table-cell table:number-columns-repeated="2" table:style-name="ce4"/>
          <table:table-cell table:style-name="ce9" table:formula="of:=OFFSET([.A301];0;[.F301])" office:value-type="float" office:value="0">
            <text:p>0</text:p>
          </table:table-cell>
          <table:table-cell table:style-name="ce9"/>
          <table:table-cell table:style-name="ce11" table:formula="of:=VLOOKUP([.B301];[Listado.$A$2:.$D$19];4;0)" office:value-type="float" office:value="0">
            <text:p>#N/D</text:p>
          </table:table-cell>
          <table:table-cell table:style-name="ce11" table:formula="of:=VLOOKUP([.C301];[Listado.$A$2:.$D$19];4;0)" office:value-type="float" office:value="0">
            <text:p>#N/D</text:p>
          </table:table-cell>
          <table:table-cell table:style-name="ce11" table:formula="of:=VLOOKUP([.D301];[Listado.$A$2:.$D$19];4;0)" office:value-type="float" office:value="0">
            <text:p>#N/D</text:p>
          </table:table-cell>
          <table:table-cell table:style-name="ce11" table:formula="of:=VLOOKUP([.E301];[Listado.$A$2:.$D$19];4;0)" office:value-type="float" office:value="0">
            <text:p>#N/D</text:p>
          </table:table-cell>
          <table:table-cell table:style-name="ce11" table:formula="of:=VLOOKUP([.H301];[Listado.$A$2:.$D$19];4;0)" office:value-type="float" office:value="0">
            <text:p>#N/D</text:p>
          </table:table-cell>
          <table:table-cell table:style-name="ce11" table:formula="of:=COUNTIF([.J301:.M301];[.N301])" office:value-type="float" office:value="0">
            <text:p>#N/D</text:p>
          </table:table-cell>
          <table:table-cell table:style-name="ce9" table:number-columns-repeated="1009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>
          <table:table-cell table:number-columns-repeated="7"/>
          <table:table-cell table:number-columns-repeated="1017"/>
        </table:table-row>
        <table:table-row table:style-name="ro3" table:number-rows-repeated="1048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s" table:style-name="ta2">
        <table:table-column table:style-name="co28" table:default-cell-style-name="ce1"/>
        <table:table-column table:style-name="co2" table:number-columns-repeated="1023" table:default-cell-style-name="ce1"/>
        <table:table-row table:style-name="ro3">
          <table:table-cell office:value-type="string">
            <text:p>var bateria1 = [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] &amp; &quot; es un adverbio de: &quot; &amp; CHAR(34) &amp; &quot;, opciones: [&quot;&amp; CHAR(34)&amp;[Hoja1.B2]&amp; CHAR(34)&amp;&quot;, &quot;&amp; CHAR(34)&amp;[Hoja1.C2]&amp; CHAR(34)&amp;&quot;, &quot;&amp; CHAR(34)&amp;[Hoja1.D2]&amp; CHAR(34)&amp;&quot;, &quot;&amp; CHAR(34)&amp;[Hoja1.E2]&amp; CHAR(34)&amp;&quot;], correcta:  &quot;&amp;[Hoja1.F2]-1&amp; &quot;, observaciones: &quot; &amp; CHAR(34)&amp;[Hoja1.G2]&amp; CHAR(34) &amp; &quot; },&quot;" office:value-type="string" office:string-value=" { id: 1, enunciado: &quot;La palabra Observa el número 1514. Indica cuál es la cifra de las CENTENAS: es un adverbio de: &quot;, opciones: [&quot;7&quot;, &quot;5&quot;, &quot;4&quot;, &quot;3&quot;], correcta:  1, observaciones: &quot;La cifra de las centenas es la tercera de la parte entera contando desde la derecha.&quot; },">
            <text:p><text:s/>{ id: 1, enunciado: "La palabra Observa el número 1514. Indica cuál es la cifra de las CENTENAS: es un adverbio de: ", opciones: ["7", "5", "4", "3"], correcta: <text:s/>1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] &amp; &quot; es un adverbio de: &quot; &amp; CHAR(34) &amp; &quot;, opciones: [&quot;&amp; CHAR(34)&amp;[Hoja1.B3]&amp; CHAR(34)&amp;&quot;, &quot;&amp; CHAR(34)&amp;[Hoja1.C3]&amp; CHAR(34)&amp;&quot;, &quot;&amp; CHAR(34)&amp;[Hoja1.D3]&amp; CHAR(34)&amp;&quot;, &quot;&amp; CHAR(34)&amp;[Hoja1.E3]&amp; CHAR(34)&amp;&quot;], correcta:  &quot;&amp;[Hoja1.F3]-1&amp; &quot;, observaciones: &quot; &amp; CHAR(34)&amp;[Hoja1.G3]&amp; CHAR(34) &amp; &quot; },&quot;" office:value-type="string" office:string-value=" { id: 2, enunciado: &quot;La palabra Observa el número 6721. Indica cuál es la cifra de las CENTENAS: es un adverbio de: &quot;, opciones: [&quot;7&quot;, &quot;6&quot;, &quot;1&quot;, &quot;2&quot;], correcta:  0, observaciones: &quot;La cifra de las centenas es la tercera de la parte entera contando desde la derecha.&quot; },">
            <text:p><text:s/>{ id: 2, enunciado: "La palabra Observa el número 6721. Indica cuál es la cifra de las CENTENAS: es un adverbio de: ", opciones: ["7", "6", "1", "2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4] &amp; &quot; es un adverbio de: &quot; &amp; CHAR(34) &amp; &quot;, opciones: [&quot;&amp; CHAR(34)&amp;[Hoja1.B4]&amp; CHAR(34)&amp;&quot;, &quot;&amp; CHAR(34)&amp;[Hoja1.C4]&amp; CHAR(34)&amp;&quot;, &quot;&amp; CHAR(34)&amp;[Hoja1.D4]&amp; CHAR(34)&amp;&quot;, &quot;&amp; CHAR(34)&amp;[Hoja1.E4]&amp; CHAR(34)&amp;&quot;], correcta:  &quot;&amp;[Hoja1.F4]-1&amp; &quot;, observaciones: &quot; &amp; CHAR(34)&amp;[Hoja1.G4]&amp; CHAR(34) &amp; &quot; },&quot;" office:value-type="string" office:string-value=" { id: 3, enunciado: &quot;La palabra Observa el número 9863. Indica cuál es la cifra de las CENTENAS: es un adverbio de: &quot;, opciones: [&quot;8&quot;, &quot;9&quot;, &quot;3&quot;, &quot;6&quot;], correcta:  0, observaciones: &quot;La cifra de las centenas es la tercera de la parte entera contando desde la derecha.&quot; },">
            <text:p><text:s/>{ id: 3, enunciado: "La palabra Observa el número 9863. Indica cuál es la cifra de las CENTENAS: es un adverbio de: ", opciones: ["8", "9", "3", "6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5] &amp; &quot; es un adverbio de: &quot; &amp; CHAR(34) &amp; &quot;, opciones: [&quot;&amp; CHAR(34)&amp;[Hoja1.B5]&amp; CHAR(34)&amp;&quot;, &quot;&amp; CHAR(34)&amp;[Hoja1.C5]&amp; CHAR(34)&amp;&quot;, &quot;&amp; CHAR(34)&amp;[Hoja1.D5]&amp; CHAR(34)&amp;&quot;, &quot;&amp; CHAR(34)&amp;[Hoja1.E5]&amp; CHAR(34)&amp;&quot;], correcta:  &quot;&amp;[Hoja1.F5]-1&amp; &quot;, observaciones: &quot; &amp; CHAR(34)&amp;[Hoja1.G5]&amp; CHAR(34) &amp; &quot; },&quot;" office:value-type="string" office:string-value=" { id: 4, enunciado: &quot;La palabra Observa el número 1296. Indica cuál es la cifra de las CENTENAS: es un adverbio de: &quot;, opciones: [&quot;9&quot;, &quot;4&quot;, &quot;2&quot;, &quot;1&quot;], correcta:  2, observaciones: &quot;La cifra de las centenas es la tercera de la parte entera contando desde la derecha.&quot; },">
            <text:p><text:s/>{ id: 4, enunciado: "La palabra Observa el número 1296. Indica cuál es la cifra de las CENTENAS: es un adverbio de: ", opciones: ["9", "4", "2", "1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6] &amp; &quot; es un adverbio de: &quot; &amp; CHAR(34) &amp; &quot;, opciones: [&quot;&amp; CHAR(34)&amp;[Hoja1.B6]&amp; CHAR(34)&amp;&quot;, &quot;&amp; CHAR(34)&amp;[Hoja1.C6]&amp; CHAR(34)&amp;&quot;, &quot;&amp; CHAR(34)&amp;[Hoja1.D6]&amp; CHAR(34)&amp;&quot;, &quot;&amp; CHAR(34)&amp;[Hoja1.E6]&amp; CHAR(34)&amp;&quot;], correcta:  &quot;&amp;[Hoja1.F6]-1&amp; &quot;, observaciones: &quot; &amp; CHAR(34)&amp;[Hoja1.G6]&amp; CHAR(34) &amp; &quot; },&quot;" office:value-type="string" office:string-value=" { id: 5, enunciado: &quot;La palabra Observa el número 6751. Indica cuál es la cifra de las CENTENAS: es un adverbio de: &quot;, opciones: [&quot;9&quot;, &quot;2&quot;, &quot;7&quot;, &quot;5&quot;], correcta:  2, observaciones: &quot;La cifra de las centenas es la tercera de la parte entera contando desde la derecha.&quot; },">
            <text:p><text:s/>{ id: 5, enunciado: "La palabra Observa el número 6751. Indica cuál es la cifra de las CENTENAS: es un adverbio de: ", opciones: ["9", "2", "7", "5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7] &amp; &quot; es un adverbio de: &quot; &amp; CHAR(34) &amp; &quot;, opciones: [&quot;&amp; CHAR(34)&amp;[Hoja1.B7]&amp; CHAR(34)&amp;&quot;, &quot;&amp; CHAR(34)&amp;[Hoja1.C7]&amp; CHAR(34)&amp;&quot;, &quot;&amp; CHAR(34)&amp;[Hoja1.D7]&amp; CHAR(34)&amp;&quot;, &quot;&amp; CHAR(34)&amp;[Hoja1.E7]&amp; CHAR(34)&amp;&quot;], correcta:  &quot;&amp;[Hoja1.F7]-1&amp; &quot;, observaciones: &quot; &amp; CHAR(34)&amp;[Hoja1.G7]&amp; CHAR(34) &amp; &quot; },&quot;" office:value-type="string" office:string-value=" { id: 6, enunciado: &quot;La palabra Observa el número 2781. Indica cuál es la cifra de las CENTENAS: es un adverbio de: &quot;, opciones: [&quot;2&quot;, &quot;5&quot;, &quot;7&quot;, &quot;6&quot;], correcta:  2, observaciones: &quot;La cifra de las centenas es la tercera de la parte entera contando desde la derecha.&quot; },">
            <text:p><text:s/>{ id: 6, enunciado: "La palabra Observa el número 2781. Indica cuál es la cifra de las CENTENAS: es un adverbio de: ", opciones: ["2", "5", "7", "6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8] &amp; &quot; es un adverbio de: &quot; &amp; CHAR(34) &amp; &quot;, opciones: [&quot;&amp; CHAR(34)&amp;[Hoja1.B8]&amp; CHAR(34)&amp;&quot;, &quot;&amp; CHAR(34)&amp;[Hoja1.C8]&amp; CHAR(34)&amp;&quot;, &quot;&amp; CHAR(34)&amp;[Hoja1.D8]&amp; CHAR(34)&amp;&quot;, &quot;&amp; CHAR(34)&amp;[Hoja1.E8]&amp; CHAR(34)&amp;&quot;], correcta:  &quot;&amp;[Hoja1.F8]-1&amp; &quot;, observaciones: &quot; &amp; CHAR(34)&amp;[Hoja1.G8]&amp; CHAR(34) &amp; &quot; },&quot;" office:value-type="string" office:string-value=" { id: 7, enunciado: &quot;La palabra Observa el número 1586. Indica cuál es la cifra de las CENTENAS: es un adverbio de: &quot;, opciones: [&quot;5&quot;, &quot;8&quot;, &quot;3&quot;, &quot;9&quot;], correcta:  0, observaciones: &quot;La cifra de las centenas es la tercera de la parte entera contando desde la derecha.&quot; },">
            <text:p><text:s/>{ id: 7, enunciado: "La palabra Observa el número 1586. Indica cuál es la cifra de las CENTENAS: es un adverbio de: ", opciones: ["5", "8", "3", "9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9] &amp; &quot; es un adverbio de: &quot; &amp; CHAR(34) &amp; &quot;, opciones: [&quot;&amp; CHAR(34)&amp;[Hoja1.B9]&amp; CHAR(34)&amp;&quot;, &quot;&amp; CHAR(34)&amp;[Hoja1.C9]&amp; CHAR(34)&amp;&quot;, &quot;&amp; CHAR(34)&amp;[Hoja1.D9]&amp; CHAR(34)&amp;&quot;, &quot;&amp; CHAR(34)&amp;[Hoja1.E9]&amp; CHAR(34)&amp;&quot;], correcta:  &quot;&amp;[Hoja1.F9]-1&amp; &quot;, observaciones: &quot; &amp; CHAR(34)&amp;[Hoja1.G9]&amp; CHAR(34) &amp; &quot; },&quot;" office:value-type="string" office:string-value=" { id: 8, enunciado: &quot;La palabra Observa el número 1024. Indica cuál es la cifra de las CENTENAS: es un adverbio de: &quot;, opciones: [&quot;6&quot;, &quot;1&quot;, &quot;0&quot;, &quot;3&quot;], correcta:  2, observaciones: &quot;La cifra de las centenas es la tercera de la parte entera contando desde la derecha.&quot; },">
            <text:p><text:s/>{ id: 8, enunciado: "La palabra Observa el número 1024. Indica cuál es la cifra de las CENTENAS: es un adverbio de: ", opciones: ["6", "1", "0", "3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0] &amp; &quot; es un adverbio de: &quot; &amp; CHAR(34) &amp; &quot;, opciones: [&quot;&amp; CHAR(34)&amp;[Hoja1.B10]&amp; CHAR(34)&amp;&quot;, &quot;&amp; CHAR(34)&amp;[Hoja1.C10]&amp; CHAR(34)&amp;&quot;, &quot;&amp; CHAR(34)&amp;[Hoja1.D10]&amp; CHAR(34)&amp;&quot;, &quot;&amp; CHAR(34)&amp;[Hoja1.E10]&amp; CHAR(34)&amp;&quot;], correcta:  &quot;&amp;[Hoja1.F10]-1&amp; &quot;, observaciones: &quot; &amp; CHAR(34)&amp;[Hoja1.G10]&amp; CHAR(34) &amp; &quot; },&quot;" office:value-type="string" office:string-value=" { id: 9, enunciado: &quot;La palabra Observa el número 4815. Indica cuál es la cifra de las CENTENAS: es un adverbio de: &quot;, opciones: [&quot;3&quot;, &quot;8&quot;, &quot;6&quot;, &quot;9&quot;], correcta:  1, observaciones: &quot;La cifra de las centenas es la tercera de la parte entera contando desde la derecha.&quot; },">
            <text:p><text:s/>{ id: 9, enunciado: "La palabra Observa el número 4815. Indica cuál es la cifra de las CENTENAS: es un adverbio de: ", opciones: ["3", "8", "6", "9"], correcta: <text:s/>1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1] &amp; &quot; es un adverbio de: &quot; &amp; CHAR(34) &amp; &quot;, opciones: [&quot;&amp; CHAR(34)&amp;[Hoja1.B11]&amp; CHAR(34)&amp;&quot;, &quot;&amp; CHAR(34)&amp;[Hoja1.C11]&amp; CHAR(34)&amp;&quot;, &quot;&amp; CHAR(34)&amp;[Hoja1.D11]&amp; CHAR(34)&amp;&quot;, &quot;&amp; CHAR(34)&amp;[Hoja1.E11]&amp; CHAR(34)&amp;&quot;], correcta:  &quot;&amp;[Hoja1.F11]-1&amp; &quot;, observaciones: &quot; &amp; CHAR(34)&amp;[Hoja1.G11]&amp; CHAR(34) &amp; &quot; },&quot;" office:value-type="string" office:string-value=" { id: 10, enunciado: &quot;La palabra Observa el número 9852. Indica cuál es la cifra de las CENTENAS: es un adverbio de: &quot;, opciones: [&quot;2&quot;, &quot;8&quot;, &quot;7&quot;, &quot;9&quot;], correcta:  1, observaciones: &quot;La cifra de las centenas es la tercera de la parte entera contando desde la derecha.&quot; },">
            <text:p><text:s/>{ id: 10, enunciado: "La palabra Observa el número 9852. Indica cuál es la cifra de las CENTENAS: es un adverbio de: ", opciones: ["2", "8", "7", "9"], correcta: <text:s/>1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2] &amp; &quot; es un adverbio de: &quot; &amp; CHAR(34) &amp; &quot;, opciones: [&quot;&amp; CHAR(34)&amp;[Hoja1.B12]&amp; CHAR(34)&amp;&quot;, &quot;&amp; CHAR(34)&amp;[Hoja1.C12]&amp; CHAR(34)&amp;&quot;, &quot;&amp; CHAR(34)&amp;[Hoja1.D12]&amp; CHAR(34)&amp;&quot;, &quot;&amp; CHAR(34)&amp;[Hoja1.E12]&amp; CHAR(34)&amp;&quot;], correcta:  &quot;&amp;[Hoja1.F12]-1&amp; &quot;, observaciones: &quot; &amp; CHAR(34)&amp;[Hoja1.G12]&amp; CHAR(34) &amp; &quot; },&quot;" office:value-type="string" office:string-value=" { id: 11, enunciado: &quot;La palabra Observa el número 2835. Indica cuál es la cifra de las CENTENAS: es un adverbio de: &quot;, opciones: [&quot;6&quot;, &quot;0&quot;, &quot;4&quot;, &quot;8&quot;], correcta:  3, observaciones: &quot;La cifra de las centenas es la tercera de la parte entera contando desde la derecha.&quot; },">
            <text:p><text:s/>{ id: 11, enunciado: "La palabra Observa el número 2835. Indica cuál es la cifra de las CENTENAS: es un adverbio de: ", opciones: ["6", "0", "4", "8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3] &amp; &quot; es un adverbio de: &quot; &amp; CHAR(34) &amp; &quot;, opciones: [&quot;&amp; CHAR(34)&amp;[Hoja1.B13]&amp; CHAR(34)&amp;&quot;, &quot;&amp; CHAR(34)&amp;[Hoja1.C13]&amp; CHAR(34)&amp;&quot;, &quot;&amp; CHAR(34)&amp;[Hoja1.D13]&amp; CHAR(34)&amp;&quot;, &quot;&amp; CHAR(34)&amp;[Hoja1.E13]&amp; CHAR(34)&amp;&quot;], correcta:  &quot;&amp;[Hoja1.F13]-1&amp; &quot;, observaciones: &quot; &amp; CHAR(34)&amp;[Hoja1.G13]&amp; CHAR(34) &amp; &quot; },&quot;" office:value-type="string" office:string-value=" { id: 12, enunciado: &quot;La palabra Observa el número 1125. Indica cuál es la cifra de las CENTENAS: es un adverbio de: &quot;, opciones: [&quot;5&quot;, &quot;1&quot;, &quot;2&quot;, &quot;8&quot;], correcta:  1, observaciones: &quot;La cifra de las centenas es la tercera de la parte entera contando desde la derecha.&quot; },">
            <text:p><text:s/>{ id: 12, enunciado: "La palabra Observa el número 1125. Indica cuál es la cifra de las CENTENAS: es un adverbio de: ", opciones: ["5", "1", "2", "8"], correcta: <text:s/>1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4] &amp; &quot; es un adverbio de: &quot; &amp; CHAR(34) &amp; &quot;, opciones: [&quot;&amp; CHAR(34)&amp;[Hoja1.B14]&amp; CHAR(34)&amp;&quot;, &quot;&amp; CHAR(34)&amp;[Hoja1.C14]&amp; CHAR(34)&amp;&quot;, &quot;&amp; CHAR(34)&amp;[Hoja1.D14]&amp; CHAR(34)&amp;&quot;, &quot;&amp; CHAR(34)&amp;[Hoja1.E14]&amp; CHAR(34)&amp;&quot;], correcta:  &quot;&amp;[Hoja1.F14]-1&amp; &quot;, observaciones: &quot; &amp; CHAR(34)&amp;[Hoja1.G14]&amp; CHAR(34) &amp; &quot; },&quot;" office:value-type="string" office:string-value=" { id: 13, enunciado: &quot;La palabra Observa el número 1029. Indica cuál es la cifra de las CENTENAS: es un adverbio de: &quot;, opciones: [&quot;9&quot;, &quot;1&quot;, &quot;6&quot;, &quot;0&quot;], correcta:  3, observaciones: &quot;La cifra de las centenas es la tercera de la parte entera contando desde la derecha.&quot; },">
            <text:p><text:s/>{ id: 13, enunciado: "La palabra Observa el número 1029. Indica cuál es la cifra de las CENTENAS: es un adverbio de: ", opciones: ["9", "1", "6", "0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5] &amp; &quot; es un adverbio de: &quot; &amp; CHAR(34) &amp; &quot;, opciones: [&quot;&amp; CHAR(34)&amp;[Hoja1.B15]&amp; CHAR(34)&amp;&quot;, &quot;&amp; CHAR(34)&amp;[Hoja1.C15]&amp; CHAR(34)&amp;&quot;, &quot;&amp; CHAR(34)&amp;[Hoja1.D15]&amp; CHAR(34)&amp;&quot;, &quot;&amp; CHAR(34)&amp;[Hoja1.E15]&amp; CHAR(34)&amp;&quot;], correcta:  &quot;&amp;[Hoja1.F15]-1&amp; &quot;, observaciones: &quot; &amp; CHAR(34)&amp;[Hoja1.G15]&amp; CHAR(34) &amp; &quot; },&quot;" office:value-type="string" office:string-value=" { id: 14, enunciado: &quot;La palabra Observa el número 8973. Indica cuál es la cifra de las CENTENAS: es un adverbio de: &quot;, opciones: [&quot;1&quot;, &quot;3&quot;, &quot;4&quot;, &quot;9&quot;], correcta:  3, observaciones: &quot;La cifra de las centenas es la tercera de la parte entera contando desde la derecha.&quot; },">
            <text:p><text:s/>{ id: 14, enunciado: "La palabra Observa el número 8973. Indica cuál es la cifra de las CENTENAS: es un adverbio de: ", opciones: ["1", "3", "4", "9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6] &amp; &quot; es un adverbio de: &quot; &amp; CHAR(34) &amp; &quot;, opciones: [&quot;&amp; CHAR(34)&amp;[Hoja1.B16]&amp; CHAR(34)&amp;&quot;, &quot;&amp; CHAR(34)&amp;[Hoja1.C16]&amp; CHAR(34)&amp;&quot;, &quot;&amp; CHAR(34)&amp;[Hoja1.D16]&amp; CHAR(34)&amp;&quot;, &quot;&amp; CHAR(34)&amp;[Hoja1.E16]&amp; CHAR(34)&amp;&quot;], correcta:  &quot;&amp;[Hoja1.F16]-1&amp; &quot;, observaciones: &quot; &amp; CHAR(34)&amp;[Hoja1.G16]&amp; CHAR(34) &amp; &quot; },&quot;" office:value-type="string" office:string-value=" { id: 15, enunciado: &quot;La palabra Observa el número 1279. Indica cuál es la cifra de las CENTENAS: es un adverbio de: &quot;, opciones: [&quot;6&quot;, &quot;9&quot;, &quot;4&quot;, &quot;2&quot;], correcta:  3, observaciones: &quot;La cifra de las centenas es la tercera de la parte entera contando desde la derecha.&quot; },">
            <text:p><text:s/>{ id: 15, enunciado: "La palabra Observa el número 1279. Indica cuál es la cifra de las CENTENAS: es un adverbio de: ", opciones: ["6", "9", "4", "2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7] &amp; &quot; es un adverbio de: &quot; &amp; CHAR(34) &amp; &quot;, opciones: [&quot;&amp; CHAR(34)&amp;[Hoja1.B17]&amp; CHAR(34)&amp;&quot;, &quot;&amp; CHAR(34)&amp;[Hoja1.C17]&amp; CHAR(34)&amp;&quot;, &quot;&amp; CHAR(34)&amp;[Hoja1.D17]&amp; CHAR(34)&amp;&quot;, &quot;&amp; CHAR(34)&amp;[Hoja1.E17]&amp; CHAR(34)&amp;&quot;], correcta:  &quot;&amp;[Hoja1.F17]-1&amp; &quot;, observaciones: &quot; &amp; CHAR(34)&amp;[Hoja1.G17]&amp; CHAR(34) &amp; &quot; },&quot;" office:value-type="string" office:string-value=" { id: 16, enunciado: &quot;La palabra Observa el número 9603. Indica cuál es la cifra de las CENTENAS: es un adverbio de: &quot;, opciones: [&quot;9&quot;, &quot;6&quot;, &quot;1&quot;, &quot;0&quot;], correcta:  1, observaciones: &quot;La cifra de las centenas es la tercera de la parte entera contando desde la derecha.&quot; },">
            <text:p><text:s/>{ id: 16, enunciado: "La palabra Observa el número 9603. Indica cuál es la cifra de las CENTENAS: es un adverbio de: ", opciones: ["9", "6", "1", "0"], correcta: <text:s/>1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8] &amp; &quot; es un adverbio de: &quot; &amp; CHAR(34) &amp; &quot;, opciones: [&quot;&amp; CHAR(34)&amp;[Hoja1.B18]&amp; CHAR(34)&amp;&quot;, &quot;&amp; CHAR(34)&amp;[Hoja1.C18]&amp; CHAR(34)&amp;&quot;, &quot;&amp; CHAR(34)&amp;[Hoja1.D18]&amp; CHAR(34)&amp;&quot;, &quot;&amp; CHAR(34)&amp;[Hoja1.E18]&amp; CHAR(34)&amp;&quot;], correcta:  &quot;&amp;[Hoja1.F18]-1&amp; &quot;, observaciones: &quot; &amp; CHAR(34)&amp;[Hoja1.G18]&amp; CHAR(34) &amp; &quot; },&quot;" office:value-type="string" office:string-value=" { id: 17, enunciado: &quot;La palabra Observa el número 3247. Indica cuál es la cifra de las CENTENAS: es un adverbio de: &quot;, opciones: [&quot;2&quot;, &quot;5&quot;, &quot;4&quot;, &quot;9&quot;], correcta:  0, observaciones: &quot;La cifra de las centenas es la tercera de la parte entera contando desde la derecha.&quot; },">
            <text:p><text:s/>{ id: 17, enunciado: "La palabra Observa el número 3247. Indica cuál es la cifra de las CENTENAS: es un adverbio de: ", opciones: ["2", "5", "4", "9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19] &amp; &quot; es un adverbio de: &quot; &amp; CHAR(34) &amp; &quot;, opciones: [&quot;&amp; CHAR(34)&amp;[Hoja1.B19]&amp; CHAR(34)&amp;&quot;, &quot;&amp; CHAR(34)&amp;[Hoja1.C19]&amp; CHAR(34)&amp;&quot;, &quot;&amp; CHAR(34)&amp;[Hoja1.D19]&amp; CHAR(34)&amp;&quot;, &quot;&amp; CHAR(34)&amp;[Hoja1.E19]&amp; CHAR(34)&amp;&quot;], correcta:  &quot;&amp;[Hoja1.F19]-1&amp; &quot;, observaciones: &quot; &amp; CHAR(34)&amp;[Hoja1.G19]&amp; CHAR(34) &amp; &quot; },&quot;" office:value-type="string" office:string-value=" { id: 18, enunciado: &quot;La palabra Observa el número 9386. Indica cuál es la cifra de las CENTENAS: es un adverbio de: &quot;, opciones: [&quot;6&quot;, &quot;0&quot;, &quot;3&quot;, &quot;1&quot;], correcta:  2, observaciones: &quot;La cifra de las centenas es la tercera de la parte entera contando desde la derecha.&quot; },">
            <text:p><text:s/>{ id: 18, enunciado: "La palabra Observa el número 9386. Indica cuál es la cifra de las CENTENAS: es un adverbio de: ", opciones: ["6", "0", "3", "1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0] &amp; &quot; es un adverbio de: &quot; &amp; CHAR(34) &amp; &quot;, opciones: [&quot;&amp; CHAR(34)&amp;[Hoja1.B20]&amp; CHAR(34)&amp;&quot;, &quot;&amp; CHAR(34)&amp;[Hoja1.C20]&amp; CHAR(34)&amp;&quot;, &quot;&amp; CHAR(34)&amp;[Hoja1.D20]&amp; CHAR(34)&amp;&quot;, &quot;&amp; CHAR(34)&amp;[Hoja1.E20]&amp; CHAR(34)&amp;&quot;], correcta:  &quot;&amp;[Hoja1.F20]-1&amp; &quot;, observaciones: &quot; &amp; CHAR(34)&amp;[Hoja1.G20]&amp; CHAR(34) &amp; &quot; },&quot;" office:value-type="string" office:string-value=" { id: 19, enunciado: &quot;La palabra Observa el número 6248. Indica cuál es la cifra de las CENTENAS: es un adverbio de: &quot;, opciones: [&quot;0&quot;, &quot;1&quot;, &quot;3&quot;, &quot;2&quot;], correcta:  3, observaciones: &quot;La cifra de las centenas es la tercera de la parte entera contando desde la derecha.&quot; },">
            <text:p><text:s/>{ id: 19, enunciado: "La palabra Observa el número 6248. Indica cuál es la cifra de las CENTENAS: es un adverbio de: ", opciones: ["0", "1", "3", "2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1] &amp; &quot; es un adverbio de: &quot; &amp; CHAR(34) &amp; &quot;, opciones: [&quot;&amp; CHAR(34)&amp;[Hoja1.B21]&amp; CHAR(34)&amp;&quot;, &quot;&amp; CHAR(34)&amp;[Hoja1.C21]&amp; CHAR(34)&amp;&quot;, &quot;&amp; CHAR(34)&amp;[Hoja1.D21]&amp; CHAR(34)&amp;&quot;, &quot;&amp; CHAR(34)&amp;[Hoja1.E21]&amp; CHAR(34)&amp;&quot;], correcta:  &quot;&amp;[Hoja1.F21]-1&amp; &quot;, observaciones: &quot; &amp; CHAR(34)&amp;[Hoja1.G21]&amp; CHAR(34) &amp; &quot; },&quot;" office:value-type="string" office:string-value=" { id: 20, enunciado: &quot;La palabra Observa el número 3287. Indica cuál es la cifra de las CENTENAS: es un adverbio de: &quot;, opciones: [&quot;7&quot;, &quot;6&quot;, &quot;2&quot;, &quot;9&quot;], correcta:  2, observaciones: &quot;La cifra de las centenas es la tercera de la parte entera contando desde la derecha.&quot; },">
            <text:p><text:s/>{ id: 20, enunciado: "La palabra Observa el número 3287. Indica cuál es la cifra de las CENTENAS: es un adverbio de: ", opciones: ["7", "6", "2", "9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2] &amp; &quot; es un adverbio de: &quot; &amp; CHAR(34) &amp; &quot;, opciones: [&quot;&amp; CHAR(34)&amp;[Hoja1.B22]&amp; CHAR(34)&amp;&quot;, &quot;&amp; CHAR(34)&amp;[Hoja1.C22]&amp; CHAR(34)&amp;&quot;, &quot;&amp; CHAR(34)&amp;[Hoja1.D22]&amp; CHAR(34)&amp;&quot;, &quot;&amp; CHAR(34)&amp;[Hoja1.E22]&amp; CHAR(34)&amp;&quot;], correcta:  &quot;&amp;[Hoja1.F22]-1&amp; &quot;, observaciones: &quot; &amp; CHAR(34)&amp;[Hoja1.G22]&amp; CHAR(34) &amp; &quot; },&quot;" office:value-type="string" office:string-value=" { id: 21, enunciado: &quot;La palabra Observa el número 3971. Indica cuál es la cifra de las CENTENAS: es un adverbio de: &quot;, opciones: [&quot;5&quot;, &quot;3&quot;, &quot;1&quot;, &quot;9&quot;], correcta:  3, observaciones: &quot;La cifra de las centenas es la tercera de la parte entera contando desde la derecha.&quot; },">
            <text:p><text:s/>{ id: 21, enunciado: "La palabra Observa el número 3971. Indica cuál es la cifra de las CENTENAS: es un adverbio de: ", opciones: ["5", "3", "1", "9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3] &amp; &quot; es un adverbio de: &quot; &amp; CHAR(34) &amp; &quot;, opciones: [&quot;&amp; CHAR(34)&amp;[Hoja1.B23]&amp; CHAR(34)&amp;&quot;, &quot;&amp; CHAR(34)&amp;[Hoja1.C23]&amp; CHAR(34)&amp;&quot;, &quot;&amp; CHAR(34)&amp;[Hoja1.D23]&amp; CHAR(34)&amp;&quot;, &quot;&amp; CHAR(34)&amp;[Hoja1.E23]&amp; CHAR(34)&amp;&quot;], correcta:  &quot;&amp;[Hoja1.F23]-1&amp; &quot;, observaciones: &quot; &amp; CHAR(34)&amp;[Hoja1.G23]&amp; CHAR(34) &amp; &quot; },&quot;" office:value-type="string" office:string-value=" { id: 22, enunciado: &quot;La palabra Observa el número 1063. Indica cuál es la cifra de las CENTENAS: es un adverbio de: &quot;, opciones: [&quot;1&quot;, &quot;0&quot;, &quot;3&quot;, &quot;6&quot;], correcta:  1, observaciones: &quot;La cifra de las centenas es la tercera de la parte entera contando desde la derecha.&quot; },">
            <text:p><text:s/>{ id: 22, enunciado: "La palabra Observa el número 1063. Indica cuál es la cifra de las CENTENAS: es un adverbio de: ", opciones: ["1", "0", "3", "6"], correcta: <text:s/>1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4] &amp; &quot; es un adverbio de: &quot; &amp; CHAR(34) &amp; &quot;, opciones: [&quot;&amp; CHAR(34)&amp;[Hoja1.B24]&amp; CHAR(34)&amp;&quot;, &quot;&amp; CHAR(34)&amp;[Hoja1.C24]&amp; CHAR(34)&amp;&quot;, &quot;&amp; CHAR(34)&amp;[Hoja1.D24]&amp; CHAR(34)&amp;&quot;, &quot;&amp; CHAR(34)&amp;[Hoja1.E24]&amp; CHAR(34)&amp;&quot;], correcta:  &quot;&amp;[Hoja1.F24]-1&amp; &quot;, observaciones: &quot; &amp; CHAR(34)&amp;[Hoja1.G24]&amp; CHAR(34) &amp; &quot; },&quot;" office:value-type="string" office:string-value=" { id: 23, enunciado: &quot;La palabra Observa el número 8136. Indica cuál es la cifra de las CENTENAS: es un adverbio de: &quot;, opciones: [&quot;1&quot;, &quot;3&quot;, &quot;8&quot;, &quot;5&quot;], correcta:  0, observaciones: &quot;La cifra de las centenas es la tercera de la parte entera contando desde la derecha.&quot; },">
            <text:p><text:s/>{ id: 23, enunciado: "La palabra Observa el número 8136. Indica cuál es la cifra de las CENTENAS: es un adverbio de: ", opciones: ["1", "3", "8", "5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5] &amp; &quot; es un adverbio de: &quot; &amp; CHAR(34) &amp; &quot;, opciones: [&quot;&amp; CHAR(34)&amp;[Hoja1.B25]&amp; CHAR(34)&amp;&quot;, &quot;&amp; CHAR(34)&amp;[Hoja1.C25]&amp; CHAR(34)&amp;&quot;, &quot;&amp; CHAR(34)&amp;[Hoja1.D25]&amp; CHAR(34)&amp;&quot;, &quot;&amp; CHAR(34)&amp;[Hoja1.E25]&amp; CHAR(34)&amp;&quot;], correcta:  &quot;&amp;[Hoja1.F25]-1&amp; &quot;, observaciones: &quot; &amp; CHAR(34)&amp;[Hoja1.G25]&amp; CHAR(34) &amp; &quot; },&quot;" office:value-type="string" office:string-value=" { id: 24, enunciado: &quot;La palabra Observa el número 2130. Indica cuál es la cifra de las CENTENAS: es un adverbio de: &quot;, opciones: [&quot;2&quot;, &quot;7&quot;, &quot;1&quot;, &quot;0&quot;], correcta:  2, observaciones: &quot;La cifra de las centenas es la tercera de la parte entera contando desde la derecha.&quot; },">
            <text:p><text:s/>{ id: 24, enunciado: "La palabra Observa el número 2130. Indica cuál es la cifra de las CENTENAS: es un adverbio de: ", opciones: ["2", "7", "1", "0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6] &amp; &quot; es un adverbio de: &quot; &amp; CHAR(34) &amp; &quot;, opciones: [&quot;&amp; CHAR(34)&amp;[Hoja1.B26]&amp; CHAR(34)&amp;&quot;, &quot;&amp; CHAR(34)&amp;[Hoja1.C26]&amp; CHAR(34)&amp;&quot;, &quot;&amp; CHAR(34)&amp;[Hoja1.D26]&amp; CHAR(34)&amp;&quot;, &quot;&amp; CHAR(34)&amp;[Hoja1.E26]&amp; CHAR(34)&amp;&quot;], correcta:  &quot;&amp;[Hoja1.F26]-1&amp; &quot;, observaciones: &quot; &amp; CHAR(34)&amp;[Hoja1.G26]&amp; CHAR(34) &amp; &quot; },&quot;" office:value-type="string" office:string-value=" { id: 25, enunciado: &quot;La palabra Observa el número 6251. Indica cuál es la cifra de las CENTENAS: es un adverbio de: &quot;, opciones: [&quot;9&quot;, &quot;5&quot;, &quot;4&quot;, &quot;2&quot;], correcta:  3, observaciones: &quot;La cifra de las centenas es la tercera de la parte entera contando desde la derecha.&quot; },">
            <text:p><text:s/>{ id: 25, enunciado: "La palabra Observa el número 6251. Indica cuál es la cifra de las CENTENAS: es un adverbio de: ", opciones: ["9", "5", "4", "2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7] &amp; &quot; es un adverbio de: &quot; &amp; CHAR(34) &amp; &quot;, opciones: [&quot;&amp; CHAR(34)&amp;[Hoja1.B27]&amp; CHAR(34)&amp;&quot;, &quot;&amp; CHAR(34)&amp;[Hoja1.C27]&amp; CHAR(34)&amp;&quot;, &quot;&amp; CHAR(34)&amp;[Hoja1.D27]&amp; CHAR(34)&amp;&quot;, &quot;&amp; CHAR(34)&amp;[Hoja1.E27]&amp; CHAR(34)&amp;&quot;], correcta:  &quot;&amp;[Hoja1.F27]-1&amp; &quot;, observaciones: &quot; &amp; CHAR(34)&amp;[Hoja1.G27]&amp; CHAR(34) &amp; &quot; },&quot;" office:value-type="string" office:string-value=" { id: 26, enunciado: &quot;La palabra Observa el número 3278. Indica cuál es la cifra de las CENTENAS: es un adverbio de: &quot;, opciones: [&quot;1&quot;, &quot;3&quot;, &quot;2&quot;, &quot;0&quot;], correcta:  2, observaciones: &quot;La cifra de las centenas es la tercera de la parte entera contando desde la derecha.&quot; },">
            <text:p><text:s/>{ id: 26, enunciado: "La palabra Observa el número 3278. Indica cuál es la cifra de las CENTENAS: es un adverbio de: ", opciones: ["1", "3", "2", "0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8] &amp; &quot; es un adverbio de: &quot; &amp; CHAR(34) &amp; &quot;, opciones: [&quot;&amp; CHAR(34)&amp;[Hoja1.B28]&amp; CHAR(34)&amp;&quot;, &quot;&amp; CHAR(34)&amp;[Hoja1.C28]&amp; CHAR(34)&amp;&quot;, &quot;&amp; CHAR(34)&amp;[Hoja1.D28]&amp; CHAR(34)&amp;&quot;, &quot;&amp; CHAR(34)&amp;[Hoja1.E28]&amp; CHAR(34)&amp;&quot;], correcta:  &quot;&amp;[Hoja1.F28]-1&amp; &quot;, observaciones: &quot; &amp; CHAR(34)&amp;[Hoja1.G28]&amp; CHAR(34) &amp; &quot; },&quot;" office:value-type="string" office:string-value=" { id: 27, enunciado: &quot;La palabra Observa el número 3548. Indica cuál es la cifra de las CENTENAS: es un adverbio de: &quot;, opciones: [&quot;0&quot;, &quot;6&quot;, &quot;4&quot;, &quot;5&quot;], correcta:  3, observaciones: &quot;La cifra de las centenas es la tercera de la parte entera contando desde la derecha.&quot; },">
            <text:p><text:s/>{ id: 27, enunciado: "La palabra Observa el número 3548. Indica cuál es la cifra de las CENTENAS: es un adverbio de: ", opciones: ["0", "6", "4", "5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29] &amp; &quot; es un adverbio de: &quot; &amp; CHAR(34) &amp; &quot;, opciones: [&quot;&amp; CHAR(34)&amp;[Hoja1.B29]&amp; CHAR(34)&amp;&quot;, &quot;&amp; CHAR(34)&amp;[Hoja1.C29]&amp; CHAR(34)&amp;&quot;, &quot;&amp; CHAR(34)&amp;[Hoja1.D29]&amp; CHAR(34)&amp;&quot;, &quot;&amp; CHAR(34)&amp;[Hoja1.E29]&amp; CHAR(34)&amp;&quot;], correcta:  &quot;&amp;[Hoja1.F29]-1&amp; &quot;, observaciones: &quot; &amp; CHAR(34)&amp;[Hoja1.G29]&amp; CHAR(34) &amp; &quot; },&quot;" office:value-type="string" office:string-value=" { id: 28, enunciado: &quot;La palabra Observa el número 3720. Indica cuál es la cifra de las CENTENAS: es un adverbio de: &quot;, opciones: [&quot;7&quot;, &quot;3&quot;, &quot;0&quot;, &quot;1&quot;], correcta:  0, observaciones: &quot;La cifra de las centenas es la tercera de la parte entera contando desde la derecha.&quot; },">
            <text:p><text:s/>{ id: 28, enunciado: "La palabra Observa el número 3720. Indica cuál es la cifra de las CENTENAS: es un adverbio de: ", opciones: ["7", "3", "0", "1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0] &amp; &quot; es un adverbio de: &quot; &amp; CHAR(34) &amp; &quot;, opciones: [&quot;&amp; CHAR(34)&amp;[Hoja1.B30]&amp; CHAR(34)&amp;&quot;, &quot;&amp; CHAR(34)&amp;[Hoja1.C30]&amp; CHAR(34)&amp;&quot;, &quot;&amp; CHAR(34)&amp;[Hoja1.D30]&amp; CHAR(34)&amp;&quot;, &quot;&amp; CHAR(34)&amp;[Hoja1.E30]&amp; CHAR(34)&amp;&quot;], correcta:  &quot;&amp;[Hoja1.F30]-1&amp; &quot;, observaciones: &quot; &amp; CHAR(34)&amp;[Hoja1.G30]&amp; CHAR(34) &amp; &quot; },&quot;" office:value-type="string" office:string-value=" { id: 29, enunciado: &quot;La palabra Observa el número 6403. Indica cuál es la cifra de las CENTENAS: es un adverbio de: &quot;, opciones: [&quot;3&quot;, &quot;1&quot;, &quot;6&quot;, &quot;4&quot;], correcta:  3, observaciones: &quot;La cifra de las centenas es la tercera de la parte entera contando desde la derecha.&quot; },">
            <text:p><text:s/>{ id: 29, enunciado: "La palabra Observa el número 6403. Indica cuál es la cifra de las CENTENAS: es un adverbio de: ", opciones: ["3", "1", "6", "4"], correcta: <text:s/>3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1] &amp; &quot; es un adverbio de: &quot; &amp; CHAR(34) &amp; &quot;, opciones: [&quot;&amp; CHAR(34)&amp;[Hoja1.B31]&amp; CHAR(34)&amp;&quot;, &quot;&amp; CHAR(34)&amp;[Hoja1.C31]&amp; CHAR(34)&amp;&quot;, &quot;&amp; CHAR(34)&amp;[Hoja1.D31]&amp; CHAR(34)&amp;&quot;, &quot;&amp; CHAR(34)&amp;[Hoja1.E31]&amp; CHAR(34)&amp;&quot;], correcta:  &quot;&amp;[Hoja1.F31]-1&amp; &quot;, observaciones: &quot; &amp; CHAR(34)&amp;[Hoja1.G31]&amp; CHAR(34) &amp; &quot; },&quot;" office:value-type="string" office:string-value=" { id: 30, enunciado: &quot;La palabra Observa el número 5239. Indica cuál es la cifra de las CENTENAS: es un adverbio de: &quot;, opciones: [&quot;2&quot;, &quot;3&quot;, &quot;4&quot;, &quot;9&quot;], correcta:  0, observaciones: &quot;La cifra de las centenas es la tercera de la parte entera contando desde la derecha.&quot; },">
            <text:p><text:s/>{ id: 30, enunciado: "La palabra Observa el número 5239. Indica cuál es la cifra de las CENTENAS: es un adverbio de: ", opciones: ["2", "3", "4", "9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2] &amp; &quot; es un adverbio de: &quot; &amp; CHAR(34) &amp; &quot;, opciones: [&quot;&amp; CHAR(34)&amp;[Hoja1.B32]&amp; CHAR(34)&amp;&quot;, &quot;&amp; CHAR(34)&amp;[Hoja1.C32]&amp; CHAR(34)&amp;&quot;, &quot;&amp; CHAR(34)&amp;[Hoja1.D32]&amp; CHAR(34)&amp;&quot;, &quot;&amp; CHAR(34)&amp;[Hoja1.E32]&amp; CHAR(34)&amp;&quot;], correcta:  &quot;&amp;[Hoja1.F32]-1&amp; &quot;, observaciones: &quot; &amp; CHAR(34)&amp;[Hoja1.G32]&amp; CHAR(34) &amp; &quot; },&quot;" office:value-type="string" office:string-value=" { id: 31, enunciado: &quot;La palabra Observa el número 9318. Indica cuál es la cifra de las CENTENAS: es un adverbio de: &quot;, opciones: [&quot;1&quot;, &quot;3&quot;, &quot;7&quot;, &quot;0&quot;], correcta:  1, observaciones: &quot;La cifra de las centenas es la tercera de la parte entera contando desde la derecha.&quot; },">
            <text:p><text:s/>{ id: 31, enunciado: "La palabra Observa el número 9318. Indica cuál es la cifra de las CENTENAS: es un adverbio de: ", opciones: ["1", "3", "7", "0"], correcta: <text:s/>1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3] &amp; &quot; es un adverbio de: &quot; &amp; CHAR(34) &amp; &quot;, opciones: [&quot;&amp; CHAR(34)&amp;[Hoja1.B33]&amp; CHAR(34)&amp;&quot;, &quot;&amp; CHAR(34)&amp;[Hoja1.C33]&amp; CHAR(34)&amp;&quot;, &quot;&amp; CHAR(34)&amp;[Hoja1.D33]&amp; CHAR(34)&amp;&quot;, &quot;&amp; CHAR(34)&amp;[Hoja1.E33]&amp; CHAR(34)&amp;&quot;], correcta:  &quot;&amp;[Hoja1.F33]-1&amp; &quot;, observaciones: &quot; &amp; CHAR(34)&amp;[Hoja1.G33]&amp; CHAR(34) &amp; &quot; },&quot;" office:value-type="string" office:string-value=" { id: 32, enunciado: &quot;La palabra Observa el número 5194. Indica cuál es la cifra de las CENTENAS: es un adverbio de: &quot;, opciones: [&quot;9&quot;, &quot;0&quot;, &quot;1&quot;, &quot;5&quot;], correcta:  2, observaciones: &quot;La cifra de las centenas es la tercera de la parte entera contando desde la derecha.&quot; },">
            <text:p><text:s/>{ id: 32, enunciado: "La palabra Observa el número 5194. Indica cuál es la cifra de las CENTENAS: es un adverbio de: ", opciones: ["9", "0", "1", "5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4] &amp; &quot; es un adverbio de: &quot; &amp; CHAR(34) &amp; &quot;, opciones: [&quot;&amp; CHAR(34)&amp;[Hoja1.B34]&amp; CHAR(34)&amp;&quot;, &quot;&amp; CHAR(34)&amp;[Hoja1.C34]&amp; CHAR(34)&amp;&quot;, &quot;&amp; CHAR(34)&amp;[Hoja1.D34]&amp; CHAR(34)&amp;&quot;, &quot;&amp; CHAR(34)&amp;[Hoja1.E34]&amp; CHAR(34)&amp;&quot;], correcta:  &quot;&amp;[Hoja1.F34]-1&amp; &quot;, observaciones: &quot; &amp; CHAR(34)&amp;[Hoja1.G34]&amp; CHAR(34) &amp; &quot; },&quot;" office:value-type="string" office:string-value=" { id: 33, enunciado: &quot;La palabra Observa el número 1976. Indica cuál es la cifra de las CENTENAS: es un adverbio de: &quot;, opciones: [&quot;9&quot;, &quot;5&quot;, &quot;4&quot;, &quot;2&quot;], correcta:  0, observaciones: &quot;La cifra de las centenas es la tercera de la parte entera contando desde la derecha.&quot; },">
            <text:p><text:s/>{ id: 33, enunciado: "La palabra Observa el número 1976. Indica cuál es la cifra de las CENTENAS: es un adverbio de: ", opciones: ["9", "5", "4", "2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5] &amp; &quot; es un adverbio de: &quot; &amp; CHAR(34) &amp; &quot;, opciones: [&quot;&amp; CHAR(34)&amp;[Hoja1.B35]&amp; CHAR(34)&amp;&quot;, &quot;&amp; CHAR(34)&amp;[Hoja1.C35]&amp; CHAR(34)&amp;&quot;, &quot;&amp; CHAR(34)&amp;[Hoja1.D35]&amp; CHAR(34)&amp;&quot;, &quot;&amp; CHAR(34)&amp;[Hoja1.E35]&amp; CHAR(34)&amp;&quot;], correcta:  &quot;&amp;[Hoja1.F35]-1&amp; &quot;, observaciones: &quot; &amp; CHAR(34)&amp;[Hoja1.G35]&amp; CHAR(34) &amp; &quot; },&quot;" office:value-type="string" office:string-value=" { id: 34, enunciado: &quot;La palabra Observa el número 1435. Indica cuál es la cifra de las CENTENAS: es un adverbio de: &quot;, opciones: [&quot;4&quot;, &quot;9&quot;, &quot;8&quot;, &quot;3&quot;], correcta:  0, observaciones: &quot;La cifra de las centenas es la tercera de la parte entera contando desde la derecha.&quot; },">
            <text:p><text:s/>{ id: 34, enunciado: "La palabra Observa el número 1435. Indica cuál es la cifra de las CENTENAS: es un adverbio de: ", opciones: ["4", "9", "8", "3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6] &amp; &quot; es un adverbio de: &quot; &amp; CHAR(34) &amp; &quot;, opciones: [&quot;&amp; CHAR(34)&amp;[Hoja1.B36]&amp; CHAR(34)&amp;&quot;, &quot;&amp; CHAR(34)&amp;[Hoja1.C36]&amp; CHAR(34)&amp;&quot;, &quot;&amp; CHAR(34)&amp;[Hoja1.D36]&amp; CHAR(34)&amp;&quot;, &quot;&amp; CHAR(34)&amp;[Hoja1.E36]&amp; CHAR(34)&amp;&quot;], correcta:  &quot;&amp;[Hoja1.F36]-1&amp; &quot;, observaciones: &quot; &amp; CHAR(34)&amp;[Hoja1.G36]&amp; CHAR(34) &amp; &quot; },&quot;" office:value-type="string" office:string-value=" { id: 35, enunciado: &quot;La palabra Observa el número 1925. Indica cuál es la cifra de las CENTENAS: es un adverbio de: &quot;, opciones: [&quot;9&quot;, &quot;7&quot;, &quot;1&quot;, &quot;3&quot;], correcta:  0, observaciones: &quot;La cifra de las centenas es la tercera de la parte entera contando desde la derecha.&quot; },">
            <text:p><text:s/>{ id: 35, enunciado: "La palabra Observa el número 1925. Indica cuál es la cifra de las CENTENAS: es un adverbio de: ", opciones: ["9", "7", "1", "3"], correcta: <text:s/>0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7] &amp; &quot; es un adverbio de: &quot; &amp; CHAR(34) &amp; &quot;, opciones: [&quot;&amp; CHAR(34)&amp;[Hoja1.B37]&amp; CHAR(34)&amp;&quot;, &quot;&amp; CHAR(34)&amp;[Hoja1.C37]&amp; CHAR(34)&amp;&quot;, &quot;&amp; CHAR(34)&amp;[Hoja1.D37]&amp; CHAR(34)&amp;&quot;, &quot;&amp; CHAR(34)&amp;[Hoja1.E37]&amp; CHAR(34)&amp;&quot;], correcta:  &quot;&amp;[Hoja1.F37]-1&amp; &quot;, observaciones: &quot; &amp; CHAR(34)&amp;[Hoja1.G37]&amp; CHAR(34) &amp; &quot; },&quot;" office:value-type="string" office:string-value=" { id: 36, enunciado: &quot;La palabra Observa el número 8537. Indica cuál es la cifra de las CENTENAS: es un adverbio de: &quot;, opciones: [&quot;6&quot;, &quot;5&quot;, &quot;2&quot;, &quot;3&quot;], correcta:  1, observaciones: &quot;La cifra de las centenas es la tercera de la parte entera contando desde la derecha.&quot; },">
            <text:p><text:s/>{ id: 36, enunciado: "La palabra Observa el número 8537. Indica cuál es la cifra de las CENTENAS: es un adverbio de: ", opciones: ["6", "5", "2", "3"], correcta: <text:s/>1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8] &amp; &quot; es un adverbio de: &quot; &amp; CHAR(34) &amp; &quot;, opciones: [&quot;&amp; CHAR(34)&amp;[Hoja1.B38]&amp; CHAR(34)&amp;&quot;, &quot;&amp; CHAR(34)&amp;[Hoja1.C38]&amp; CHAR(34)&amp;&quot;, &quot;&amp; CHAR(34)&amp;[Hoja1.D38]&amp; CHAR(34)&amp;&quot;, &quot;&amp; CHAR(34)&amp;[Hoja1.E38]&amp; CHAR(34)&amp;&quot;], correcta:  &quot;&amp;[Hoja1.F38]-1&amp; &quot;, observaciones: &quot; &amp; CHAR(34)&amp;[Hoja1.G38]&amp; CHAR(34) &amp; &quot; },&quot;" office:value-type="string" office:string-value=" { id: 37, enunciado: &quot;La palabra Observa el número 7982. Indica cuál es la cifra de las CENTENAS: es un adverbio de: &quot;, opciones: [&quot;2&quot;, &quot;7&quot;, &quot;9&quot;, &quot;5&quot;], correcta:  2, observaciones: &quot;La cifra de las centenas es la tercera de la parte entera contando desde la derecha.&quot; },">
            <text:p><text:s/>{ id: 37, enunciado: "La palabra Observa el número 7982. Indica cuál es la cifra de las CENTENAS: es un adverbio de: ", opciones: ["2", "7", "9", "5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39] &amp; &quot; es un adverbio de: &quot; &amp; CHAR(34) &amp; &quot;, opciones: [&quot;&amp; CHAR(34)&amp;[Hoja1.B39]&amp; CHAR(34)&amp;&quot;, &quot;&amp; CHAR(34)&amp;[Hoja1.C39]&amp; CHAR(34)&amp;&quot;, &quot;&amp; CHAR(34)&amp;[Hoja1.D39]&amp; CHAR(34)&amp;&quot;, &quot;&amp; CHAR(34)&amp;[Hoja1.E39]&amp; CHAR(34)&amp;&quot;], correcta:  &quot;&amp;[Hoja1.F39]-1&amp; &quot;, observaciones: &quot; &amp; CHAR(34)&amp;[Hoja1.G39]&amp; CHAR(34) &amp; &quot; },&quot;" office:value-type="string" office:string-value=" { id: 38, enunciado: &quot;La palabra Observa el número 7564. Indica cuál es la cifra de las CENTENAS: es un adverbio de: &quot;, opciones: [&quot;3&quot;, &quot;8&quot;, &quot;5&quot;, &quot;4&quot;], correcta:  2, observaciones: &quot;La cifra de las centenas es la tercera de la parte entera contando desde la derecha.&quot; },">
            <text:p><text:s/>{ id: 38, enunciado: "La palabra Observa el número 7564. Indica cuál es la cifra de las CENTENAS: es un adverbio de: ", opciones: ["3", "8", "5", "4"], correcta: <text:s/>2, observaciones: "La cifra de las centenas es la tercer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2" table:formula="of:=&quot; { id: &quot;&amp;ROW()-1&amp;&quot;, enunciado: &quot; &amp; CHAR(34)&amp;&quot;La palabra &quot; &amp; [Hoja1.A40] &amp; &quot; es un adverbio de: &quot; &amp; CHAR(34) &amp; &quot;, opciones: [&quot;&amp; CHAR(34)&amp;[Hoja1.B40]&amp; CHAR(34)&amp;&quot;, &quot;&amp; CHAR(34)&amp;[Hoja1.C40]&amp; CHAR(34)&amp;&quot;, &quot;&amp; CHAR(34)&amp;[Hoja1.D40]&amp; CHAR(34)&amp;&quot;, &quot;&amp; CHAR(34)&amp;[Hoja1.E40]&amp; CHAR(34)&amp;&quot;], correcta:  &quot;&amp;[Hoja1.F40]-1&amp; &quot;, observaciones: &quot; &amp; CHAR(34)&amp;[Hoja1.G40]&amp; CHAR(34) &amp; &quot; },&quot;" office:value-type="string" office:string-value=" { id: 39, enunciado: &quot;La palabra Observa el número 2817. Indica cuál es la cifra de las DECENAS: es un adverbio de: &quot;, opciones: [&quot;9&quot;, &quot;6&quot;, &quot;1&quot;, &quot;7&quot;], correcta:  2, observaciones: &quot;La cifra de las decenas es la segunda de la parte entera contando desde la derecha.&quot; },">
            <text:p><text:s/>{ id: 39, enunciado: "La palabra Observa el número 2817. Indica cuál es la cifra de las DECENAS: es un adverbio de: ", opciones: ["9", "6", "1", "7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1] &amp; &quot;.&quot;  &amp; CHAR(34) &amp; &quot;, opciones: [&quot;&amp; CHAR(34)&amp;[Hoja1.B41]&amp; CHAR(34)&amp;&quot;, &quot;&amp; CHAR(34)&amp;[Hoja1.C41]&amp; CHAR(34)&amp;&quot;, &quot;&amp; CHAR(34)&amp;[Hoja1.D41]&amp; CHAR(34)&amp;&quot;, &quot;&amp; CHAR(34)&amp;[Hoja1.E41]&amp; CHAR(34)&amp;&quot;], correcta:  &quot;&amp;[Hoja1.F41]-1&amp; &quot;, observaciones: &quot; &amp; CHAR(34)&amp;[Hoja1.G41]&amp; CHAR(34) &amp; &quot; },&quot;" office:value-type="string" office:string-value=" { id: 40, enunciado: &quot;Señala el adverbio de Observa el número 6790. Indica cuál es la cifra de las DECENAS:.&quot;, opciones: [&quot;0&quot;, &quot;5&quot;, &quot;9&quot;, &quot;2&quot;], correcta:  2, observaciones: &quot;La cifra de las decenas es la segunda de la parte entera contando desde la derecha.&quot; },">
            <text:p><text:s/>{ id: 40, enunciado: "Señala el adverbio de Observa el número 6790. Indica cuál es la cifra de las DECENAS:.", opciones: ["0", "5", "9", "2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2] &amp; &quot;.&quot;  &amp; CHAR(34) &amp; &quot;, opciones: [&quot;&amp; CHAR(34)&amp;[Hoja1.B42]&amp; CHAR(34)&amp;&quot;, &quot;&amp; CHAR(34)&amp;[Hoja1.C42]&amp; CHAR(34)&amp;&quot;, &quot;&amp; CHAR(34)&amp;[Hoja1.D42]&amp; CHAR(34)&amp;&quot;, &quot;&amp; CHAR(34)&amp;[Hoja1.E42]&amp; CHAR(34)&amp;&quot;], correcta:  &quot;&amp;[Hoja1.F42]-1&amp; &quot;, observaciones: &quot; &amp; CHAR(34)&amp;[Hoja1.G42]&amp; CHAR(34) &amp; &quot; },&quot;" office:value-type="string" office:string-value=" { id: 41, enunciado: &quot;Señala el adverbio de Observa el número 1916. Indica cuál es la cifra de las DECENAS:.&quot;, opciones: [&quot;1&quot;, &quot;7&quot;, &quot;9&quot;, &quot;6&quot;], correcta:  0, observaciones: &quot;La cifra de las decenas es la segunda de la parte entera contando desde la derecha.&quot; },">
            <text:p><text:s/>{ id: 41, enunciado: "Señala el adverbio de Observa el número 1916. Indica cuál es la cifra de las DECENAS:.", opciones: ["1", "7", "9", "6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3] &amp; &quot;.&quot;  &amp; CHAR(34) &amp; &quot;, opciones: [&quot;&amp; CHAR(34)&amp;[Hoja1.B43]&amp; CHAR(34)&amp;&quot;, &quot;&amp; CHAR(34)&amp;[Hoja1.C43]&amp; CHAR(34)&amp;&quot;, &quot;&amp; CHAR(34)&amp;[Hoja1.D43]&amp; CHAR(34)&amp;&quot;, &quot;&amp; CHAR(34)&amp;[Hoja1.E43]&amp; CHAR(34)&amp;&quot;], correcta:  &quot;&amp;[Hoja1.F43]-1&amp; &quot;, observaciones: &quot; &amp; CHAR(34)&amp;[Hoja1.G43]&amp; CHAR(34) &amp; &quot; },&quot;" office:value-type="string" office:string-value=" { id: 42, enunciado: &quot;Señala el adverbio de Observa el número 8671. Indica cuál es la cifra de las DECENAS:.&quot;, opciones: [&quot;1&quot;, &quot;7&quot;, &quot;6&quot;, &quot;0&quot;], correcta:  1, observaciones: &quot;La cifra de las decenas es la segunda de la parte entera contando desde la derecha.&quot; },">
            <text:p><text:s/>{ id: 42, enunciado: "Señala el adverbio de Observa el número 8671. Indica cuál es la cifra de las DECENAS:.", opciones: ["1", "7", "6", "0"], correcta: <text:s/>1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4] &amp; &quot;.&quot;  &amp; CHAR(34) &amp; &quot;, opciones: [&quot;&amp; CHAR(34)&amp;[Hoja1.B44]&amp; CHAR(34)&amp;&quot;, &quot;&amp; CHAR(34)&amp;[Hoja1.C44]&amp; CHAR(34)&amp;&quot;, &quot;&amp; CHAR(34)&amp;[Hoja1.D44]&amp; CHAR(34)&amp;&quot;, &quot;&amp; CHAR(34)&amp;[Hoja1.E44]&amp; CHAR(34)&amp;&quot;], correcta:  &quot;&amp;[Hoja1.F44]-1&amp; &quot;, observaciones: &quot; &amp; CHAR(34)&amp;[Hoja1.G44]&amp; CHAR(34) &amp; &quot; },&quot;" office:value-type="string" office:string-value=" { id: 43, enunciado: &quot;Señala el adverbio de Observa el número 1340. Indica cuál es la cifra de las DECENAS:.&quot;, opciones: [&quot;8&quot;, &quot;4&quot;, &quot;0&quot;, &quot;3&quot;], correcta:  1, observaciones: &quot;La cifra de las decenas es la segunda de la parte entera contando desde la derecha.&quot; },">
            <text:p><text:s/>{ id: 43, enunciado: "Señala el adverbio de Observa el número 1340. Indica cuál es la cifra de las DECENAS:.", opciones: ["8", "4", "0", "3"], correcta: <text:s/>1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5] &amp; &quot;.&quot;  &amp; CHAR(34) &amp; &quot;, opciones: [&quot;&amp; CHAR(34)&amp;[Hoja1.B45]&amp; CHAR(34)&amp;&quot;, &quot;&amp; CHAR(34)&amp;[Hoja1.C45]&amp; CHAR(34)&amp;&quot;, &quot;&amp; CHAR(34)&amp;[Hoja1.D45]&amp; CHAR(34)&amp;&quot;, &quot;&amp; CHAR(34)&amp;[Hoja1.E45]&amp; CHAR(34)&amp;&quot;], correcta:  &quot;&amp;[Hoja1.F45]-1&amp; &quot;, observaciones: &quot; &amp; CHAR(34)&amp;[Hoja1.G45]&amp; CHAR(34) &amp; &quot; },&quot;" office:value-type="string" office:string-value=" { id: 44, enunciado: &quot;Señala el adverbio de Observa el número 5410. Indica cuál es la cifra de las DECENAS:.&quot;, opciones: [&quot;9&quot;, &quot;1&quot;, &quot;8&quot;, &quot;0&quot;], correcta:  1, observaciones: &quot;La cifra de las decenas es la segunda de la parte entera contando desde la derecha.&quot; },">
            <text:p><text:s/>{ id: 44, enunciado: "Señala el adverbio de Observa el número 5410. Indica cuál es la cifra de las DECENAS:.", opciones: ["9", "1", "8", "0"], correcta: <text:s/>1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6] &amp; &quot;.&quot;  &amp; CHAR(34) &amp; &quot;, opciones: [&quot;&amp; CHAR(34)&amp;[Hoja1.B46]&amp; CHAR(34)&amp;&quot;, &quot;&amp; CHAR(34)&amp;[Hoja1.C46]&amp; CHAR(34)&amp;&quot;, &quot;&amp; CHAR(34)&amp;[Hoja1.D46]&amp; CHAR(34)&amp;&quot;, &quot;&amp; CHAR(34)&amp;[Hoja1.E46]&amp; CHAR(34)&amp;&quot;], correcta:  &quot;&amp;[Hoja1.F46]-1&amp; &quot;, observaciones: &quot; &amp; CHAR(34)&amp;[Hoja1.G46]&amp; CHAR(34) &amp; &quot; },&quot;" office:value-type="string" office:string-value=" { id: 45, enunciado: &quot;Señala el adverbio de Observa el número 6423. Indica cuál es la cifra de las DECENAS:.&quot;, opciones: [&quot;0&quot;, &quot;2&quot;, &quot;3&quot;, &quot;5&quot;], correcta:  1, observaciones: &quot;La cifra de las decenas es la segunda de la parte entera contando desde la derecha.&quot; },">
            <text:p><text:s/>{ id: 45, enunciado: "Señala el adverbio de Observa el número 6423. Indica cuál es la cifra de las DECENAS:.", opciones: ["0", "2", "3", "5"], correcta: <text:s/>1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7] &amp; &quot;.&quot;  &amp; CHAR(34) &amp; &quot;, opciones: [&quot;&amp; CHAR(34)&amp;[Hoja1.B47]&amp; CHAR(34)&amp;&quot;, &quot;&amp; CHAR(34)&amp;[Hoja1.C47]&amp; CHAR(34)&amp;&quot;, &quot;&amp; CHAR(34)&amp;[Hoja1.D47]&amp; CHAR(34)&amp;&quot;, &quot;&amp; CHAR(34)&amp;[Hoja1.E47]&amp; CHAR(34)&amp;&quot;], correcta:  &quot;&amp;[Hoja1.F47]-1&amp; &quot;, observaciones: &quot; &amp; CHAR(34)&amp;[Hoja1.G47]&amp; CHAR(34) &amp; &quot; },&quot;" office:value-type="string" office:string-value=" { id: 46, enunciado: &quot;Señala el adverbio de Observa el número 8241. Indica cuál es la cifra de las DECENAS:.&quot;, opciones: [&quot;2&quot;, &quot;1&quot;, &quot;3&quot;, &quot;4&quot;], correcta:  3, observaciones: &quot;La cifra de las decenas es la segunda de la parte entera contando desde la derecha.&quot; },">
            <text:p><text:s/>{ id: 46, enunciado: "Señala el adverbio de Observa el número 8241. Indica cuál es la cifra de las DECENAS:.", opciones: ["2", "1", "3", "4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8] &amp; &quot;.&quot;  &amp; CHAR(34) &amp; &quot;, opciones: [&quot;&amp; CHAR(34)&amp;[Hoja1.B48]&amp; CHAR(34)&amp;&quot;, &quot;&amp; CHAR(34)&amp;[Hoja1.C48]&amp; CHAR(34)&amp;&quot;, &quot;&amp; CHAR(34)&amp;[Hoja1.D48]&amp; CHAR(34)&amp;&quot;, &quot;&amp; CHAR(34)&amp;[Hoja1.E48]&amp; CHAR(34)&amp;&quot;], correcta:  &quot;&amp;[Hoja1.F48]-1&amp; &quot;, observaciones: &quot; &amp; CHAR(34)&amp;[Hoja1.G48]&amp; CHAR(34) &amp; &quot; },&quot;" office:value-type="string" office:string-value=" { id: 47, enunciado: &quot;Señala el adverbio de Observa el número 7364. Indica cuál es la cifra de las DECENAS:.&quot;, opciones: [&quot;7&quot;, &quot;6&quot;, &quot;9&quot;, &quot;0&quot;], correcta:  1, observaciones: &quot;La cifra de las decenas es la segunda de la parte entera contando desde la derecha.&quot; },">
            <text:p><text:s/>{ id: 47, enunciado: "Señala el adverbio de Observa el número 7364. Indica cuál es la cifra de las DECENAS:.", opciones: ["7", "6", "9", "0"], correcta: <text:s/>1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49] &amp; &quot;.&quot;  &amp; CHAR(34) &amp; &quot;, opciones: [&quot;&amp; CHAR(34)&amp;[Hoja1.B49]&amp; CHAR(34)&amp;&quot;, &quot;&amp; CHAR(34)&amp;[Hoja1.C49]&amp; CHAR(34)&amp;&quot;, &quot;&amp; CHAR(34)&amp;[Hoja1.D49]&amp; CHAR(34)&amp;&quot;, &quot;&amp; CHAR(34)&amp;[Hoja1.E49]&amp; CHAR(34)&amp;&quot;], correcta:  &quot;&amp;[Hoja1.F49]-1&amp; &quot;, observaciones: &quot; &amp; CHAR(34)&amp;[Hoja1.G49]&amp; CHAR(34) &amp; &quot; },&quot;" office:value-type="string" office:string-value=" { id: 48, enunciado: &quot;Señala el adverbio de Observa el número 1958. Indica cuál es la cifra de las DECENAS:.&quot;, opciones: [&quot;5&quot;, &quot;1&quot;, &quot;9&quot;, &quot;3&quot;], correcta:  0, observaciones: &quot;La cifra de las decenas es la segunda de la parte entera contando desde la derecha.&quot; },">
            <text:p><text:s/>{ id: 48, enunciado: "Señala el adverbio de Observa el número 1958. Indica cuál es la cifra de las DECENAS:.", opciones: ["5", "1", "9", "3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0] &amp; &quot;.&quot;  &amp; CHAR(34) &amp; &quot;, opciones: [&quot;&amp; CHAR(34)&amp;[Hoja1.B50]&amp; CHAR(34)&amp;&quot;, &quot;&amp; CHAR(34)&amp;[Hoja1.C50]&amp; CHAR(34)&amp;&quot;, &quot;&amp; CHAR(34)&amp;[Hoja1.D50]&amp; CHAR(34)&amp;&quot;, &quot;&amp; CHAR(34)&amp;[Hoja1.E50]&amp; CHAR(34)&amp;&quot;], correcta:  &quot;&amp;[Hoja1.F50]-1&amp; &quot;, observaciones: &quot; &amp; CHAR(34)&amp;[Hoja1.G50]&amp; CHAR(34) &amp; &quot; },&quot;" office:value-type="string" office:string-value=" { id: 49, enunciado: &quot;Señala el adverbio de Observa el número 1860. Indica cuál es la cifra de las DECENAS:.&quot;, opciones: [&quot;3&quot;, &quot;8&quot;, &quot;6&quot;, &quot;0&quot;], correcta:  2, observaciones: &quot;La cifra de las decenas es la segunda de la parte entera contando desde la derecha.&quot; },">
            <text:p><text:s/>{ id: 49, enunciado: "Señala el adverbio de Observa el número 1860. Indica cuál es la cifra de las DECENAS:.", opciones: ["3", "8", "6", "0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1] &amp; &quot;.&quot;  &amp; CHAR(34) &amp; &quot;, opciones: [&quot;&amp; CHAR(34)&amp;[Hoja1.B51]&amp; CHAR(34)&amp;&quot;, &quot;&amp; CHAR(34)&amp;[Hoja1.C51]&amp; CHAR(34)&amp;&quot;, &quot;&amp; CHAR(34)&amp;[Hoja1.D51]&amp; CHAR(34)&amp;&quot;, &quot;&amp; CHAR(34)&amp;[Hoja1.E51]&amp; CHAR(34)&amp;&quot;], correcta:  &quot;&amp;[Hoja1.F51]-1&amp; &quot;, observaciones: &quot; &amp; CHAR(34)&amp;[Hoja1.G51]&amp; CHAR(34) &amp; &quot; },&quot;" office:value-type="string" office:string-value=" { id: 50, enunciado: &quot;Señala el adverbio de Observa el número 6234. Indica cuál es la cifra de las DECENAS:.&quot;, opciones: [&quot;3&quot;, &quot;0&quot;, &quot;2&quot;, &quot;9&quot;], correcta:  0, observaciones: &quot;La cifra de las decenas es la segunda de la parte entera contando desde la derecha.&quot; },">
            <text:p><text:s/>{ id: 50, enunciado: "Señala el adverbio de Observa el número 6234. Indica cuál es la cifra de las DECENAS:.", opciones: ["3", "0", "2", "9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2] &amp; &quot;.&quot;  &amp; CHAR(34) &amp; &quot;, opciones: [&quot;&amp; CHAR(34)&amp;[Hoja1.B52]&amp; CHAR(34)&amp;&quot;, &quot;&amp; CHAR(34)&amp;[Hoja1.C52]&amp; CHAR(34)&amp;&quot;, &quot;&amp; CHAR(34)&amp;[Hoja1.D52]&amp; CHAR(34)&amp;&quot;, &quot;&amp; CHAR(34)&amp;[Hoja1.E52]&amp; CHAR(34)&amp;&quot;], correcta:  &quot;&amp;[Hoja1.F52]-1&amp; &quot;, observaciones: &quot; &amp; CHAR(34)&amp;[Hoja1.G52]&amp; CHAR(34) &amp; &quot; },&quot;" office:value-type="string" office:string-value=" { id: 51, enunciado: &quot;Señala el adverbio de Observa el número 1285. Indica cuál es la cifra de las DECENAS:.&quot;, opciones: [&quot;5&quot;, &quot;3&quot;, &quot;8&quot;, &quot;7&quot;], correcta:  2, observaciones: &quot;La cifra de las decenas es la segunda de la parte entera contando desde la derecha.&quot; },">
            <text:p><text:s/>{ id: 51, enunciado: "Señala el adverbio de Observa el número 1285. Indica cuál es la cifra de las DECENAS:.", opciones: ["5", "3", "8", "7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3] &amp; &quot;.&quot;  &amp; CHAR(34) &amp; &quot;, opciones: [&quot;&amp; CHAR(34)&amp;[Hoja1.B53]&amp; CHAR(34)&amp;&quot;, &quot;&amp; CHAR(34)&amp;[Hoja1.C53]&amp; CHAR(34)&amp;&quot;, &quot;&amp; CHAR(34)&amp;[Hoja1.D53]&amp; CHAR(34)&amp;&quot;, &quot;&amp; CHAR(34)&amp;[Hoja1.E53]&amp; CHAR(34)&amp;&quot;], correcta:  &quot;&amp;[Hoja1.F53]-1&amp; &quot;, observaciones: &quot; &amp; CHAR(34)&amp;[Hoja1.G53]&amp; CHAR(34) &amp; &quot; },&quot;" office:value-type="string" office:string-value=" { id: 52, enunciado: &quot;Señala el adverbio de Observa el número 8532. Indica cuál es la cifra de las DECENAS:.&quot;, opciones: [&quot;1&quot;, &quot;8&quot;, &quot;5&quot;, &quot;3&quot;], correcta:  3, observaciones: &quot;La cifra de las decenas es la segunda de la parte entera contando desde la derecha.&quot; },">
            <text:p><text:s/>{ id: 52, enunciado: "Señala el adverbio de Observa el número 8532. Indica cuál es la cifra de las DECENAS:.", opciones: ["1", "8", "5", "3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4] &amp; &quot;.&quot;  &amp; CHAR(34) &amp; &quot;, opciones: [&quot;&amp; CHAR(34)&amp;[Hoja1.B54]&amp; CHAR(34)&amp;&quot;, &quot;&amp; CHAR(34)&amp;[Hoja1.C54]&amp; CHAR(34)&amp;&quot;, &quot;&amp; CHAR(34)&amp;[Hoja1.D54]&amp; CHAR(34)&amp;&quot;, &quot;&amp; CHAR(34)&amp;[Hoja1.E54]&amp; CHAR(34)&amp;&quot;], correcta:  &quot;&amp;[Hoja1.F54]-1&amp; &quot;, observaciones: &quot; &amp; CHAR(34)&amp;[Hoja1.G54]&amp; CHAR(34) &amp; &quot; },&quot;" office:value-type="string" office:string-value=" { id: 53, enunciado: &quot;Señala el adverbio de Observa el número 4257. Indica cuál es la cifra de las DECENAS:.&quot;, opciones: [&quot;5&quot;, &quot;4&quot;, &quot;9&quot;, &quot;3&quot;], correcta:  0, observaciones: &quot;La cifra de las decenas es la segunda de la parte entera contando desde la derecha.&quot; },">
            <text:p><text:s/>{ id: 53, enunciado: "Señala el adverbio de Observa el número 4257. Indica cuál es la cifra de las DECENAS:.", opciones: ["5", "4", "9", "3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5] &amp; &quot;.&quot;  &amp; CHAR(34) &amp; &quot;, opciones: [&quot;&amp; CHAR(34)&amp;[Hoja1.B55]&amp; CHAR(34)&amp;&quot;, &quot;&amp; CHAR(34)&amp;[Hoja1.C55]&amp; CHAR(34)&amp;&quot;, &quot;&amp; CHAR(34)&amp;[Hoja1.D55]&amp; CHAR(34)&amp;&quot;, &quot;&amp; CHAR(34)&amp;[Hoja1.E55]&amp; CHAR(34)&amp;&quot;], correcta:  &quot;&amp;[Hoja1.F55]-1&amp; &quot;, observaciones: &quot; &amp; CHAR(34)&amp;[Hoja1.G55]&amp; CHAR(34) &amp; &quot; },&quot;" office:value-type="string" office:string-value=" { id: 54, enunciado: &quot;Señala el adverbio de Observa el número 7421. Indica cuál es la cifra de las DECENAS:.&quot;, opciones: [&quot;2&quot;, &quot;7&quot;, &quot;4&quot;, &quot;0&quot;], correcta:  0, observaciones: &quot;La cifra de las decenas es la segunda de la parte entera contando desde la derecha.&quot; },">
            <text:p><text:s/>{ id: 54, enunciado: "Señala el adverbio de Observa el número 7421. Indica cuál es la cifra de las DECENAS:.", opciones: ["2", "7", "4", "0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6] &amp; &quot;.&quot;  &amp; CHAR(34) &amp; &quot;, opciones: [&quot;&amp; CHAR(34)&amp;[Hoja1.B56]&amp; CHAR(34)&amp;&quot;, &quot;&amp; CHAR(34)&amp;[Hoja1.C56]&amp; CHAR(34)&amp;&quot;, &quot;&amp; CHAR(34)&amp;[Hoja1.D56]&amp; CHAR(34)&amp;&quot;, &quot;&amp; CHAR(34)&amp;[Hoja1.E56]&amp; CHAR(34)&amp;&quot;], correcta:  &quot;&amp;[Hoja1.F56]-1&amp; &quot;, observaciones: &quot; &amp; CHAR(34)&amp;[Hoja1.G56]&amp; CHAR(34) &amp; &quot; },&quot;" office:value-type="string" office:string-value=" { id: 55, enunciado: &quot;Señala el adverbio de Observa el número 8960. Indica cuál es la cifra de las DECENAS:.&quot;, opciones: [&quot;6&quot;, &quot;9&quot;, &quot;2&quot;, &quot;8&quot;], correcta:  0, observaciones: &quot;La cifra de las decenas es la segunda de la parte entera contando desde la derecha.&quot; },">
            <text:p><text:s/>{ id: 55, enunciado: "Señala el adverbio de Observa el número 8960. Indica cuál es la cifra de las DECENAS:.", opciones: ["6", "9", "2", "8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7] &amp; &quot;.&quot;  &amp; CHAR(34) &amp; &quot;, opciones: [&quot;&amp; CHAR(34)&amp;[Hoja1.B57]&amp; CHAR(34)&amp;&quot;, &quot;&amp; CHAR(34)&amp;[Hoja1.C57]&amp; CHAR(34)&amp;&quot;, &quot;&amp; CHAR(34)&amp;[Hoja1.D57]&amp; CHAR(34)&amp;&quot;, &quot;&amp; CHAR(34)&amp;[Hoja1.E57]&amp; CHAR(34)&amp;&quot;], correcta:  &quot;&amp;[Hoja1.F57]-1&amp; &quot;, observaciones: &quot; &amp; CHAR(34)&amp;[Hoja1.G57]&amp; CHAR(34) &amp; &quot; },&quot;" office:value-type="string" office:string-value=" { id: 56, enunciado: &quot;Señala el adverbio de Observa el número 6219. Indica cuál es la cifra de las DECENAS:.&quot;, opciones: [&quot;6&quot;, &quot;7&quot;, &quot;1&quot;, &quot;9&quot;], correcta:  2, observaciones: &quot;La cifra de las decenas es la segunda de la parte entera contando desde la derecha.&quot; },">
            <text:p><text:s/>{ id: 56, enunciado: "Señala el adverbio de Observa el número 6219. Indica cuál es la cifra de las DECENAS:.", opciones: ["6", "7", "1", "9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8] &amp; &quot;.&quot;  &amp; CHAR(34) &amp; &quot;, opciones: [&quot;&amp; CHAR(34)&amp;[Hoja1.B58]&amp; CHAR(34)&amp;&quot;, &quot;&amp; CHAR(34)&amp;[Hoja1.C58]&amp; CHAR(34)&amp;&quot;, &quot;&amp; CHAR(34)&amp;[Hoja1.D58]&amp; CHAR(34)&amp;&quot;, &quot;&amp; CHAR(34)&amp;[Hoja1.E58]&amp; CHAR(34)&amp;&quot;], correcta:  &quot;&amp;[Hoja1.F58]-1&amp; &quot;, observaciones: &quot; &amp; CHAR(34)&amp;[Hoja1.G58]&amp; CHAR(34) &amp; &quot; },&quot;" office:value-type="string" office:string-value=" { id: 57, enunciado: &quot;Señala el adverbio de Observa el número 8042. Indica cuál es la cifra de las DECENAS:.&quot;, opciones: [&quot;4&quot;, &quot;3&quot;, &quot;5&quot;, &quot;0&quot;], correcta:  0, observaciones: &quot;La cifra de las decenas es la segunda de la parte entera contando desde la derecha.&quot; },">
            <text:p><text:s/>{ id: 57, enunciado: "Señala el adverbio de Observa el número 8042. Indica cuál es la cifra de las DECENAS:.", opciones: ["4", "3", "5", "0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59] &amp; &quot;.&quot;  &amp; CHAR(34) &amp; &quot;, opciones: [&quot;&amp; CHAR(34)&amp;[Hoja1.B59]&amp; CHAR(34)&amp;&quot;, &quot;&amp; CHAR(34)&amp;[Hoja1.C59]&amp; CHAR(34)&amp;&quot;, &quot;&amp; CHAR(34)&amp;[Hoja1.D59]&amp; CHAR(34)&amp;&quot;, &quot;&amp; CHAR(34)&amp;[Hoja1.E59]&amp; CHAR(34)&amp;&quot;], correcta:  &quot;&amp;[Hoja1.F59]-1&amp; &quot;, observaciones: &quot; &amp; CHAR(34)&amp;[Hoja1.G59]&amp; CHAR(34) &amp; &quot; },&quot;" office:value-type="string" office:string-value=" { id: 58, enunciado: &quot;Señala el adverbio de Observa el número 6417. Indica cuál es la cifra de las DECENAS:.&quot;, opciones: [&quot;1&quot;, &quot;2&quot;, &quot;4&quot;, &quot;5&quot;], correcta:  0, observaciones: &quot;La cifra de las decenas es la segunda de la parte entera contando desde la derecha.&quot; },">
            <text:p><text:s/>{ id: 58, enunciado: "Señala el adverbio de Observa el número 6417. Indica cuál es la cifra de las DECENAS:.", opciones: ["1", "2", "4", "5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0] &amp; &quot;.&quot;  &amp; CHAR(34) &amp; &quot;, opciones: [&quot;&amp; CHAR(34)&amp;[Hoja1.B60]&amp; CHAR(34)&amp;&quot;, &quot;&amp; CHAR(34)&amp;[Hoja1.C60]&amp; CHAR(34)&amp;&quot;, &quot;&amp; CHAR(34)&amp;[Hoja1.D60]&amp; CHAR(34)&amp;&quot;, &quot;&amp; CHAR(34)&amp;[Hoja1.E60]&amp; CHAR(34)&amp;&quot;], correcta:  &quot;&amp;[Hoja1.F60]-1&amp; &quot;, observaciones: &quot; &amp; CHAR(34)&amp;[Hoja1.G60]&amp; CHAR(34) &amp; &quot; },&quot;" office:value-type="string" office:string-value=" { id: 59, enunciado: &quot;Señala el adverbio de Observa el número 4893. Indica cuál es la cifra de las DECENAS:.&quot;, opciones: [&quot;0&quot;, &quot;2&quot;, &quot;6&quot;, &quot;9&quot;], correcta:  3, observaciones: &quot;La cifra de las decenas es la segunda de la parte entera contando desde la derecha.&quot; },">
            <text:p><text:s/>{ id: 59, enunciado: "Señala el adverbio de Observa el número 4893. Indica cuál es la cifra de las DECENAS:.", opciones: ["0", "2", "6", "9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1] &amp; &quot;.&quot;  &amp; CHAR(34) &amp; &quot;, opciones: [&quot;&amp; CHAR(34)&amp;[Hoja1.B61]&amp; CHAR(34)&amp;&quot;, &quot;&amp; CHAR(34)&amp;[Hoja1.C61]&amp; CHAR(34)&amp;&quot;, &quot;&amp; CHAR(34)&amp;[Hoja1.D61]&amp; CHAR(34)&amp;&quot;, &quot;&amp; CHAR(34)&amp;[Hoja1.E61]&amp; CHAR(34)&amp;&quot;], correcta:  &quot;&amp;[Hoja1.F61]-1&amp; &quot;, observaciones: &quot; &amp; CHAR(34)&amp;[Hoja1.G61]&amp; CHAR(34) &amp; &quot; },&quot;" office:value-type="string" office:string-value=" { id: 60, enunciado: &quot;Señala el adverbio de Observa el número 3104. Indica cuál es la cifra de las DECENAS:.&quot;, opciones: [&quot;7&quot;, &quot;8&quot;, &quot;0&quot;, &quot;3&quot;], correcta:  2, observaciones: &quot;La cifra de las decenas es la segunda de la parte entera contando desde la derecha.&quot; },">
            <text:p><text:s/>{ id: 60, enunciado: "Señala el adverbio de Observa el número 3104. Indica cuál es la cifra de las DECENAS:.", opciones: ["7", "8", "0", "3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2] &amp; &quot;.&quot;  &amp; CHAR(34) &amp; &quot;, opciones: [&quot;&amp; CHAR(34)&amp;[Hoja1.B62]&amp; CHAR(34)&amp;&quot;, &quot;&amp; CHAR(34)&amp;[Hoja1.C62]&amp; CHAR(34)&amp;&quot;, &quot;&amp; CHAR(34)&amp;[Hoja1.D62]&amp; CHAR(34)&amp;&quot;, &quot;&amp; CHAR(34)&amp;[Hoja1.E62]&amp; CHAR(34)&amp;&quot;], correcta:  &quot;&amp;[Hoja1.F62]-1&amp; &quot;, observaciones: &quot; &amp; CHAR(34)&amp;[Hoja1.G62]&amp; CHAR(34) &amp; &quot; },&quot;" office:value-type="string" office:string-value=" { id: 61, enunciado: &quot;Señala el adverbio de Observa el número 7194. Indica cuál es la cifra de las DECENAS:.&quot;, opciones: [&quot;4&quot;, &quot;2&quot;, &quot;6&quot;, &quot;9&quot;], correcta:  3, observaciones: &quot;La cifra de las decenas es la segunda de la parte entera contando desde la derecha.&quot; },">
            <text:p><text:s/>{ id: 61, enunciado: "Señala el adverbio de Observa el número 7194. Indica cuál es la cifra de las DECENAS:.", opciones: ["4", "2", "6", "9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3] &amp; &quot;.&quot;  &amp; CHAR(34) &amp; &quot;, opciones: [&quot;&amp; CHAR(34)&amp;[Hoja1.B63]&amp; CHAR(34)&amp;&quot;, &quot;&amp; CHAR(34)&amp;[Hoja1.C63]&amp; CHAR(34)&amp;&quot;, &quot;&amp; CHAR(34)&amp;[Hoja1.D63]&amp; CHAR(34)&amp;&quot;, &quot;&amp; CHAR(34)&amp;[Hoja1.E63]&amp; CHAR(34)&amp;&quot;], correcta:  &quot;&amp;[Hoja1.F63]-1&amp; &quot;, observaciones: &quot; &amp; CHAR(34)&amp;[Hoja1.G63]&amp; CHAR(34) &amp; &quot; },&quot;" office:value-type="string" office:string-value=" { id: 62, enunciado: &quot;Señala el adverbio de Observa el número 5736. Indica cuál es la cifra de las DECENAS:.&quot;, opciones: [&quot;3&quot;, &quot;0&quot;, &quot;4&quot;, &quot;7&quot;], correcta:  0, observaciones: &quot;La cifra de las decenas es la segunda de la parte entera contando desde la derecha.&quot; },">
            <text:p><text:s/>{ id: 62, enunciado: "Señala el adverbio de Observa el número 5736. Indica cuál es la cifra de las DECENAS:.", opciones: ["3", "0", "4", "7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4] &amp; &quot;.&quot;  &amp; CHAR(34) &amp; &quot;, opciones: [&quot;&amp; CHAR(34)&amp;[Hoja1.B64]&amp; CHAR(34)&amp;&quot;, &quot;&amp; CHAR(34)&amp;[Hoja1.C64]&amp; CHAR(34)&amp;&quot;, &quot;&amp; CHAR(34)&amp;[Hoja1.D64]&amp; CHAR(34)&amp;&quot;, &quot;&amp; CHAR(34)&amp;[Hoja1.E64]&amp; CHAR(34)&amp;&quot;], correcta:  &quot;&amp;[Hoja1.F64]-1&amp; &quot;, observaciones: &quot; &amp; CHAR(34)&amp;[Hoja1.G64]&amp; CHAR(34) &amp; &quot; },&quot;" office:value-type="string" office:string-value=" { id: 63, enunciado: &quot;Señala el adverbio de Observa el número 4180. Indica cuál es la cifra de las DECENAS:.&quot;, opciones: [&quot;8&quot;, &quot;1&quot;, &quot;3&quot;, &quot;7&quot;], correcta:  0, observaciones: &quot;La cifra de las decenas es la segunda de la parte entera contando desde la derecha.&quot; },">
            <text:p><text:s/>{ id: 63, enunciado: "Señala el adverbio de Observa el número 4180. Indica cuál es la cifra de las DECENAS:.", opciones: ["8", "1", "3", "7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5] &amp; &quot;.&quot;  &amp; CHAR(34) &amp; &quot;, opciones: [&quot;&amp; CHAR(34)&amp;[Hoja1.B65]&amp; CHAR(34)&amp;&quot;, &quot;&amp; CHAR(34)&amp;[Hoja1.C65]&amp; CHAR(34)&amp;&quot;, &quot;&amp; CHAR(34)&amp;[Hoja1.D65]&amp; CHAR(34)&amp;&quot;, &quot;&amp; CHAR(34)&amp;[Hoja1.E65]&amp; CHAR(34)&amp;&quot;], correcta:  &quot;&amp;[Hoja1.F65]-1&amp; &quot;, observaciones: &quot; &amp; CHAR(34)&amp;[Hoja1.G65]&amp; CHAR(34) &amp; &quot; },&quot;" office:value-type="string" office:string-value=" { id: 64, enunciado: &quot;Señala el adverbio de Observa el número 7620. Indica cuál es la cifra de las DECENAS:.&quot;, opciones: [&quot;2&quot;, &quot;7&quot;, &quot;4&quot;, &quot;3&quot;], correcta:  0, observaciones: &quot;La cifra de las decenas es la segunda de la parte entera contando desde la derecha.&quot; },">
            <text:p><text:s/>{ id: 64, enunciado: "Señala el adverbio de Observa el número 7620. Indica cuál es la cifra de las DECENAS:.", opciones: ["2", "7", "4", "3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6] &amp; &quot;.&quot;  &amp; CHAR(34) &amp; &quot;, opciones: [&quot;&amp; CHAR(34)&amp;[Hoja1.B66]&amp; CHAR(34)&amp;&quot;, &quot;&amp; CHAR(34)&amp;[Hoja1.C66]&amp; CHAR(34)&amp;&quot;, &quot;&amp; CHAR(34)&amp;[Hoja1.D66]&amp; CHAR(34)&amp;&quot;, &quot;&amp; CHAR(34)&amp;[Hoja1.E66]&amp; CHAR(34)&amp;&quot;], correcta:  &quot;&amp;[Hoja1.F66]-1&amp; &quot;, observaciones: &quot; &amp; CHAR(34)&amp;[Hoja1.G66]&amp; CHAR(34) &amp; &quot; },&quot;" office:value-type="string" office:string-value=" { id: 65, enunciado: &quot;Señala el adverbio de Observa el número 2365. Indica cuál es la cifra de las DECENAS:.&quot;, opciones: [&quot;5&quot;, &quot;6&quot;, &quot;7&quot;, &quot;0&quot;], correcta:  1, observaciones: &quot;La cifra de las decenas es la segunda de la parte entera contando desde la derecha.&quot; },">
            <text:p><text:s/>{ id: 65, enunciado: "Señala el adverbio de Observa el número 2365. Indica cuál es la cifra de las DECENAS:.", opciones: ["5", "6", "7", "0"], correcta: <text:s/>1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7] &amp; &quot;.&quot;  &amp; CHAR(34) &amp; &quot;, opciones: [&quot;&amp; CHAR(34)&amp;[Hoja1.B67]&amp; CHAR(34)&amp;&quot;, &quot;&amp; CHAR(34)&amp;[Hoja1.C67]&amp; CHAR(34)&amp;&quot;, &quot;&amp; CHAR(34)&amp;[Hoja1.D67]&amp; CHAR(34)&amp;&quot;, &quot;&amp; CHAR(34)&amp;[Hoja1.E67]&amp; CHAR(34)&amp;&quot;], correcta:  &quot;&amp;[Hoja1.F67]-1&amp; &quot;, observaciones: &quot; &amp; CHAR(34)&amp;[Hoja1.G67]&amp; CHAR(34) &amp; &quot; },&quot;" office:value-type="string" office:string-value=" { id: 66, enunciado: &quot;Señala el adverbio de Observa el número 2436. Indica cuál es la cifra de las DECENAS:.&quot;, opciones: [&quot;2&quot;, &quot;3&quot;, &quot;8&quot;, &quot;6&quot;], correcta:  1, observaciones: &quot;La cifra de las decenas es la segunda de la parte entera contando desde la derecha.&quot; },">
            <text:p><text:s/>{ id: 66, enunciado: "Señala el adverbio de Observa el número 2436. Indica cuál es la cifra de las DECENAS:.", opciones: ["2", "3", "8", "6"], correcta: <text:s/>1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8] &amp; &quot;.&quot;  &amp; CHAR(34) &amp; &quot;, opciones: [&quot;&amp; CHAR(34)&amp;[Hoja1.B68]&amp; CHAR(34)&amp;&quot;, &quot;&amp; CHAR(34)&amp;[Hoja1.C68]&amp; CHAR(34)&amp;&quot;, &quot;&amp; CHAR(34)&amp;[Hoja1.D68]&amp; CHAR(34)&amp;&quot;, &quot;&amp; CHAR(34)&amp;[Hoja1.E68]&amp; CHAR(34)&amp;&quot;], correcta:  &quot;&amp;[Hoja1.F68]-1&amp; &quot;, observaciones: &quot; &amp; CHAR(34)&amp;[Hoja1.G68]&amp; CHAR(34) &amp; &quot; },&quot;" office:value-type="string" office:string-value=" { id: 67, enunciado: &quot;Señala el adverbio de Observa el número 1218. Indica cuál es la cifra de las DECENAS:.&quot;, opciones: [&quot;6&quot;, &quot;7&quot;, &quot;8&quot;, &quot;1&quot;], correcta:  3, observaciones: &quot;La cifra de las decenas es la segunda de la parte entera contando desde la derecha.&quot; },">
            <text:p><text:s/>{ id: 67, enunciado: "Señala el adverbio de Observa el número 1218. Indica cuál es la cifra de las DECENAS:.", opciones: ["6", "7", "8", "1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69] &amp; &quot;.&quot;  &amp; CHAR(34) &amp; &quot;, opciones: [&quot;&amp; CHAR(34)&amp;[Hoja1.B69]&amp; CHAR(34)&amp;&quot;, &quot;&amp; CHAR(34)&amp;[Hoja1.C69]&amp; CHAR(34)&amp;&quot;, &quot;&amp; CHAR(34)&amp;[Hoja1.D69]&amp; CHAR(34)&amp;&quot;, &quot;&amp; CHAR(34)&amp;[Hoja1.E69]&amp; CHAR(34)&amp;&quot;], correcta:  &quot;&amp;[Hoja1.F69]-1&amp; &quot;, observaciones: &quot; &amp; CHAR(34)&amp;[Hoja1.G69]&amp; CHAR(34) &amp; &quot; },&quot;" office:value-type="string" office:string-value=" { id: 68, enunciado: &quot;Señala el adverbio de Observa el número 9235. Indica cuál es la cifra de las DECENAS:.&quot;, opciones: [&quot;2&quot;, &quot;1&quot;, &quot;4&quot;, &quot;3&quot;], correcta:  3, observaciones: &quot;La cifra de las decenas es la segunda de la parte entera contando desde la derecha.&quot; },">
            <text:p><text:s/>{ id: 68, enunciado: "Señala el adverbio de Observa el número 9235. Indica cuál es la cifra de las DECENAS:.", opciones: ["2", "1", "4", "3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0] &amp; &quot;.&quot;  &amp; CHAR(34) &amp; &quot;, opciones: [&quot;&amp; CHAR(34)&amp;[Hoja1.B70]&amp; CHAR(34)&amp;&quot;, &quot;&amp; CHAR(34)&amp;[Hoja1.C70]&amp; CHAR(34)&amp;&quot;, &quot;&amp; CHAR(34)&amp;[Hoja1.D70]&amp; CHAR(34)&amp;&quot;, &quot;&amp; CHAR(34)&amp;[Hoja1.E70]&amp; CHAR(34)&amp;&quot;], correcta:  &quot;&amp;[Hoja1.F70]-1&amp; &quot;, observaciones: &quot; &amp; CHAR(34)&amp;[Hoja1.G70]&amp; CHAR(34) &amp; &quot; },&quot;" office:value-type="string" office:string-value=" { id: 69, enunciado: &quot;Señala el adverbio de Observa el número 9581. Indica cuál es la cifra de las DECENAS:.&quot;, opciones: [&quot;0&quot;, &quot;1&quot;, &quot;2&quot;, &quot;8&quot;], correcta:  3, observaciones: &quot;La cifra de las decenas es la segunda de la parte entera contando desde la derecha.&quot; },">
            <text:p><text:s/>{ id: 69, enunciado: "Señala el adverbio de Observa el número 9581. Indica cuál es la cifra de las DECENAS:.", opciones: ["0", "1", "2", "8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1] &amp; &quot;.&quot;  &amp; CHAR(34) &amp; &quot;, opciones: [&quot;&amp; CHAR(34)&amp;[Hoja1.B71]&amp; CHAR(34)&amp;&quot;, &quot;&amp; CHAR(34)&amp;[Hoja1.C71]&amp; CHAR(34)&amp;&quot;, &quot;&amp; CHAR(34)&amp;[Hoja1.D71]&amp; CHAR(34)&amp;&quot;, &quot;&amp; CHAR(34)&amp;[Hoja1.E71]&amp; CHAR(34)&amp;&quot;], correcta:  &quot;&amp;[Hoja1.F71]-1&amp; &quot;, observaciones: &quot; &amp; CHAR(34)&amp;[Hoja1.G71]&amp; CHAR(34) &amp; &quot; },&quot;" office:value-type="string" office:string-value=" { id: 70, enunciado: &quot;Señala el adverbio de Observa el número 5279. Indica cuál es la cifra de las DECENAS:.&quot;, opciones: [&quot;1&quot;, &quot;5&quot;, &quot;3&quot;, &quot;7&quot;], correcta:  3, observaciones: &quot;La cifra de las decenas es la segunda de la parte entera contando desde la derecha.&quot; },">
            <text:p><text:s/>{ id: 70, enunciado: "Señala el adverbio de Observa el número 5279. Indica cuál es la cifra de las DECENAS:.", opciones: ["1", "5", "3", "7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2] &amp; &quot;.&quot;  &amp; CHAR(34) &amp; &quot;, opciones: [&quot;&amp; CHAR(34)&amp;[Hoja1.B72]&amp; CHAR(34)&amp;&quot;, &quot;&amp; CHAR(34)&amp;[Hoja1.C72]&amp; CHAR(34)&amp;&quot;, &quot;&amp; CHAR(34)&amp;[Hoja1.D72]&amp; CHAR(34)&amp;&quot;, &quot;&amp; CHAR(34)&amp;[Hoja1.E72]&amp; CHAR(34)&amp;&quot;], correcta:  &quot;&amp;[Hoja1.F72]-1&amp; &quot;, observaciones: &quot; &amp; CHAR(34)&amp;[Hoja1.G72]&amp; CHAR(34) &amp; &quot; },&quot;" office:value-type="string" office:string-value=" { id: 71, enunciado: &quot;Señala el adverbio de Observa el número 4967. Indica cuál es la cifra de las DECENAS:.&quot;, opciones: [&quot;4&quot;, &quot;2&quot;, &quot;6&quot;, &quot;9&quot;], correcta:  2, observaciones: &quot;La cifra de las decenas es la segunda de la parte entera contando desde la derecha.&quot; },">
            <text:p><text:s/>{ id: 71, enunciado: "Señala el adverbio de Observa el número 4967. Indica cuál es la cifra de las DECENAS:.", opciones: ["4", "2", "6", "9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3] &amp; &quot;.&quot;  &amp; CHAR(34) &amp; &quot;, opciones: [&quot;&amp; CHAR(34)&amp;[Hoja1.B73]&amp; CHAR(34)&amp;&quot;, &quot;&amp; CHAR(34)&amp;[Hoja1.C73]&amp; CHAR(34)&amp;&quot;, &quot;&amp; CHAR(34)&amp;[Hoja1.D73]&amp; CHAR(34)&amp;&quot;, &quot;&amp; CHAR(34)&amp;[Hoja1.E73]&amp; CHAR(34)&amp;&quot;], correcta:  &quot;&amp;[Hoja1.F73]-1&amp; &quot;, observaciones: &quot; &amp; CHAR(34)&amp;[Hoja1.G73]&amp; CHAR(34) &amp; &quot; },&quot;" office:value-type="string" office:string-value=" { id: 72, enunciado: &quot;Señala el adverbio de Observa el número 5469. Indica cuál es la cifra de las DECENAS:.&quot;, opciones: [&quot;3&quot;, &quot;5&quot;, &quot;0&quot;, &quot;6&quot;], correcta:  3, observaciones: &quot;La cifra de las decenas es la segunda de la parte entera contando desde la derecha.&quot; },">
            <text:p><text:s/>{ id: 72, enunciado: "Señala el adverbio de Observa el número 5469. Indica cuál es la cifra de las DECENAS:.", opciones: ["3", "5", "0", "6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4] &amp; &quot;.&quot;  &amp; CHAR(34) &amp; &quot;, opciones: [&quot;&amp; CHAR(34)&amp;[Hoja1.B74]&amp; CHAR(34)&amp;&quot;, &quot;&amp; CHAR(34)&amp;[Hoja1.C74]&amp; CHAR(34)&amp;&quot;, &quot;&amp; CHAR(34)&amp;[Hoja1.D74]&amp; CHAR(34)&amp;&quot;, &quot;&amp; CHAR(34)&amp;[Hoja1.E74]&amp; CHAR(34)&amp;&quot;], correcta:  &quot;&amp;[Hoja1.F74]-1&amp; &quot;, observaciones: &quot; &amp; CHAR(34)&amp;[Hoja1.G74]&amp; CHAR(34) &amp; &quot; },&quot;" office:value-type="string" office:string-value=" { id: 73, enunciado: &quot;Señala el adverbio de Observa el número 3541. Indica cuál es la cifra de las DECENAS:.&quot;, opciones: [&quot;0&quot;, &quot;6&quot;, &quot;4&quot;, &quot;5&quot;], correcta:  2, observaciones: &quot;La cifra de las decenas es la segunda de la parte entera contando desde la derecha.&quot; },">
            <text:p><text:s/>{ id: 73, enunciado: "Señala el adverbio de Observa el número 3541. Indica cuál es la cifra de las DECENAS:.", opciones: ["0", "6", "4", "5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5] &amp; &quot;.&quot;  &amp; CHAR(34) &amp; &quot;, opciones: [&quot;&amp; CHAR(34)&amp;[Hoja1.B75]&amp; CHAR(34)&amp;&quot;, &quot;&amp; CHAR(34)&amp;[Hoja1.C75]&amp; CHAR(34)&amp;&quot;, &quot;&amp; CHAR(34)&amp;[Hoja1.D75]&amp; CHAR(34)&amp;&quot;, &quot;&amp; CHAR(34)&amp;[Hoja1.E75]&amp; CHAR(34)&amp;&quot;], correcta:  &quot;&amp;[Hoja1.F75]-1&amp; &quot;, observaciones: &quot; &amp; CHAR(34)&amp;[Hoja1.G75]&amp; CHAR(34) &amp; &quot; },&quot;" office:value-type="string" office:string-value=" { id: 74, enunciado: &quot;Señala el adverbio de Observa el número 7619. Indica cuál es la cifra de las DECENAS:.&quot;, opciones: [&quot;3&quot;, &quot;8&quot;, &quot;9&quot;, &quot;1&quot;], correcta:  3, observaciones: &quot;La cifra de las decenas es la segunda de la parte entera contando desde la derecha.&quot; },">
            <text:p><text:s/>{ id: 74, enunciado: "Señala el adverbio de Observa el número 7619. Indica cuál es la cifra de las DECENAS:.", opciones: ["3", "8", "9", "1"], correcta: <text:s/>3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6] &amp; &quot;.&quot;  &amp; CHAR(34) &amp; &quot;, opciones: [&quot;&amp; CHAR(34)&amp;[Hoja1.B76]&amp; CHAR(34)&amp;&quot;, &quot;&amp; CHAR(34)&amp;[Hoja1.C76]&amp; CHAR(34)&amp;&quot;, &quot;&amp; CHAR(34)&amp;[Hoja1.D76]&amp; CHAR(34)&amp;&quot;, &quot;&amp; CHAR(34)&amp;[Hoja1.E76]&amp; CHAR(34)&amp;&quot;], correcta:  &quot;&amp;[Hoja1.F76]-1&amp; &quot;, observaciones: &quot; &amp; CHAR(34)&amp;[Hoja1.G76]&amp; CHAR(34) &amp; &quot; },&quot;" office:value-type="string" office:string-value=" { id: 75, enunciado: &quot;Señala el adverbio de Observa el número 5746. Indica cuál es la cifra de las DECENAS:.&quot;, opciones: [&quot;4&quot;, &quot;9&quot;, &quot;7&quot;, &quot;6&quot;], correcta:  0, observaciones: &quot;La cifra de las decenas es la segunda de la parte entera contando desde la derecha.&quot; },">
            <text:p><text:s/>{ id: 75, enunciado: "Señala el adverbio de Observa el número 5746. Indica cuál es la cifra de las DECENAS:.", opciones: ["4", "9", "7", "6"], correcta: <text:s/>0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7] &amp; &quot;.&quot;  &amp; CHAR(34) &amp; &quot;, opciones: [&quot;&amp; CHAR(34)&amp;[Hoja1.B77]&amp; CHAR(34)&amp;&quot;, &quot;&amp; CHAR(34)&amp;[Hoja1.C77]&amp; CHAR(34)&amp;&quot;, &quot;&amp; CHAR(34)&amp;[Hoja1.D77]&amp; CHAR(34)&amp;&quot;, &quot;&amp; CHAR(34)&amp;[Hoja1.E77]&amp; CHAR(34)&amp;&quot;], correcta:  &quot;&amp;[Hoja1.F77]-1&amp; &quot;, observaciones: &quot; &amp; CHAR(34)&amp;[Hoja1.G77]&amp; CHAR(34) &amp; &quot; },&quot;" office:value-type="string" office:string-value=" { id: 76, enunciado: &quot;Señala el adverbio de Observa el número 6701. Indica cuál es la cifra de las DECENAS:.&quot;, opciones: [&quot;4&quot;, &quot;6&quot;, &quot;0&quot;, &quot;1&quot;], correcta:  2, observaciones: &quot;La cifra de las decenas es la segunda de la parte entera contando desde la derecha.&quot; },">
            <text:p><text:s/>{ id: 76, enunciado: "Señala el adverbio de Observa el número 6701. Indica cuál es la cifra de las DECENAS:.", opciones: ["4", "6", "0", "1"], correcta: <text:s/>2, observaciones: "La cifra de las decenas es la segund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8] &amp; &quot;.&quot;  &amp; CHAR(34) &amp; &quot;, opciones: [&quot;&amp; CHAR(34)&amp;[Hoja1.B78]&amp; CHAR(34)&amp;&quot;, &quot;&amp; CHAR(34)&amp;[Hoja1.C78]&amp; CHAR(34)&amp;&quot;, &quot;&amp; CHAR(34)&amp;[Hoja1.D78]&amp; CHAR(34)&amp;&quot;, &quot;&amp; CHAR(34)&amp;[Hoja1.E78]&amp; CHAR(34)&amp;&quot;], correcta:  &quot;&amp;[Hoja1.F78]-1&amp; &quot;, observaciones: &quot; &amp; CHAR(34)&amp;[Hoja1.G78]&amp; CHAR(34) &amp; &quot; },&quot;" office:value-type="string" office:string-value=" { id: 77, enunciado: &quot;Señala el adverbio de Observa el número 3281. Indica cuál es la cifra de las UNIDADES DE MILLAR:.&quot;, opciones: [&quot;8&quot;, &quot;5&quot;, &quot;3&quot;, &quot;1&quot;], correcta:  2, observaciones: &quot;La cifra de las unidades de millar es la cuarta de la parte entera contando desde la derecha.&quot; },">
            <text:p><text:s/>{ id: 77, enunciado: "Señala el adverbio de Observa el número 3281. Indica cuál es la cifra de las UNIDADES DE MILLAR:.", opciones: ["8", "5", "3", "1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79] &amp; &quot;.&quot;  &amp; CHAR(34) &amp; &quot;, opciones: [&quot;&amp; CHAR(34)&amp;[Hoja1.B79]&amp; CHAR(34)&amp;&quot;, &quot;&amp; CHAR(34)&amp;[Hoja1.C79]&amp; CHAR(34)&amp;&quot;, &quot;&amp; CHAR(34)&amp;[Hoja1.D79]&amp; CHAR(34)&amp;&quot;, &quot;&amp; CHAR(34)&amp;[Hoja1.E79]&amp; CHAR(34)&amp;&quot;], correcta:  &quot;&amp;[Hoja1.F79]-1&amp; &quot;, observaciones: &quot; &amp; CHAR(34)&amp;[Hoja1.G79]&amp; CHAR(34) &amp; &quot; },&quot;" office:value-type="string" office:string-value=" { id: 78, enunciado: &quot;Señala el adverbio de Observa el número 1326. Indica cuál es la cifra de las UNIDADES DE MILLAR:.&quot;, opciones: [&quot;1&quot;, &quot;2&quot;, &quot;4&quot;, &quot;7&quot;], correcta:  0, observaciones: &quot;La cifra de las unidades de millar es la cuarta de la parte entera contando desde la derecha.&quot; },">
            <text:p><text:s/>{ id: 78, enunciado: "Señala el adverbio de Observa el número 1326. Indica cuál es la cifra de las UNIDADES DE MILLAR:.", opciones: ["1", "2", "4", "7"], correcta: <text:s/>0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0] &amp; &quot;.&quot;  &amp; CHAR(34) &amp; &quot;, opciones: [&quot;&amp; CHAR(34)&amp;[Hoja1.B80]&amp; CHAR(34)&amp;&quot;, &quot;&amp; CHAR(34)&amp;[Hoja1.C80]&amp; CHAR(34)&amp;&quot;, &quot;&amp; CHAR(34)&amp;[Hoja1.D80]&amp; CHAR(34)&amp;&quot;, &quot;&amp; CHAR(34)&amp;[Hoja1.E80]&amp; CHAR(34)&amp;&quot;], correcta:  &quot;&amp;[Hoja1.F80]-1&amp; &quot;, observaciones: &quot; &amp; CHAR(34)&amp;[Hoja1.G80]&amp; CHAR(34) &amp; &quot; },&quot;" office:value-type="string" office:string-value=" { id: 79, enunciado: &quot;Señala el adverbio de Observa el número 7198. Indica cuál es la cifra de las UNIDADES DE MILLAR:.&quot;, opciones: [&quot;7&quot;, &quot;0&quot;, &quot;4&quot;, &quot;9&quot;], correcta:  0, observaciones: &quot;La cifra de las unidades de millar es la cuarta de la parte entera contando desde la derecha.&quot; },">
            <text:p><text:s/>{ id: 79, enunciado: "Señala el adverbio de Observa el número 7198. Indica cuál es la cifra de las UNIDADES DE MILLAR:.", opciones: ["7", "0", "4", "9"], correcta: <text:s/>0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1] &amp; &quot;.&quot;  &amp; CHAR(34) &amp; &quot;, opciones: [&quot;&amp; CHAR(34)&amp;[Hoja1.B81]&amp; CHAR(34)&amp;&quot;, &quot;&amp; CHAR(34)&amp;[Hoja1.C81]&amp; CHAR(34)&amp;&quot;, &quot;&amp; CHAR(34)&amp;[Hoja1.D81]&amp; CHAR(34)&amp;&quot;, &quot;&amp; CHAR(34)&amp;[Hoja1.E81]&amp; CHAR(34)&amp;&quot;], correcta:  &quot;&amp;[Hoja1.F81]-1&amp; &quot;, observaciones: &quot; &amp; CHAR(34)&amp;[Hoja1.G81]&amp; CHAR(34) &amp; &quot; },&quot;" office:value-type="string" office:string-value=" { id: 80, enunciado: &quot;Señala el adverbio de Observa el número 5873. Indica cuál es la cifra de las UNIDADES DE MILLAR:.&quot;, opciones: [&quot;3&quot;, &quot;7&quot;, &quot;9&quot;, &quot;5&quot;], correcta:  3, observaciones: &quot;La cifra de las unidades de millar es la cuarta de la parte entera contando desde la derecha.&quot; },">
            <text:p><text:s/>{ id: 80, enunciado: "Señala el adverbio de Observa el número 5873. Indica cuál es la cifra de las UNIDADES DE MILLAR:.", opciones: ["3", "7", "9", "5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2] &amp; &quot;.&quot;  &amp; CHAR(34) &amp; &quot;, opciones: [&quot;&amp; CHAR(34)&amp;[Hoja1.B82]&amp; CHAR(34)&amp;&quot;, &quot;&amp; CHAR(34)&amp;[Hoja1.C82]&amp; CHAR(34)&amp;&quot;, &quot;&amp; CHAR(34)&amp;[Hoja1.D82]&amp; CHAR(34)&amp;&quot;, &quot;&amp; CHAR(34)&amp;[Hoja1.E82]&amp; CHAR(34)&amp;&quot;], correcta:  &quot;&amp;[Hoja1.F82]-1&amp; &quot;, observaciones: &quot; &amp; CHAR(34)&amp;[Hoja1.G82]&amp; CHAR(34) &amp; &quot; },&quot;" office:value-type="string" office:string-value=" { id: 81, enunciado: &quot;Señala el adverbio de Observa el número 1836. Indica cuál es la cifra de las UNIDADES DE MILLAR:.&quot;, opciones: [&quot;7&quot;, &quot;6&quot;, &quot;3&quot;, &quot;1&quot;], correcta:  3, observaciones: &quot;La cifra de las unidades de millar es la cuarta de la parte entera contando desde la derecha.&quot; },">
            <text:p><text:s/>{ id: 81, enunciado: "Señala el adverbio de Observa el número 1836. Indica cuál es la cifra de las UNIDADES DE MILLAR:.", opciones: ["7", "6", "3", "1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3] &amp; &quot;.&quot;  &amp; CHAR(34) &amp; &quot;, opciones: [&quot;&amp; CHAR(34)&amp;[Hoja1.B83]&amp; CHAR(34)&amp;&quot;, &quot;&amp; CHAR(34)&amp;[Hoja1.C83]&amp; CHAR(34)&amp;&quot;, &quot;&amp; CHAR(34)&amp;[Hoja1.D83]&amp; CHAR(34)&amp;&quot;, &quot;&amp; CHAR(34)&amp;[Hoja1.E83]&amp; CHAR(34)&amp;&quot;], correcta:  &quot;&amp;[Hoja1.F83]-1&amp; &quot;, observaciones: &quot; &amp; CHAR(34)&amp;[Hoja1.G83]&amp; CHAR(34) &amp; &quot; },&quot;" office:value-type="string" office:string-value=" { id: 82, enunciado: &quot;Señala el adverbio de Observa el número 7215. Indica cuál es la cifra de las UNIDADES DE MILLAR:.&quot;, opciones: [&quot;6&quot;, &quot;0&quot;, &quot;7&quot;, &quot;2&quot;], correcta:  2, observaciones: &quot;La cifra de las unidades de millar es la cuarta de la parte entera contando desde la derecha.&quot; },">
            <text:p><text:s/>{ id: 82, enunciado: "Señala el adverbio de Observa el número 7215. Indica cuál es la cifra de las UNIDADES DE MILLAR:.", opciones: ["6", "0", "7", "2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4] &amp; &quot;.&quot;  &amp; CHAR(34) &amp; &quot;, opciones: [&quot;&amp; CHAR(34)&amp;[Hoja1.B84]&amp; CHAR(34)&amp;&quot;, &quot;&amp; CHAR(34)&amp;[Hoja1.C84]&amp; CHAR(34)&amp;&quot;, &quot;&amp; CHAR(34)&amp;[Hoja1.D84]&amp; CHAR(34)&amp;&quot;, &quot;&amp; CHAR(34)&amp;[Hoja1.E84]&amp; CHAR(34)&amp;&quot;], correcta:  &quot;&amp;[Hoja1.F84]-1&amp; &quot;, observaciones: &quot; &amp; CHAR(34)&amp;[Hoja1.G84]&amp; CHAR(34) &amp; &quot; },&quot;" office:value-type="string" office:string-value=" { id: 83, enunciado: &quot;Señala el adverbio de Observa el número 6821. Indica cuál es la cifra de las UNIDADES DE MILLAR:.&quot;, opciones: [&quot;1&quot;, &quot;6&quot;, &quot;0&quot;, &quot;4&quot;], correcta:  1, observaciones: &quot;La cifra de las unidades de millar es la cuarta de la parte entera contando desde la derecha.&quot; },">
            <text:p><text:s/>{ id: 83, enunciado: "Señala el adverbio de Observa el número 6821. Indica cuál es la cifra de las UNIDADES DE MILLAR:.", opciones: ["1", "6", "0", "4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5] &amp; &quot;.&quot;  &amp; CHAR(34) &amp; &quot;, opciones: [&quot;&amp; CHAR(34)&amp;[Hoja1.B85]&amp; CHAR(34)&amp;&quot;, &quot;&amp; CHAR(34)&amp;[Hoja1.C85]&amp; CHAR(34)&amp;&quot;, &quot;&amp; CHAR(34)&amp;[Hoja1.D85]&amp; CHAR(34)&amp;&quot;, &quot;&amp; CHAR(34)&amp;[Hoja1.E85]&amp; CHAR(34)&amp;&quot;], correcta:  &quot;&amp;[Hoja1.F85]-1&amp; &quot;, observaciones: &quot; &amp; CHAR(34)&amp;[Hoja1.G85]&amp; CHAR(34) &amp; &quot; },&quot;" office:value-type="string" office:string-value=" { id: 84, enunciado: &quot;Señala el adverbio de Observa el número 1490. Indica cuál es la cifra de las UNIDADES DE MILLAR:.&quot;, opciones: [&quot;8&quot;, &quot;9&quot;, &quot;7&quot;, &quot;1&quot;], correcta:  3, observaciones: &quot;La cifra de las unidades de millar es la cuarta de la parte entera contando desde la derecha.&quot; },">
            <text:p><text:s/>{ id: 84, enunciado: "Señala el adverbio de Observa el número 1490. Indica cuál es la cifra de las UNIDADES DE MILLAR:.", opciones: ["8", "9", "7", "1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6] &amp; &quot;.&quot;  &amp; CHAR(34) &amp; &quot;, opciones: [&quot;&amp; CHAR(34)&amp;[Hoja1.B86]&amp; CHAR(34)&amp;&quot;, &quot;&amp; CHAR(34)&amp;[Hoja1.C86]&amp; CHAR(34)&amp;&quot;, &quot;&amp; CHAR(34)&amp;[Hoja1.D86]&amp; CHAR(34)&amp;&quot;, &quot;&amp; CHAR(34)&amp;[Hoja1.E86]&amp; CHAR(34)&amp;&quot;], correcta:  &quot;&amp;[Hoja1.F86]-1&amp; &quot;, observaciones: &quot; &amp; CHAR(34)&amp;[Hoja1.G86]&amp; CHAR(34) &amp; &quot; },&quot;" office:value-type="string" office:string-value=" { id: 85, enunciado: &quot;Señala el adverbio de Observa el número 1467. Indica cuál es la cifra de las UNIDADES DE MILLAR:.&quot;, opciones: [&quot;9&quot;, &quot;4&quot;, &quot;1&quot;, &quot;6&quot;], correcta:  2, observaciones: &quot;La cifra de las unidades de millar es la cuarta de la parte entera contando desde la derecha.&quot; },">
            <text:p><text:s/>{ id: 85, enunciado: "Señala el adverbio de Observa el número 1467. Indica cuál es la cifra de las UNIDADES DE MILLAR:.", opciones: ["9", "4", "1", "6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7] &amp; &quot;.&quot;  &amp; CHAR(34) &amp; &quot;, opciones: [&quot;&amp; CHAR(34)&amp;[Hoja1.B87]&amp; CHAR(34)&amp;&quot;, &quot;&amp; CHAR(34)&amp;[Hoja1.C87]&amp; CHAR(34)&amp;&quot;, &quot;&amp; CHAR(34)&amp;[Hoja1.D87]&amp; CHAR(34)&amp;&quot;, &quot;&amp; CHAR(34)&amp;[Hoja1.E87]&amp; CHAR(34)&amp;&quot;], correcta:  &quot;&amp;[Hoja1.F87]-1&amp; &quot;, observaciones: &quot; &amp; CHAR(34)&amp;[Hoja1.G87]&amp; CHAR(34) &amp; &quot; },&quot;" office:value-type="string" office:string-value=" { id: 86, enunciado: &quot;Señala el adverbio de Observa el número 1475. Indica cuál es la cifra de las UNIDADES DE MILLAR:.&quot;, opciones: [&quot;8&quot;, &quot;5&quot;, &quot;6&quot;, &quot;1&quot;], correcta:  3, observaciones: &quot;La cifra de las unidades de millar es la cuarta de la parte entera contando desde la derecha.&quot; },">
            <text:p><text:s/>{ id: 86, enunciado: "Señala el adverbio de Observa el número 1475. Indica cuál es la cifra de las UNIDADES DE MILLAR:.", opciones: ["8", "5", "6", "1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8] &amp; &quot;.&quot;  &amp; CHAR(34) &amp; &quot;, opciones: [&quot;&amp; CHAR(34)&amp;[Hoja1.B88]&amp; CHAR(34)&amp;&quot;, &quot;&amp; CHAR(34)&amp;[Hoja1.C88]&amp; CHAR(34)&amp;&quot;, &quot;&amp; CHAR(34)&amp;[Hoja1.D88]&amp; CHAR(34)&amp;&quot;, &quot;&amp; CHAR(34)&amp;[Hoja1.E88]&amp; CHAR(34)&amp;&quot;], correcta:  &quot;&amp;[Hoja1.F88]-1&amp; &quot;, observaciones: &quot; &amp; CHAR(34)&amp;[Hoja1.G88]&amp; CHAR(34) &amp; &quot; },&quot;" office:value-type="string" office:string-value=" { id: 87, enunciado: &quot;Señala el adverbio de Observa el número 4563. Indica cuál es la cifra de las UNIDADES DE MILLAR:.&quot;, opciones: [&quot;8&quot;, &quot;4&quot;, &quot;1&quot;, &quot;0&quot;], correcta:  1, observaciones: &quot;La cifra de las unidades de millar es la cuarta de la parte entera contando desde la derecha.&quot; },">
            <text:p><text:s/>{ id: 87, enunciado: "Señala el adverbio de Observa el número 4563. Indica cuál es la cifra de las UNIDADES DE MILLAR:.", opciones: ["8", "4", "1", "0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89] &amp; &quot;.&quot;  &amp; CHAR(34) &amp; &quot;, opciones: [&quot;&amp; CHAR(34)&amp;[Hoja1.B89]&amp; CHAR(34)&amp;&quot;, &quot;&amp; CHAR(34)&amp;[Hoja1.C89]&amp; CHAR(34)&amp;&quot;, &quot;&amp; CHAR(34)&amp;[Hoja1.D89]&amp; CHAR(34)&amp;&quot;, &quot;&amp; CHAR(34)&amp;[Hoja1.E89]&amp; CHAR(34)&amp;&quot;], correcta:  &quot;&amp;[Hoja1.F89]-1&amp; &quot;, observaciones: &quot; &amp; CHAR(34)&amp;[Hoja1.G89]&amp; CHAR(34) &amp; &quot; },&quot;" office:value-type="string" office:string-value=" { id: 88, enunciado: &quot;Señala el adverbio de Observa el número 1358. Indica cuál es la cifra de las UNIDADES DE MILLAR:.&quot;, opciones: [&quot;3&quot;, &quot;6&quot;, &quot;1&quot;, &quot;7&quot;], correcta:  2, observaciones: &quot;La cifra de las unidades de millar es la cuarta de la parte entera contando desde la derecha.&quot; },">
            <text:p><text:s/>{ id: 88, enunciado: "Señala el adverbio de Observa el número 1358. Indica cuál es la cifra de las UNIDADES DE MILLAR:.", opciones: ["3", "6", "1", "7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3" table:formula="of:=&quot; { id: &quot;&amp;ROW()-1&amp;&quot;, enunciado: &quot; &amp; CHAR(34)&amp;&quot;Señala el adverbio de &quot; &amp; [Hoja1.A90] &amp; &quot;.&quot;  &amp; CHAR(34) &amp; &quot;, opciones: [&quot;&amp; CHAR(34)&amp;[Hoja1.B90]&amp; CHAR(34)&amp;&quot;, &quot;&amp; CHAR(34)&amp;[Hoja1.C90]&amp; CHAR(34)&amp;&quot;, &quot;&amp; CHAR(34)&amp;[Hoja1.D90]&amp; CHAR(34)&amp;&quot;, &quot;&amp; CHAR(34)&amp;[Hoja1.E90]&amp; CHAR(34)&amp;&quot;], correcta:  &quot;&amp;[Hoja1.F90]-1&amp; &quot;, observaciones: &quot; &amp; CHAR(34)&amp;[Hoja1.G90]&amp; CHAR(34) &amp; &quot; },&quot;" office:value-type="string" office:string-value=" { id: 89, enunciado: &quot;Señala el adverbio de Observa el número 6941. Indica cuál es la cifra de las UNIDADES DE MILLAR:.&quot;, opciones: [&quot;9&quot;, &quot;6&quot;, &quot;7&quot;, &quot;3&quot;], correcta:  1, observaciones: &quot;La cifra de las unidades de millar es la cuarta de la parte entera contando desde la derecha.&quot; },">
            <text:p><text:s/>{ id: 89, enunciado: "Señala el adverbio de Observa el número 6941. Indica cuál es la cifra de las UNIDADES DE MILLAR:.", opciones: ["9", "6", "7", "3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1]  &amp;&quot;.&quot; &amp; CHAR(34) &amp; &quot;, opciones: [&quot;&amp; CHAR(34)&amp;[Hoja1.B91]&amp; CHAR(34)&amp;&quot;, &quot;&amp; CHAR(34)&amp;[Hoja1.C91]&amp; CHAR(34)&amp;&quot;, &quot;&amp; CHAR(34)&amp;[Hoja1.D91]&amp; CHAR(34)&amp;&quot;, &quot;&amp; CHAR(34)&amp;[Hoja1.E91]&amp; CHAR(34)&amp;&quot;], correcta:  &quot;&amp;[Hoja1.F91]-1&amp; &quot;, observaciones: &quot; &amp; CHAR(34)&amp;[Hoja1.G91]&amp; CHAR(34) &amp; &quot; },&quot;" office:value-type="string" office:string-value=" { id: 90, enunciado: &quot;Señala la oración que contiene un adverbio de Observa el número 2518. Indica cuál es la cifra de las UNIDADES DE MILLAR:.&quot;, opciones: [&quot;7&quot;, &quot;2&quot;, &quot;3&quot;, &quot;8&quot;], correcta:  1, observaciones: &quot;La cifra de las unidades de millar es la cuarta de la parte entera contando desde la derecha.&quot; },">
            <text:p><text:s/>{ id: 90, enunciado: "Señala la oración que contiene un adverbio de Observa el número 2518. Indica cuál es la cifra de las UNIDADES DE MILLAR:.", opciones: ["7", "2", "3", "8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2]  &amp;&quot;.&quot; &amp; CHAR(34) &amp; &quot;, opciones: [&quot;&amp; CHAR(34)&amp;[Hoja1.B92]&amp; CHAR(34)&amp;&quot;, &quot;&amp; CHAR(34)&amp;[Hoja1.C92]&amp; CHAR(34)&amp;&quot;, &quot;&amp; CHAR(34)&amp;[Hoja1.D92]&amp; CHAR(34)&amp;&quot;, &quot;&amp; CHAR(34)&amp;[Hoja1.E92]&amp; CHAR(34)&amp;&quot;], correcta:  &quot;&amp;[Hoja1.F92]-1&amp; &quot;, observaciones: &quot; &amp; CHAR(34)&amp;[Hoja1.G92]&amp; CHAR(34) &amp; &quot; },&quot;" office:value-type="string" office:string-value=" { id: 91, enunciado: &quot;Señala la oración que contiene un adverbio de Observa el número 4523. Indica cuál es la cifra de las UNIDADES DE MILLAR:.&quot;, opciones: [&quot;3&quot;, &quot;8&quot;, &quot;5&quot;, &quot;4&quot;], correcta:  3, observaciones: &quot;La cifra de las unidades de millar es la cuarta de la parte entera contando desde la derecha.&quot; },">
            <text:p><text:s/>{ id: 91, enunciado: "Señala la oración que contiene un adverbio de Observa el número 4523. Indica cuál es la cifra de las UNIDADES DE MILLAR:.", opciones: ["3", "8", "5", "4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3]  &amp;&quot;.&quot; &amp; CHAR(34) &amp; &quot;, opciones: [&quot;&amp; CHAR(34)&amp;[Hoja1.B93]&amp; CHAR(34)&amp;&quot;, &quot;&amp; CHAR(34)&amp;[Hoja1.C93]&amp; CHAR(34)&amp;&quot;, &quot;&amp; CHAR(34)&amp;[Hoja1.D93]&amp; CHAR(34)&amp;&quot;, &quot;&amp; CHAR(34)&amp;[Hoja1.E93]&amp; CHAR(34)&amp;&quot;], correcta:  &quot;&amp;[Hoja1.F93]-1&amp; &quot;, observaciones: &quot; &amp; CHAR(34)&amp;[Hoja1.G93]&amp; CHAR(34) &amp; &quot; },&quot;" office:value-type="string" office:string-value=" { id: 92, enunciado: &quot;Señala la oración que contiene un adverbio de Observa el número 7480. Indica cuál es la cifra de las UNIDADES DE MILLAR:.&quot;, opciones: [&quot;2&quot;, &quot;1&quot;, &quot;7&quot;, &quot;4&quot;], correcta:  2, observaciones: &quot;La cifra de las unidades de millar es la cuarta de la parte entera contando desde la derecha.&quot; },">
            <text:p><text:s/>{ id: 92, enunciado: "Señala la oración que contiene un adverbio de Observa el número 7480. Indica cuál es la cifra de las UNIDADES DE MILLAR:.", opciones: ["2", "1", "7", "4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4]  &amp;&quot;.&quot; &amp; CHAR(34) &amp; &quot;, opciones: [&quot;&amp; CHAR(34)&amp;[Hoja1.B94]&amp; CHAR(34)&amp;&quot;, &quot;&amp; CHAR(34)&amp;[Hoja1.C94]&amp; CHAR(34)&amp;&quot;, &quot;&amp; CHAR(34)&amp;[Hoja1.D94]&amp; CHAR(34)&amp;&quot;, &quot;&amp; CHAR(34)&amp;[Hoja1.E94]&amp; CHAR(34)&amp;&quot;], correcta:  &quot;&amp;[Hoja1.F94]-1&amp; &quot;, observaciones: &quot; &amp; CHAR(34)&amp;[Hoja1.G94]&amp; CHAR(34) &amp; &quot; },&quot;" office:value-type="string" office:string-value=" { id: 93, enunciado: &quot;Señala la oración que contiene un adverbio de Observa el número 5376. Indica cuál es la cifra de las UNIDADES DE MILLAR:.&quot;, opciones: [&quot;5&quot;, &quot;7&quot;, &quot;1&quot;, &quot;4&quot;], correcta:  0, observaciones: &quot;La cifra de las unidades de millar es la cuarta de la parte entera contando desde la derecha.&quot; },">
            <text:p><text:s/>{ id: 93, enunciado: "Señala la oración que contiene un adverbio de Observa el número 5376. Indica cuál es la cifra de las UNIDADES DE MILLAR:.", opciones: ["5", "7", "1", "4"], correcta: <text:s/>0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5]  &amp;&quot;.&quot; &amp; CHAR(34) &amp; &quot;, opciones: [&quot;&amp; CHAR(34)&amp;[Hoja1.B95]&amp; CHAR(34)&amp;&quot;, &quot;&amp; CHAR(34)&amp;[Hoja1.C95]&amp; CHAR(34)&amp;&quot;, &quot;&amp; CHAR(34)&amp;[Hoja1.D95]&amp; CHAR(34)&amp;&quot;, &quot;&amp; CHAR(34)&amp;[Hoja1.E95]&amp; CHAR(34)&amp;&quot;], correcta:  &quot;&amp;[Hoja1.F95]-1&amp; &quot;, observaciones: &quot; &amp; CHAR(34)&amp;[Hoja1.G95]&amp; CHAR(34) &amp; &quot; },&quot;" office:value-type="string" office:string-value=" { id: 94, enunciado: &quot;Señala la oración que contiene un adverbio de Observa el número 5731. Indica cuál es la cifra de las UNIDADES DE MILLAR:.&quot;, opciones: [&quot;5&quot;, &quot;0&quot;, &quot;7&quot;, &quot;1&quot;], correcta:  0, observaciones: &quot;La cifra de las unidades de millar es la cuarta de la parte entera contando desde la derecha.&quot; },">
            <text:p><text:s/>{ id: 94, enunciado: "Señala la oración que contiene un adverbio de Observa el número 5731. Indica cuál es la cifra de las UNIDADES DE MILLAR:.", opciones: ["5", "0", "7", "1"], correcta: <text:s/>0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6]  &amp;&quot;.&quot; &amp; CHAR(34) &amp; &quot;, opciones: [&quot;&amp; CHAR(34)&amp;[Hoja1.B96]&amp; CHAR(34)&amp;&quot;, &quot;&amp; CHAR(34)&amp;[Hoja1.C96]&amp; CHAR(34)&amp;&quot;, &quot;&amp; CHAR(34)&amp;[Hoja1.D96]&amp; CHAR(34)&amp;&quot;, &quot;&amp; CHAR(34)&amp;[Hoja1.E96]&amp; CHAR(34)&amp;&quot;], correcta:  &quot;&amp;[Hoja1.F96]-1&amp; &quot;, observaciones: &quot; &amp; CHAR(34)&amp;[Hoja1.G96]&amp; CHAR(34) &amp; &quot; },&quot;" office:value-type="string" office:string-value=" { id: 95, enunciado: &quot;Señala la oración que contiene un adverbio de Observa el número 5870. Indica cuál es la cifra de las UNIDADES DE MILLAR:.&quot;, opciones: [&quot;5&quot;, &quot;0&quot;, &quot;8&quot;, &quot;7&quot;], correcta:  0, observaciones: &quot;La cifra de las unidades de millar es la cuarta de la parte entera contando desde la derecha.&quot; },">
            <text:p><text:s/>{ id: 95, enunciado: "Señala la oración que contiene un adverbio de Observa el número 5870. Indica cuál es la cifra de las UNIDADES DE MILLAR:.", opciones: ["5", "0", "8", "7"], correcta: <text:s/>0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7]  &amp;&quot;.&quot; &amp; CHAR(34) &amp; &quot;, opciones: [&quot;&amp; CHAR(34)&amp;[Hoja1.B97]&amp; CHAR(34)&amp;&quot;, &quot;&amp; CHAR(34)&amp;[Hoja1.C97]&amp; CHAR(34)&amp;&quot;, &quot;&amp; CHAR(34)&amp;[Hoja1.D97]&amp; CHAR(34)&amp;&quot;, &quot;&amp; CHAR(34)&amp;[Hoja1.E97]&amp; CHAR(34)&amp;&quot;], correcta:  &quot;&amp;[Hoja1.F97]-1&amp; &quot;, observaciones: &quot; &amp; CHAR(34)&amp;[Hoja1.G97]&amp; CHAR(34) &amp; &quot; },&quot;" office:value-type="string" office:string-value=" { id: 96, enunciado: &quot;Señala la oración que contiene un adverbio de Observa el número 4215. Indica cuál es la cifra de las UNIDADES DE MILLAR:.&quot;, opciones: [&quot;4&quot;, &quot;8&quot;, &quot;9&quot;, &quot;5&quot;], correcta:  0, observaciones: &quot;La cifra de las unidades de millar es la cuarta de la parte entera contando desde la derecha.&quot; },">
            <text:p><text:s/>{ id: 96, enunciado: "Señala la oración que contiene un adverbio de Observa el número 4215. Indica cuál es la cifra de las UNIDADES DE MILLAR:.", opciones: ["4", "8", "9", "5"], correcta: <text:s/>0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8]  &amp;&quot;.&quot; &amp; CHAR(34) &amp; &quot;, opciones: [&quot;&amp; CHAR(34)&amp;[Hoja1.B98]&amp; CHAR(34)&amp;&quot;, &quot;&amp; CHAR(34)&amp;[Hoja1.C98]&amp; CHAR(34)&amp;&quot;, &quot;&amp; CHAR(34)&amp;[Hoja1.D98]&amp; CHAR(34)&amp;&quot;, &quot;&amp; CHAR(34)&amp;[Hoja1.E98]&amp; CHAR(34)&amp;&quot;], correcta:  &quot;&amp;[Hoja1.F98]-1&amp; &quot;, observaciones: &quot; &amp; CHAR(34)&amp;[Hoja1.G98]&amp; CHAR(34) &amp; &quot; },&quot;" office:value-type="string" office:string-value=" { id: 97, enunciado: &quot;Señala la oración que contiene un adverbio de Observa el número 1273. Indica cuál es la cifra de las UNIDADES DE MILLAR:.&quot;, opciones: [&quot;2&quot;, &quot;1&quot;, &quot;3&quot;, &quot;8&quot;], correcta:  1, observaciones: &quot;La cifra de las unidades de millar es la cuarta de la parte entera contando desde la derecha.&quot; },">
            <text:p><text:s/>{ id: 97, enunciado: "Señala la oración que contiene un adverbio de Observa el número 1273. Indica cuál es la cifra de las UNIDADES DE MILLAR:.", opciones: ["2", "1", "3", "8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99]  &amp;&quot;.&quot; &amp; CHAR(34) &amp; &quot;, opciones: [&quot;&amp; CHAR(34)&amp;[Hoja1.B99]&amp; CHAR(34)&amp;&quot;, &quot;&amp; CHAR(34)&amp;[Hoja1.C99]&amp; CHAR(34)&amp;&quot;, &quot;&amp; CHAR(34)&amp;[Hoja1.D99]&amp; CHAR(34)&amp;&quot;, &quot;&amp; CHAR(34)&amp;[Hoja1.E99]&amp; CHAR(34)&amp;&quot;], correcta:  &quot;&amp;[Hoja1.F99]-1&amp; &quot;, observaciones: &quot; &amp; CHAR(34)&amp;[Hoja1.G99]&amp; CHAR(34) &amp; &quot; },&quot;" office:value-type="string" office:string-value=" { id: 98, enunciado: &quot;Señala la oración que contiene un adverbio de Observa el número 1468. Indica cuál es la cifra de las UNIDADES DE MILLAR:.&quot;, opciones: [&quot;1&quot;, &quot;7&quot;, &quot;6&quot;, &quot;0&quot;], correcta:  0, observaciones: &quot;La cifra de las unidades de millar es la cuarta de la parte entera contando desde la derecha.&quot; },">
            <text:p><text:s/>{ id: 98, enunciado: "Señala la oración que contiene un adverbio de Observa el número 1468. Indica cuál es la cifra de las UNIDADES DE MILLAR:.", opciones: ["1", "7", "6", "0"], correcta: <text:s/>0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0]  &amp;&quot;.&quot; &amp; CHAR(34) &amp; &quot;, opciones: [&quot;&amp; CHAR(34)&amp;[Hoja1.B100]&amp; CHAR(34)&amp;&quot;, &quot;&amp; CHAR(34)&amp;[Hoja1.C100]&amp; CHAR(34)&amp;&quot;, &quot;&amp; CHAR(34)&amp;[Hoja1.D100]&amp; CHAR(34)&amp;&quot;, &quot;&amp; CHAR(34)&amp;[Hoja1.E100]&amp; CHAR(34)&amp;&quot;], correcta:  &quot;&amp;[Hoja1.F100]-1&amp; &quot;, observaciones: &quot; &amp; CHAR(34)&amp;[Hoja1.G100]&amp; CHAR(34) &amp; &quot; },&quot;" office:value-type="string" office:string-value=" { id: 99, enunciado: &quot;Señala la oración que contiene un adverbio de Observa el número 4791. Indica cuál es la cifra de las UNIDADES DE MILLAR:.&quot;, opciones: [&quot;1&quot;, &quot;4&quot;, &quot;7&quot;, &quot;9&quot;], correcta:  1, observaciones: &quot;La cifra de las unidades de millar es la cuarta de la parte entera contando desde la derecha.&quot; },">
            <text:p><text:s/>{ id: 99, enunciado: "Señala la oración que contiene un adverbio de Observa el número 4791. Indica cuál es la cifra de las UNIDADES DE MILLAR:.", opciones: ["1", "4", "7", "9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1]  &amp;&quot;.&quot; &amp; CHAR(34) &amp; &quot;, opciones: [&quot;&amp; CHAR(34)&amp;[Hoja1.B101]&amp; CHAR(34)&amp;&quot;, &quot;&amp; CHAR(34)&amp;[Hoja1.C101]&amp; CHAR(34)&amp;&quot;, &quot;&amp; CHAR(34)&amp;[Hoja1.D101]&amp; CHAR(34)&amp;&quot;, &quot;&amp; CHAR(34)&amp;[Hoja1.E101]&amp; CHAR(34)&amp;&quot;], correcta:  &quot;&amp;[Hoja1.F101]-1&amp; &quot;, observaciones: &quot; &amp; CHAR(34)&amp;[Hoja1.G101]&amp; CHAR(34) &amp; &quot; },&quot;" office:value-type="string" office:string-value=" { id: 100, enunciado: &quot;Señala la oración que contiene un adverbio de Observa el número 3091. Indica cuál es la cifra de las UNIDADES DE MILLAR:.&quot;, opciones: [&quot;4&quot;, &quot;3&quot;, &quot;9&quot;, &quot;8&quot;], correcta:  1, observaciones: &quot;La cifra de las unidades de millar es la cuarta de la parte entera contando desde la derecha.&quot; },">
            <text:p><text:s/>{ id: 100, enunciado: "Señala la oración que contiene un adverbio de Observa el número 3091. Indica cuál es la cifra de las UNIDADES DE MILLAR:.", opciones: ["4", "3", "9", "8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2]  &amp;&quot;.&quot; &amp; CHAR(34) &amp; &quot;, opciones: [&quot;&amp; CHAR(34)&amp;[Hoja1.B102]&amp; CHAR(34)&amp;&quot;, &quot;&amp; CHAR(34)&amp;[Hoja1.C102]&amp; CHAR(34)&amp;&quot;, &quot;&amp; CHAR(34)&amp;[Hoja1.D102]&amp; CHAR(34)&amp;&quot;, &quot;&amp; CHAR(34)&amp;[Hoja1.E102]&amp; CHAR(34)&amp;&quot;], correcta:  &quot;&amp;[Hoja1.F102]-1&amp; &quot;, observaciones: &quot; &amp; CHAR(34)&amp;[Hoja1.G102]&amp; CHAR(34) &amp; &quot; },&quot;" office:value-type="string" office:string-value=" { id: 101, enunciado: &quot;Señala la oración que contiene un adverbio de Observa el número 7851. Indica cuál es la cifra de las UNIDADES DE MILLAR:.&quot;, opciones: [&quot;9&quot;, &quot;2&quot;, &quot;8&quot;, &quot;7&quot;], correcta:  3, observaciones: &quot;La cifra de las unidades de millar es la cuarta de la parte entera contando desde la derecha.&quot; },">
            <text:p><text:s/>{ id: 101, enunciado: "Señala la oración que contiene un adverbio de Observa el número 7851. Indica cuál es la cifra de las UNIDADES DE MILLAR:.", opciones: ["9", "2", "8", "7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3]  &amp;&quot;.&quot; &amp; CHAR(34) &amp; &quot;, opciones: [&quot;&amp; CHAR(34)&amp;[Hoja1.B103]&amp; CHAR(34)&amp;&quot;, &quot;&amp; CHAR(34)&amp;[Hoja1.C103]&amp; CHAR(34)&amp;&quot;, &quot;&amp; CHAR(34)&amp;[Hoja1.D103]&amp; CHAR(34)&amp;&quot;, &quot;&amp; CHAR(34)&amp;[Hoja1.E103]&amp; CHAR(34)&amp;&quot;], correcta:  &quot;&amp;[Hoja1.F103]-1&amp; &quot;, observaciones: &quot; &amp; CHAR(34)&amp;[Hoja1.G103]&amp; CHAR(34) &amp; &quot; },&quot;" office:value-type="string" office:string-value=" { id: 102, enunciado: &quot;Señala la oración que contiene un adverbio de Observa el número 9856. Indica cuál es la cifra de las UNIDADES DE MILLAR:.&quot;, opciones: [&quot;5&quot;, &quot;1&quot;, &quot;8&quot;, &quot;9&quot;], correcta:  3, observaciones: &quot;La cifra de las unidades de millar es la cuarta de la parte entera contando desde la derecha.&quot; },">
            <text:p><text:s/>{ id: 102, enunciado: "Señala la oración que contiene un adverbio de Observa el número 9856. Indica cuál es la cifra de las UNIDADES DE MILLAR:.", opciones: ["5", "1", "8", "9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4]  &amp;&quot;.&quot; &amp; CHAR(34) &amp; &quot;, opciones: [&quot;&amp; CHAR(34)&amp;[Hoja1.B104]&amp; CHAR(34)&amp;&quot;, &quot;&amp; CHAR(34)&amp;[Hoja1.C104]&amp; CHAR(34)&amp;&quot;, &quot;&amp; CHAR(34)&amp;[Hoja1.D104]&amp; CHAR(34)&amp;&quot;, &quot;&amp; CHAR(34)&amp;[Hoja1.E104]&amp; CHAR(34)&amp;&quot;], correcta:  &quot;&amp;[Hoja1.F104]-1&amp; &quot;, observaciones: &quot; &amp; CHAR(34)&amp;[Hoja1.G104]&amp; CHAR(34) &amp; &quot; },&quot;" office:value-type="string" office:string-value=" { id: 103, enunciado: &quot;Señala la oración que contiene un adverbio de Observa el número 4365. Indica cuál es la cifra de las UNIDADES DE MILLAR:.&quot;, opciones: [&quot;0&quot;, &quot;3&quot;, &quot;4&quot;, &quot;1&quot;], correcta:  2, observaciones: &quot;La cifra de las unidades de millar es la cuarta de la parte entera contando desde la derecha.&quot; },">
            <text:p><text:s/>{ id: 103, enunciado: "Señala la oración que contiene un adverbio de Observa el número 4365. Indica cuál es la cifra de las UNIDADES DE MILLAR:.", opciones: ["0", "3", "4", "1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5]  &amp;&quot;.&quot; &amp; CHAR(34) &amp; &quot;, opciones: [&quot;&amp; CHAR(34)&amp;[Hoja1.B105]&amp; CHAR(34)&amp;&quot;, &quot;&amp; CHAR(34)&amp;[Hoja1.C105]&amp; CHAR(34)&amp;&quot;, &quot;&amp; CHAR(34)&amp;[Hoja1.D105]&amp; CHAR(34)&amp;&quot;, &quot;&amp; CHAR(34)&amp;[Hoja1.E105]&amp; CHAR(34)&amp;&quot;], correcta:  &quot;&amp;[Hoja1.F105]-1&amp; &quot;, observaciones: &quot; &amp; CHAR(34)&amp;[Hoja1.G105]&amp; CHAR(34) &amp; &quot; },&quot;" office:value-type="string" office:string-value=" { id: 104, enunciado: &quot;Señala la oración que contiene un adverbio de Observa el número 5739. Indica cuál es la cifra de las UNIDADES DE MILLAR:.&quot;, opciones: [&quot;4&quot;, &quot;7&quot;, &quot;5&quot;, &quot;9&quot;], correcta:  2, observaciones: &quot;La cifra de las unidades de millar es la cuarta de la parte entera contando desde la derecha.&quot; },">
            <text:p><text:s/>{ id: 104, enunciado: "Señala la oración que contiene un adverbio de Observa el número 5739. Indica cuál es la cifra de las UNIDADES DE MILLAR:.", opciones: ["4", "7", "5", "9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6]  &amp;&quot;.&quot; &amp; CHAR(34) &amp; &quot;, opciones: [&quot;&amp; CHAR(34)&amp;[Hoja1.B106]&amp; CHAR(34)&amp;&quot;, &quot;&amp; CHAR(34)&amp;[Hoja1.C106]&amp; CHAR(34)&amp;&quot;, &quot;&amp; CHAR(34)&amp;[Hoja1.D106]&amp; CHAR(34)&amp;&quot;, &quot;&amp; CHAR(34)&amp;[Hoja1.E106]&amp; CHAR(34)&amp;&quot;], correcta:  &quot;&amp;[Hoja1.F106]-1&amp; &quot;, observaciones: &quot; &amp; CHAR(34)&amp;[Hoja1.G106]&amp; CHAR(34) &amp; &quot; },&quot;" office:value-type="string" office:string-value=" { id: 105, enunciado: &quot;Señala la oración que contiene un adverbio de Observa el número 3596. Indica cuál es la cifra de las UNIDADES DE MILLAR:.&quot;, opciones: [&quot;4&quot;, &quot;9&quot;, &quot;0&quot;, &quot;3&quot;], correcta:  3, observaciones: &quot;La cifra de las unidades de millar es la cuarta de la parte entera contando desde la derecha.&quot; },">
            <text:p><text:s/>{ id: 105, enunciado: "Señala la oración que contiene un adverbio de Observa el número 3596. Indica cuál es la cifra de las UNIDADES DE MILLAR:.", opciones: ["4", "9", "0", "3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7]  &amp;&quot;.&quot; &amp; CHAR(34) &amp; &quot;, opciones: [&quot;&amp; CHAR(34)&amp;[Hoja1.B107]&amp; CHAR(34)&amp;&quot;, &quot;&amp; CHAR(34)&amp;[Hoja1.C107]&amp; CHAR(34)&amp;&quot;, &quot;&amp; CHAR(34)&amp;[Hoja1.D107]&amp; CHAR(34)&amp;&quot;, &quot;&amp; CHAR(34)&amp;[Hoja1.E107]&amp; CHAR(34)&amp;&quot;], correcta:  &quot;&amp;[Hoja1.F107]-1&amp; &quot;, observaciones: &quot; &amp; CHAR(34)&amp;[Hoja1.G107]&amp; CHAR(34) &amp; &quot; },&quot;" office:value-type="string" office:string-value=" { id: 106, enunciado: &quot;Señala la oración que contiene un adverbio de Observa el número 7103. Indica cuál es la cifra de las UNIDADES DE MILLAR:.&quot;, opciones: [&quot;7&quot;, &quot;0&quot;, &quot;2&quot;, &quot;3&quot;], correcta:  0, observaciones: &quot;La cifra de las unidades de millar es la cuarta de la parte entera contando desde la derecha.&quot; },">
            <text:p><text:s/>{ id: 106, enunciado: "Señala la oración que contiene un adverbio de Observa el número 7103. Indica cuál es la cifra de las UNIDADES DE MILLAR:.", opciones: ["7", "0", "2", "3"], correcta: <text:s/>0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8]  &amp;&quot;.&quot; &amp; CHAR(34) &amp; &quot;, opciones: [&quot;&amp; CHAR(34)&amp;[Hoja1.B108]&amp; CHAR(34)&amp;&quot;, &quot;&amp; CHAR(34)&amp;[Hoja1.C108]&amp; CHAR(34)&amp;&quot;, &quot;&amp; CHAR(34)&amp;[Hoja1.D108]&amp; CHAR(34)&amp;&quot;, &quot;&amp; CHAR(34)&amp;[Hoja1.E108]&amp; CHAR(34)&amp;&quot;], correcta:  &quot;&amp;[Hoja1.F108]-1&amp; &quot;, observaciones: &quot; &amp; CHAR(34)&amp;[Hoja1.G108]&amp; CHAR(34) &amp; &quot; },&quot;" office:value-type="string" office:string-value=" { id: 107, enunciado: &quot;Señala la oración que contiene un adverbio de Observa el número 2096. Indica cuál es la cifra de las UNIDADES DE MILLAR:.&quot;, opciones: [&quot;5&quot;, &quot;3&quot;, &quot;2&quot;, &quot;4&quot;], correcta:  2, observaciones: &quot;La cifra de las unidades de millar es la cuarta de la parte entera contando desde la derecha.&quot; },">
            <text:p><text:s/>{ id: 107, enunciado: "Señala la oración que contiene un adverbio de Observa el número 2096. Indica cuál es la cifra de las UNIDADES DE MILLAR:.", opciones: ["5", "3", "2", "4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09]  &amp;&quot;.&quot; &amp; CHAR(34) &amp; &quot;, opciones: [&quot;&amp; CHAR(34)&amp;[Hoja1.B109]&amp; CHAR(34)&amp;&quot;, &quot;&amp; CHAR(34)&amp;[Hoja1.C109]&amp; CHAR(34)&amp;&quot;, &quot;&amp; CHAR(34)&amp;[Hoja1.D109]&amp; CHAR(34)&amp;&quot;, &quot;&amp; CHAR(34)&amp;[Hoja1.E109]&amp; CHAR(34)&amp;&quot;], correcta:  &quot;&amp;[Hoja1.F109]-1&amp; &quot;, observaciones: &quot; &amp; CHAR(34)&amp;[Hoja1.G109]&amp; CHAR(34) &amp; &quot; },&quot;" office:value-type="string" office:string-value=" { id: 108, enunciado: &quot;Señala la oración que contiene un adverbio de Observa el número 1926. Indica cuál es la cifra de las UNIDADES DE MILLAR:.&quot;, opciones: [&quot;9&quot;, &quot;4&quot;, &quot;1&quot;, &quot;6&quot;], correcta:  2, observaciones: &quot;La cifra de las unidades de millar es la cuarta de la parte entera contando desde la derecha.&quot; },">
            <text:p><text:s/>{ id: 108, enunciado: "Señala la oración que contiene un adverbio de Observa el número 1926. Indica cuál es la cifra de las UNIDADES DE MILLAR:.", opciones: ["9", "4", "1", "6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0]  &amp;&quot;.&quot; &amp; CHAR(34) &amp; &quot;, opciones: [&quot;&amp; CHAR(34)&amp;[Hoja1.B110]&amp; CHAR(34)&amp;&quot;, &quot;&amp; CHAR(34)&amp;[Hoja1.C110]&amp; CHAR(34)&amp;&quot;, &quot;&amp; CHAR(34)&amp;[Hoja1.D110]&amp; CHAR(34)&amp;&quot;, &quot;&amp; CHAR(34)&amp;[Hoja1.E110]&amp; CHAR(34)&amp;&quot;], correcta:  &quot;&amp;[Hoja1.F110]-1&amp; &quot;, observaciones: &quot; &amp; CHAR(34)&amp;[Hoja1.G110]&amp; CHAR(34) &amp; &quot; },&quot;" office:value-type="string" office:string-value=" { id: 109, enunciado: &quot;Señala la oración que contiene un adverbio de Observa el número 1734. Indica cuál es la cifra de las UNIDADES DE MILLAR:.&quot;, opciones: [&quot;7&quot;, &quot;2&quot;, &quot;9&quot;, &quot;1&quot;], correcta:  3, observaciones: &quot;La cifra de las unidades de millar es la cuarta de la parte entera contando desde la derecha.&quot; },">
            <text:p><text:s/>{ id: 109, enunciado: "Señala la oración que contiene un adverbio de Observa el número 1734. Indica cuál es la cifra de las UNIDADES DE MILLAR:.", opciones: ["7", "2", "9", "1"], correcta: <text:s/>3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1]  &amp;&quot;.&quot; &amp; CHAR(34) &amp; &quot;, opciones: [&quot;&amp; CHAR(34)&amp;[Hoja1.B111]&amp; CHAR(34)&amp;&quot;, &quot;&amp; CHAR(34)&amp;[Hoja1.C111]&amp; CHAR(34)&amp;&quot;, &quot;&amp; CHAR(34)&amp;[Hoja1.D111]&amp; CHAR(34)&amp;&quot;, &quot;&amp; CHAR(34)&amp;[Hoja1.E111]&amp; CHAR(34)&amp;&quot;], correcta:  &quot;&amp;[Hoja1.F111]-1&amp; &quot;, observaciones: &quot; &amp; CHAR(34)&amp;[Hoja1.G111]&amp; CHAR(34) &amp; &quot; },&quot;" office:value-type="string" office:string-value=" { id: 110, enunciado: &quot;Señala la oración que contiene un adverbio de Observa el número 9645. Indica cuál es la cifra de las UNIDADES DE MILLAR:.&quot;, opciones: [&quot;4&quot;, &quot;9&quot;, &quot;1&quot;, &quot;5&quot;], correcta:  1, observaciones: &quot;La cifra de las unidades de millar es la cuarta de la parte entera contando desde la derecha.&quot; },">
            <text:p><text:s/>{ id: 110, enunciado: "Señala la oración que contiene un adverbio de Observa el número 9645. Indica cuál es la cifra de las UNIDADES DE MILLAR:.", opciones: ["4", "9", "1", "5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2]  &amp;&quot;.&quot; &amp; CHAR(34) &amp; &quot;, opciones: [&quot;&amp; CHAR(34)&amp;[Hoja1.B112]&amp; CHAR(34)&amp;&quot;, &quot;&amp; CHAR(34)&amp;[Hoja1.C112]&amp; CHAR(34)&amp;&quot;, &quot;&amp; CHAR(34)&amp;[Hoja1.D112]&amp; CHAR(34)&amp;&quot;, &quot;&amp; CHAR(34)&amp;[Hoja1.E112]&amp; CHAR(34)&amp;&quot;], correcta:  &quot;&amp;[Hoja1.F112]-1&amp; &quot;, observaciones: &quot; &amp; CHAR(34)&amp;[Hoja1.G112]&amp; CHAR(34) &amp; &quot; },&quot;" office:value-type="string" office:string-value=" { id: 111, enunciado: &quot;Señala la oración que contiene un adverbio de Observa el número 9350. Indica cuál es la cifra de las UNIDADES DE MILLAR:.&quot;, opciones: [&quot;1&quot;, &quot;9&quot;, &quot;0&quot;, &quot;8&quot;], correcta:  1, observaciones: &quot;La cifra de las unidades de millar es la cuarta de la parte entera contando desde la derecha.&quot; },">
            <text:p><text:s/>{ id: 111, enunciado: "Señala la oración que contiene un adverbio de Observa el número 9350. Indica cuál es la cifra de las UNIDADES DE MILLAR:.", opciones: ["1", "9", "0", "8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3]  &amp;&quot;.&quot; &amp; CHAR(34) &amp; &quot;, opciones: [&quot;&amp; CHAR(34)&amp;[Hoja1.B113]&amp; CHAR(34)&amp;&quot;, &quot;&amp; CHAR(34)&amp;[Hoja1.C113]&amp; CHAR(34)&amp;&quot;, &quot;&amp; CHAR(34)&amp;[Hoja1.D113]&amp; CHAR(34)&amp;&quot;, &quot;&amp; CHAR(34)&amp;[Hoja1.E113]&amp; CHAR(34)&amp;&quot;], correcta:  &quot;&amp;[Hoja1.F113]-1&amp; &quot;, observaciones: &quot; &amp; CHAR(34)&amp;[Hoja1.G113]&amp; CHAR(34) &amp; &quot; },&quot;" office:value-type="string" office:string-value=" { id: 112, enunciado: &quot;Señala la oración que contiene un adverbio de Observa el número 6479. Indica cuál es la cifra de las UNIDADES DE MILLAR:.&quot;, opciones: [&quot;2&quot;, &quot;6&quot;, &quot;5&quot;, &quot;4&quot;], correcta:  1, observaciones: &quot;La cifra de las unidades de millar es la cuarta de la parte entera contando desde la derecha.&quot; },">
            <text:p><text:s/>{ id: 112, enunciado: "Señala la oración que contiene un adverbio de Observa el número 6479. Indica cuál es la cifra de las UNIDADES DE MILLAR:.", opciones: ["2", "6", "5", "4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4]  &amp;&quot;.&quot; &amp; CHAR(34) &amp; &quot;, opciones: [&quot;&amp; CHAR(34)&amp;[Hoja1.B114]&amp; CHAR(34)&amp;&quot;, &quot;&amp; CHAR(34)&amp;[Hoja1.C114]&amp; CHAR(34)&amp;&quot;, &quot;&amp; CHAR(34)&amp;[Hoja1.D114]&amp; CHAR(34)&amp;&quot;, &quot;&amp; CHAR(34)&amp;[Hoja1.E114]&amp; CHAR(34)&amp;&quot;], correcta:  &quot;&amp;[Hoja1.F114]-1&amp; &quot;, observaciones: &quot; &amp; CHAR(34)&amp;[Hoja1.G114]&amp; CHAR(34) &amp; &quot; },&quot;" office:value-type="string" office:string-value=" { id: 113, enunciado: &quot;Señala la oración que contiene un adverbio de Observa el número 6185. Indica cuál es la cifra de las UNIDADES DE MILLAR:.&quot;, opciones: [&quot;1&quot;, &quot;6&quot;, &quot;2&quot;, &quot;9&quot;], correcta:  1, observaciones: &quot;La cifra de las unidades de millar es la cuarta de la parte entera contando desde la derecha.&quot; },">
            <text:p><text:s/>{ id: 113, enunciado: "Señala la oración que contiene un adverbio de Observa el número 6185. Indica cuál es la cifra de las UNIDADES DE MILLAR:.", opciones: ["1", "6", "2", "9"], correcta: <text:s/>1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5]  &amp;&quot;.&quot; &amp; CHAR(34) &amp; &quot;, opciones: [&quot;&amp; CHAR(34)&amp;[Hoja1.B115]&amp; CHAR(34)&amp;&quot;, &quot;&amp; CHAR(34)&amp;[Hoja1.C115]&amp; CHAR(34)&amp;&quot;, &quot;&amp; CHAR(34)&amp;[Hoja1.D115]&amp; CHAR(34)&amp;&quot;, &quot;&amp; CHAR(34)&amp;[Hoja1.E115]&amp; CHAR(34)&amp;&quot;], correcta:  &quot;&amp;[Hoja1.F115]-1&amp; &quot;, observaciones: &quot; &amp; CHAR(34)&amp;[Hoja1.G115]&amp; CHAR(34) &amp; &quot; },&quot;" office:value-type="string" office:string-value=" { id: 114, enunciado: &quot;Señala la oración que contiene un adverbio de Observa el número 3487. Indica cuál es la cifra de las UNIDADES DE MILLAR:.&quot;, opciones: [&quot;2&quot;, &quot;5&quot;, &quot;3&quot;, &quot;0&quot;], correcta:  2, observaciones: &quot;La cifra de las unidades de millar es la cuarta de la parte entera contando desde la derecha.&quot; },">
            <text:p><text:s/>{ id: 114, enunciado: "Señala la oración que contiene un adverbio de Observa el número 3487. Indica cuál es la cifra de las UNIDADES DE MILLAR:.", opciones: ["2", "5", "3", "0"], correcta: <text:s/>2, observaciones: "La cifra de las unidades de millar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6]  &amp;&quot;.&quot; &amp; CHAR(34) &amp; &quot;, opciones: [&quot;&amp; CHAR(34)&amp;[Hoja1.B116]&amp; CHAR(34)&amp;&quot;, &quot;&amp; CHAR(34)&amp;[Hoja1.C116]&amp; CHAR(34)&amp;&quot;, &quot;&amp; CHAR(34)&amp;[Hoja1.D116]&amp; CHAR(34)&amp;&quot;, &quot;&amp; CHAR(34)&amp;[Hoja1.E116]&amp; CHAR(34)&amp;&quot;], correcta:  &quot;&amp;[Hoja1.F116]-1&amp; &quot;, observaciones: &quot; &amp; CHAR(34)&amp;[Hoja1.G116]&amp; CHAR(34) &amp; &quot; },&quot;" office:value-type="string" office:string-value=" { id: 115, enunciado: &quot;Señala la oración que contiene un adverbio de Observa el número 1468. Indica cuál es la cifra de las UNIDADES:.&quot;, opciones: [&quot;6&quot;, &quot;0&quot;, &quot;8&quot;, &quot;3&quot;], correcta:  2, observaciones: &quot;La cifra de las unidades es la última de la parte entera.&quot; },">
            <text:p><text:s/>{ id: 115, enunciado: "Señala la oración que contiene un adverbio de Observa el número 1468. Indica cuál es la cifra de las UNIDADES:.", opciones: ["6", "0", "8", "3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7]  &amp;&quot;.&quot; &amp; CHAR(34) &amp; &quot;, opciones: [&quot;&amp; CHAR(34)&amp;[Hoja1.B117]&amp; CHAR(34)&amp;&quot;, &quot;&amp; CHAR(34)&amp;[Hoja1.C117]&amp; CHAR(34)&amp;&quot;, &quot;&amp; CHAR(34)&amp;[Hoja1.D117]&amp; CHAR(34)&amp;&quot;, &quot;&amp; CHAR(34)&amp;[Hoja1.E117]&amp; CHAR(34)&amp;&quot;], correcta:  &quot;&amp;[Hoja1.F117]-1&amp; &quot;, observaciones: &quot; &amp; CHAR(34)&amp;[Hoja1.G117]&amp; CHAR(34) &amp; &quot; },&quot;" office:value-type="string" office:string-value=" { id: 116, enunciado: &quot;Señala la oración que contiene un adverbio de Observa el número 6742. Indica cuál es la cifra de las UNIDADES:.&quot;, opciones: [&quot;7&quot;, &quot;6&quot;, &quot;2&quot;, &quot;5&quot;], correcta:  2, observaciones: &quot;La cifra de las unidades es la última de la parte entera.&quot; },">
            <text:p><text:s/>{ id: 116, enunciado: "Señala la oración que contiene un adverbio de Observa el número 6742. Indica cuál es la cifra de las UNIDADES:.", opciones: ["7", "6", "2", "5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8]  &amp;&quot;.&quot; &amp; CHAR(34) &amp; &quot;, opciones: [&quot;&amp; CHAR(34)&amp;[Hoja1.B118]&amp; CHAR(34)&amp;&quot;, &quot;&amp; CHAR(34)&amp;[Hoja1.C118]&amp; CHAR(34)&amp;&quot;, &quot;&amp; CHAR(34)&amp;[Hoja1.D118]&amp; CHAR(34)&amp;&quot;, &quot;&amp; CHAR(34)&amp;[Hoja1.E118]&amp; CHAR(34)&amp;&quot;], correcta:  &quot;&amp;[Hoja1.F118]-1&amp; &quot;, observaciones: &quot; &amp; CHAR(34)&amp;[Hoja1.G118]&amp; CHAR(34) &amp; &quot; },&quot;" office:value-type="string" office:string-value=" { id: 117, enunciado: &quot;Señala la oración que contiene un adverbio de Observa el número 9317. Indica cuál es la cifra de las UNIDADES:.&quot;, opciones: [&quot;7&quot;, &quot;9&quot;, &quot;3&quot;, &quot;5&quot;], correcta:  0, observaciones: &quot;La cifra de las unidades es la última de la parte entera.&quot; },">
            <text:p><text:s/>{ id: 117, enunciado: "Señala la oración que contiene un adverbio de Observa el número 9317. Indica cuál es la cifra de las UNIDADES:.", opciones: ["7", "9", "3", "5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19]  &amp;&quot;.&quot; &amp; CHAR(34) &amp; &quot;, opciones: [&quot;&amp; CHAR(34)&amp;[Hoja1.B119]&amp; CHAR(34)&amp;&quot;, &quot;&amp; CHAR(34)&amp;[Hoja1.C119]&amp; CHAR(34)&amp;&quot;, &quot;&amp; CHAR(34)&amp;[Hoja1.D119]&amp; CHAR(34)&amp;&quot;, &quot;&amp; CHAR(34)&amp;[Hoja1.E119]&amp; CHAR(34)&amp;&quot;], correcta:  &quot;&amp;[Hoja1.F119]-1&amp; &quot;, observaciones: &quot; &amp; CHAR(34)&amp;[Hoja1.G119]&amp; CHAR(34) &amp; &quot; },&quot;" office:value-type="string" office:string-value=" { id: 118, enunciado: &quot;Señala la oración que contiene un adverbio de Observa el número 7491. Indica cuál es la cifra de las UNIDADES:.&quot;, opciones: [&quot;1&quot;, &quot;4&quot;, &quot;2&quot;, &quot;9&quot;], correcta:  0, observaciones: &quot;La cifra de las unidades es la última de la parte entera.&quot; },">
            <text:p><text:s/>{ id: 118, enunciado: "Señala la oración que contiene un adverbio de Observa el número 7491. Indica cuál es la cifra de las UNIDADES:.", opciones: ["1", "4", "2", "9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20]  &amp;&quot;.&quot; &amp; CHAR(34) &amp; &quot;, opciones: [&quot;&amp; CHAR(34)&amp;[Hoja1.B120]&amp; CHAR(34)&amp;&quot;, &quot;&amp; CHAR(34)&amp;[Hoja1.C120]&amp; CHAR(34)&amp;&quot;, &quot;&amp; CHAR(34)&amp;[Hoja1.D120]&amp; CHAR(34)&amp;&quot;, &quot;&amp; CHAR(34)&amp;[Hoja1.E120]&amp; CHAR(34)&amp;&quot;], correcta:  &quot;&amp;[Hoja1.F120]-1&amp; &quot;, observaciones: &quot; &amp; CHAR(34)&amp;[Hoja1.G120]&amp; CHAR(34) &amp; &quot; },&quot;" office:value-type="string" office:string-value=" { id: 119, enunciado: &quot;Señala la oración que contiene un adverbio de Observa el número 6048. Indica cuál es la cifra de las UNIDADES:.&quot;, opciones: [&quot;8&quot;, &quot;9&quot;, &quot;0&quot;, &quot;2&quot;], correcta:  0, observaciones: &quot;La cifra de las unidades es la última de la parte entera.&quot; },">
            <text:p><text:s/>{ id: 119, enunciado: "Señala la oración que contiene un adverbio de Observa el número 6048. Indica cuál es la cifra de las UNIDADES:.", opciones: ["8", "9", "0", "2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21]  &amp;&quot;.&quot; &amp; CHAR(34) &amp; &quot;, opciones: [&quot;&amp; CHAR(34)&amp;[Hoja1.B121]&amp; CHAR(34)&amp;&quot;, &quot;&amp; CHAR(34)&amp;[Hoja1.C121]&amp; CHAR(34)&amp;&quot;, &quot;&amp; CHAR(34)&amp;[Hoja1.D121]&amp; CHAR(34)&amp;&quot;, &quot;&amp; CHAR(34)&amp;[Hoja1.E121]&amp; CHAR(34)&amp;&quot;], correcta:  &quot;&amp;[Hoja1.F121]-1&amp; &quot;, observaciones: &quot; &amp; CHAR(34)&amp;[Hoja1.G121]&amp; CHAR(34) &amp; &quot; },&quot;" office:value-type="string" office:string-value=" { id: 120, enunciado: &quot;Señala la oración que contiene un adverbio de Observa el número 3490. Indica cuál es la cifra de las UNIDADES:.&quot;, opciones: [&quot;3&quot;, &quot;5&quot;, &quot;1&quot;, &quot;0&quot;], correcta:  3, observaciones: &quot;La cifra de las unidades es la última de la parte entera.&quot; },">
            <text:p><text:s/>{ id: 120, enunciado: "Señala la oración que contiene un adverbio de Observa el número 3490. Indica cuál es la cifra de las UNIDADES:.", opciones: ["3", "5", "1", "0"], correcta: <text:s/>3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22]  &amp;&quot;.&quot; &amp; CHAR(34) &amp; &quot;, opciones: [&quot;&amp; CHAR(34)&amp;[Hoja1.B122]&amp; CHAR(34)&amp;&quot;, &quot;&amp; CHAR(34)&amp;[Hoja1.C122]&amp; CHAR(34)&amp;&quot;, &quot;&amp; CHAR(34)&amp;[Hoja1.D122]&amp; CHAR(34)&amp;&quot;, &quot;&amp; CHAR(34)&amp;[Hoja1.E122]&amp; CHAR(34)&amp;&quot;], correcta:  &quot;&amp;[Hoja1.F122]-1&amp; &quot;, observaciones: &quot; &amp; CHAR(34)&amp;[Hoja1.G122]&amp; CHAR(34) &amp; &quot; },&quot;" office:value-type="string" office:string-value=" { id: 121, enunciado: &quot;Señala la oración que contiene un adverbio de Observa el número 7620. Indica cuál es la cifra de las UNIDADES:.&quot;, opciones: [&quot;9&quot;, &quot;2&quot;, &quot;0&quot;, &quot;6&quot;], correcta:  2, observaciones: &quot;La cifra de las unidades es la última de la parte entera.&quot; },">
            <text:p><text:s/>{ id: 121, enunciado: "Señala la oración que contiene un adverbio de Observa el número 7620. Indica cuál es la cifra de las UNIDADES:.", opciones: ["9", "2", "0", "6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23]  &amp;&quot;.&quot; &amp; CHAR(34) &amp; &quot;, opciones: [&quot;&amp; CHAR(34)&amp;[Hoja1.B123]&amp; CHAR(34)&amp;&quot;, &quot;&amp; CHAR(34)&amp;[Hoja1.C123]&amp; CHAR(34)&amp;&quot;, &quot;&amp; CHAR(34)&amp;[Hoja1.D123]&amp; CHAR(34)&amp;&quot;, &quot;&amp; CHAR(34)&amp;[Hoja1.E123]&amp; CHAR(34)&amp;&quot;], correcta:  &quot;&amp;[Hoja1.F123]-1&amp; &quot;, observaciones: &quot; &amp; CHAR(34)&amp;[Hoja1.G123]&amp; CHAR(34) &amp; &quot; },&quot;" office:value-type="string" office:string-value=" { id: 122, enunciado: &quot;Señala la oración que contiene un adverbio de Observa el número 6839. Indica cuál es la cifra de las UNIDADES:.&quot;, opciones: [&quot;9&quot;, &quot;7&quot;, &quot;5&quot;, &quot;6&quot;], correcta:  0, observaciones: &quot;La cifra de las unidades es la última de la parte entera.&quot; },">
            <text:p><text:s/>{ id: 122, enunciado: "Señala la oración que contiene un adverbio de Observa el número 6839. Indica cuál es la cifra de las UNIDADES:.", opciones: ["9", "7", "5", "6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24]  &amp;&quot;.&quot; &amp; CHAR(34) &amp; &quot;, opciones: [&quot;&amp; CHAR(34)&amp;[Hoja1.B124]&amp; CHAR(34)&amp;&quot;, &quot;&amp; CHAR(34)&amp;[Hoja1.C124]&amp; CHAR(34)&amp;&quot;, &quot;&amp; CHAR(34)&amp;[Hoja1.D124]&amp; CHAR(34)&amp;&quot;, &quot;&amp; CHAR(34)&amp;[Hoja1.E124]&amp; CHAR(34)&amp;&quot;], correcta:  &quot;&amp;[Hoja1.F124]-1&amp; &quot;, observaciones: &quot; &amp; CHAR(34)&amp;[Hoja1.G124]&amp; CHAR(34) &amp; &quot; },&quot;" office:value-type="string" office:string-value=" { id: 123, enunciado: &quot;Señala la oración que contiene un adverbio de Observa el número 9530. Indica cuál es la cifra de las UNIDADES:.&quot;, opciones: [&quot;3&quot;, &quot;9&quot;, &quot;0&quot;, &quot;5&quot;], correcta:  2, observaciones: &quot;La cifra de las unidades es la última de la parte entera.&quot; },">
            <text:p><text:s/>{ id: 123, enunciado: "Señala la oración que contiene un adverbio de Observa el número 9530. Indica cuál es la cifra de las UNIDADES:.", opciones: ["3", "9", "0", "5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4" table:formula="of:=&quot; { id: &quot;&amp;ROW()-1&amp;&quot;, enunciado: &quot; &amp; CHAR(34)&amp;&quot;Señala la oración que contiene un adverbio de &quot; &amp; [Hoja1.A125]  &amp;&quot;.&quot; &amp; CHAR(34) &amp; &quot;, opciones: [&quot;&amp; CHAR(34)&amp;[Hoja1.B125]&amp; CHAR(34)&amp;&quot;, &quot;&amp; CHAR(34)&amp;[Hoja1.C125]&amp; CHAR(34)&amp;&quot;, &quot;&amp; CHAR(34)&amp;[Hoja1.D125]&amp; CHAR(34)&amp;&quot;, &quot;&amp; CHAR(34)&amp;[Hoja1.E125]&amp; CHAR(34)&amp;&quot;], correcta:  &quot;&amp;[Hoja1.F125]-1&amp; &quot;, observaciones: &quot; &amp; CHAR(34)&amp;[Hoja1.G125]&amp; CHAR(34) &amp; &quot; },&quot;" office:value-type="string" office:string-value=" { id: 124, enunciado: &quot;Señala la oración que contiene un adverbio de Observa el número 1382. Indica cuál es la cifra de las UNIDADES:.&quot;, opciones: [&quot;3&quot;, &quot;1&quot;, &quot;8&quot;, &quot;2&quot;], correcta:  3, observaciones: &quot;La cifra de las unidades es la última de la parte entera.&quot; },">
            <text:p><text:s/>{ id: 124, enunciado: "Señala la oración que contiene un adverbio de Observa el número 1382. Indica cuál es la cifra de las UNIDADES:.", opciones: ["3", "1", "8", "2"], correcta: <text:s/>3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26]&amp; CHAR(34) &amp; &quot;, opciones: [&quot;&amp; CHAR(34)&amp;[Hoja1.B126]&amp; CHAR(34)&amp;&quot;, &quot;&amp; CHAR(34)&amp;[Hoja1.C126]&amp; CHAR(34)&amp;&quot;, &quot;&amp; CHAR(34)&amp;[Hoja1.D126]&amp; CHAR(34)&amp;&quot;, &quot;&amp; CHAR(34)&amp;[Hoja1.E126]&amp; CHAR(34)&amp;&quot;], correcta:  &quot;&amp;[Hoja1.F126]-1&amp; &quot;, observaciones: &quot; &amp; CHAR(34)&amp;[Hoja1.G126]&amp; CHAR(34) &amp; &quot; },&quot;" office:value-type="string" office:string-value=" { id: 125, enunciado: &quot;Observa el número 8049. Indica cuál es la cifra de las UNIDADES:&quot;, opciones: [&quot;6&quot;, &quot;9&quot;, &quot;8&quot;, &quot;3&quot;], correcta:  1, observaciones: &quot;La cifra de las unidades es la última de la parte entera.&quot; },">
            <text:p><text:s/>{ id: 125, enunciado: "Observa el número 8049. Indica cuál es la cifra de las UNIDADES:", opciones: ["6", "9", "8", "3"], correcta: <text:s/>1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27]&amp; CHAR(34) &amp; &quot;, opciones: [&quot;&amp; CHAR(34)&amp;[Hoja1.B127]&amp; CHAR(34)&amp;&quot;, &quot;&amp; CHAR(34)&amp;[Hoja1.C127]&amp; CHAR(34)&amp;&quot;, &quot;&amp; CHAR(34)&amp;[Hoja1.D127]&amp; CHAR(34)&amp;&quot;, &quot;&amp; CHAR(34)&amp;[Hoja1.E127]&amp; CHAR(34)&amp;&quot;], correcta:  &quot;&amp;[Hoja1.F127]-1&amp; &quot;, observaciones: &quot; &amp; CHAR(34)&amp;[Hoja1.G127]&amp; CHAR(34) &amp; &quot; },&quot;" office:value-type="string" office:string-value=" { id: 126, enunciado: &quot;Observa el número 4015. Indica cuál es la cifra de las UNIDADES:&quot;, opciones: [&quot;7&quot;, &quot;8&quot;, &quot;5&quot;, &quot;0&quot;], correcta:  2, observaciones: &quot;La cifra de las unidades es la última de la parte entera.&quot; },">
            <text:p><text:s/>{ id: 126, enunciado: "Observa el número 4015. Indica cuál es la cifra de las UNIDADES:", opciones: ["7", "8", "5", "0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28]&amp; CHAR(34) &amp; &quot;, opciones: [&quot;&amp; CHAR(34)&amp;[Hoja1.B128]&amp; CHAR(34)&amp;&quot;, &quot;&amp; CHAR(34)&amp;[Hoja1.C128]&amp; CHAR(34)&amp;&quot;, &quot;&amp; CHAR(34)&amp;[Hoja1.D128]&amp; CHAR(34)&amp;&quot;, &quot;&amp; CHAR(34)&amp;[Hoja1.E128]&amp; CHAR(34)&amp;&quot;], correcta:  &quot;&amp;[Hoja1.F128]-1&amp; &quot;, observaciones: &quot; &amp; CHAR(34)&amp;[Hoja1.G128]&amp; CHAR(34) &amp; &quot; },&quot;" office:value-type="string" office:string-value=" { id: 127, enunciado: &quot;Observa el número 8694. Indica cuál es la cifra de las UNIDADES:&quot;, opciones: [&quot;4&quot;, &quot;8&quot;, &quot;0&quot;, &quot;3&quot;], correcta:  0, observaciones: &quot;La cifra de las unidades es la última de la parte entera.&quot; },">
            <text:p><text:s/>{ id: 127, enunciado: "Observa el número 8694. Indica cuál es la cifra de las UNIDADES:", opciones: ["4", "8", "0", "3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29]&amp; CHAR(34) &amp; &quot;, opciones: [&quot;&amp; CHAR(34)&amp;[Hoja1.B129]&amp; CHAR(34)&amp;&quot;, &quot;&amp; CHAR(34)&amp;[Hoja1.C129]&amp; CHAR(34)&amp;&quot;, &quot;&amp; CHAR(34)&amp;[Hoja1.D129]&amp; CHAR(34)&amp;&quot;, &quot;&amp; CHAR(34)&amp;[Hoja1.E129]&amp; CHAR(34)&amp;&quot;], correcta:  &quot;&amp;[Hoja1.F129]-1&amp; &quot;, observaciones: &quot; &amp; CHAR(34)&amp;[Hoja1.G129]&amp; CHAR(34) &amp; &quot; },&quot;" office:value-type="string" office:string-value=" { id: 128, enunciado: &quot;Observa el número 4631. Indica cuál es la cifra de las UNIDADES:&quot;, opciones: [&quot;4&quot;, &quot;3&quot;, &quot;1&quot;, &quot;7&quot;], correcta:  2, observaciones: &quot;La cifra de las unidades es la última de la parte entera.&quot; },">
            <text:p><text:s/>{ id: 128, enunciado: "Observa el número 4631. Indica cuál es la cifra de las UNIDADES:", opciones: ["4", "3", "1", "7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0]&amp; CHAR(34) &amp; &quot;, opciones: [&quot;&amp; CHAR(34)&amp;[Hoja1.B130]&amp; CHAR(34)&amp;&quot;, &quot;&amp; CHAR(34)&amp;[Hoja1.C130]&amp; CHAR(34)&amp;&quot;, &quot;&amp; CHAR(34)&amp;[Hoja1.D130]&amp; CHAR(34)&amp;&quot;, &quot;&amp; CHAR(34)&amp;[Hoja1.E130]&amp; CHAR(34)&amp;&quot;], correcta:  &quot;&amp;[Hoja1.F130]-1&amp; &quot;, observaciones: &quot; &amp; CHAR(34)&amp;[Hoja1.G130]&amp; CHAR(34) &amp; &quot; },&quot;" office:value-type="string" office:string-value=" { id: 129, enunciado: &quot;Observa el número 1932. Indica cuál es la cifra de las UNIDADES:&quot;, opciones: [&quot;9&quot;, &quot;2&quot;, &quot;0&quot;, &quot;6&quot;], correcta:  1, observaciones: &quot;La cifra de las unidades es la última de la parte entera.&quot; },">
            <text:p><text:s/>{ id: 129, enunciado: "Observa el número 1932. Indica cuál es la cifra de las UNIDADES:", opciones: ["9", "2", "0", "6"], correcta: <text:s/>1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1]&amp; CHAR(34) &amp; &quot;, opciones: [&quot;&amp; CHAR(34)&amp;[Hoja1.B131]&amp; CHAR(34)&amp;&quot;, &quot;&amp; CHAR(34)&amp;[Hoja1.C131]&amp; CHAR(34)&amp;&quot;, &quot;&amp; CHAR(34)&amp;[Hoja1.D131]&amp; CHAR(34)&amp;&quot;, &quot;&amp; CHAR(34)&amp;[Hoja1.E131]&amp; CHAR(34)&amp;&quot;], correcta:  &quot;&amp;[Hoja1.F131]-1&amp; &quot;, observaciones: &quot; &amp; CHAR(34)&amp;[Hoja1.G131]&amp; CHAR(34) &amp; &quot; },&quot;" office:value-type="string" office:string-value=" { id: 130, enunciado: &quot;Observa el número 1523. Indica cuál es la cifra de las UNIDADES:&quot;, opciones: [&quot;2&quot;, &quot;1&quot;, &quot;3&quot;, &quot;7&quot;], correcta:  2, observaciones: &quot;La cifra de las unidades es la última de la parte entera.&quot; },">
            <text:p><text:s/>{ id: 130, enunciado: "Observa el número 1523. Indica cuál es la cifra de las UNIDADES:", opciones: ["2", "1", "3", "7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2]&amp; CHAR(34) &amp; &quot;, opciones: [&quot;&amp; CHAR(34)&amp;[Hoja1.B132]&amp; CHAR(34)&amp;&quot;, &quot;&amp; CHAR(34)&amp;[Hoja1.C132]&amp; CHAR(34)&amp;&quot;, &quot;&amp; CHAR(34)&amp;[Hoja1.D132]&amp; CHAR(34)&amp;&quot;, &quot;&amp; CHAR(34)&amp;[Hoja1.E132]&amp; CHAR(34)&amp;&quot;], correcta:  &quot;&amp;[Hoja1.F132]-1&amp; &quot;, observaciones: &quot; &amp; CHAR(34)&amp;[Hoja1.G132]&amp; CHAR(34) &amp; &quot; },&quot;" office:value-type="string" office:string-value=" { id: 131, enunciado: &quot;Observa el número 7031. Indica cuál es la cifra de las UNIDADES:&quot;, opciones: [&quot;1&quot;, &quot;5&quot;, &quot;3&quot;, &quot;7&quot;], correcta:  0, observaciones: &quot;La cifra de las unidades es la última de la parte entera.&quot; },">
            <text:p><text:s/>{ id: 131, enunciado: "Observa el número 7031. Indica cuál es la cifra de las UNIDADES:", opciones: ["1", "5", "3", "7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3]&amp; CHAR(34) &amp; &quot;, opciones: [&quot;&amp; CHAR(34)&amp;[Hoja1.B133]&amp; CHAR(34)&amp;&quot;, &quot;&amp; CHAR(34)&amp;[Hoja1.C133]&amp; CHAR(34)&amp;&quot;, &quot;&amp; CHAR(34)&amp;[Hoja1.D133]&amp; CHAR(34)&amp;&quot;, &quot;&amp; CHAR(34)&amp;[Hoja1.E133]&amp; CHAR(34)&amp;&quot;], correcta:  &quot;&amp;[Hoja1.F133]-1&amp; &quot;, observaciones: &quot; &amp; CHAR(34)&amp;[Hoja1.G133]&amp; CHAR(34) &amp; &quot; },&quot;" office:value-type="string" office:string-value=" { id: 132, enunciado: &quot;Observa el número 1193. Indica cuál es la cifra de las UNIDADES:&quot;, opciones: [&quot;1&quot;, &quot;9&quot;, &quot;3&quot;, &quot;6&quot;], correcta:  2, observaciones: &quot;La cifra de las unidades es la última de la parte entera.&quot; },">
            <text:p><text:s/>{ id: 132, enunciado: "Observa el número 1193. Indica cuál es la cifra de las UNIDADES:", opciones: ["1", "9", "3", "6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4]&amp; CHAR(34) &amp; &quot;, opciones: [&quot;&amp; CHAR(34)&amp;[Hoja1.B134]&amp; CHAR(34)&amp;&quot;, &quot;&amp; CHAR(34)&amp;[Hoja1.C134]&amp; CHAR(34)&amp;&quot;, &quot;&amp; CHAR(34)&amp;[Hoja1.D134]&amp; CHAR(34)&amp;&quot;, &quot;&amp; CHAR(34)&amp;[Hoja1.E134]&amp; CHAR(34)&amp;&quot;], correcta:  &quot;&amp;[Hoja1.F134]-1&amp; &quot;, observaciones: &quot; &amp; CHAR(34)&amp;[Hoja1.G134]&amp; CHAR(34) &amp; &quot; },&quot;" office:value-type="string" office:string-value=" { id: 133, enunciado: &quot;Observa el número 2751. Indica cuál es la cifra de las UNIDADES:&quot;, opciones: [&quot;5&quot;, &quot;1&quot;, &quot;2&quot;, &quot;7&quot;], correcta:  1, observaciones: &quot;La cifra de las unidades es la última de la parte entera.&quot; },">
            <text:p><text:s/>{ id: 133, enunciado: "Observa el número 2751. Indica cuál es la cifra de las UNIDADES:", opciones: ["5", "1", "2", "7"], correcta: <text:s/>1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5]&amp; CHAR(34) &amp; &quot;, opciones: [&quot;&amp; CHAR(34)&amp;[Hoja1.B135]&amp; CHAR(34)&amp;&quot;, &quot;&amp; CHAR(34)&amp;[Hoja1.C135]&amp; CHAR(34)&amp;&quot;, &quot;&amp; CHAR(34)&amp;[Hoja1.D135]&amp; CHAR(34)&amp;&quot;, &quot;&amp; CHAR(34)&amp;[Hoja1.E135]&amp; CHAR(34)&amp;&quot;], correcta:  &quot;&amp;[Hoja1.F135]-1&amp; &quot;, observaciones: &quot; &amp; CHAR(34)&amp;[Hoja1.G135]&amp; CHAR(34) &amp; &quot; },&quot;" office:value-type="string" office:string-value=" { id: 134, enunciado: &quot;Observa el número 2307. Indica cuál es la cifra de las UNIDADES:&quot;, opciones: [&quot;2&quot;, &quot;1&quot;, &quot;7&quot;, &quot;4&quot;], correcta:  2, observaciones: &quot;La cifra de las unidades es la última de la parte entera.&quot; },">
            <text:p><text:s/>{ id: 134, enunciado: "Observa el número 2307. Indica cuál es la cifra de las UNIDADES:", opciones: ["2", "1", "7", "4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6]&amp; CHAR(34) &amp; &quot;, opciones: [&quot;&amp; CHAR(34)&amp;[Hoja1.B136]&amp; CHAR(34)&amp;&quot;, &quot;&amp; CHAR(34)&amp;[Hoja1.C136]&amp; CHAR(34)&amp;&quot;, &quot;&amp; CHAR(34)&amp;[Hoja1.D136]&amp; CHAR(34)&amp;&quot;, &quot;&amp; CHAR(34)&amp;[Hoja1.E136]&amp; CHAR(34)&amp;&quot;], correcta:  &quot;&amp;[Hoja1.F136]-1&amp; &quot;, observaciones: &quot; &amp; CHAR(34)&amp;[Hoja1.G136]&amp; CHAR(34) &amp; &quot; },&quot;" office:value-type="string" office:string-value=" { id: 135, enunciado: &quot;Observa el número 7465. Indica cuál es la cifra de las UNIDADES:&quot;, opciones: [&quot;4&quot;, &quot;1&quot;, &quot;5&quot;, &quot;2&quot;], correcta:  2, observaciones: &quot;La cifra de las unidades es la última de la parte entera.&quot; },">
            <text:p><text:s/>{ id: 135, enunciado: "Observa el número 7465. Indica cuál es la cifra de las UNIDADES:", opciones: ["4", "1", "5", "2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7]&amp; CHAR(34) &amp; &quot;, opciones: [&quot;&amp; CHAR(34)&amp;[Hoja1.B137]&amp; CHAR(34)&amp;&quot;, &quot;&amp; CHAR(34)&amp;[Hoja1.C137]&amp; CHAR(34)&amp;&quot;, &quot;&amp; CHAR(34)&amp;[Hoja1.D137]&amp; CHAR(34)&amp;&quot;, &quot;&amp; CHAR(34)&amp;[Hoja1.E137]&amp; CHAR(34)&amp;&quot;], correcta:  &quot;&amp;[Hoja1.F137]-1&amp; &quot;, observaciones: &quot; &amp; CHAR(34)&amp;[Hoja1.G137]&amp; CHAR(34) &amp; &quot; },&quot;" office:value-type="string" office:string-value=" { id: 136, enunciado: &quot;Observa el número 7268. Indica cuál es la cifra de las UNIDADES:&quot;, opciones: [&quot;1&quot;, &quot;7&quot;, &quot;8&quot;, &quot;9&quot;], correcta:  2, observaciones: &quot;La cifra de las unidades es la última de la parte entera.&quot; },">
            <text:p><text:s/>{ id: 136, enunciado: "Observa el número 7268. Indica cuál es la cifra de las UNIDADES:", opciones: ["1", "7", "8", "9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8]&amp; CHAR(34) &amp; &quot;, opciones: [&quot;&amp; CHAR(34)&amp;[Hoja1.B138]&amp; CHAR(34)&amp;&quot;, &quot;&amp; CHAR(34)&amp;[Hoja1.C138]&amp; CHAR(34)&amp;&quot;, &quot;&amp; CHAR(34)&amp;[Hoja1.D138]&amp; CHAR(34)&amp;&quot;, &quot;&amp; CHAR(34)&amp;[Hoja1.E138]&amp; CHAR(34)&amp;&quot;], correcta:  &quot;&amp;[Hoja1.F138]-1&amp; &quot;, observaciones: &quot; &amp; CHAR(34)&amp;[Hoja1.G138]&amp; CHAR(34) &amp; &quot; },&quot;" office:value-type="string" office:string-value=" { id: 137, enunciado: &quot;Observa el número 4076. Indica cuál es la cifra de las UNIDADES:&quot;, opciones: [&quot;1&quot;, &quot;6&quot;, &quot;7&quot;, &quot;4&quot;], correcta:  1, observaciones: &quot;La cifra de las unidades es la última de la parte entera.&quot; },">
            <text:p><text:s/>{ id: 137, enunciado: "Observa el número 4076. Indica cuál es la cifra de las UNIDADES:", opciones: ["1", "6", "7", "4"], correcta: <text:s/>1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39]&amp; CHAR(34) &amp; &quot;, opciones: [&quot;&amp; CHAR(34)&amp;[Hoja1.B139]&amp; CHAR(34)&amp;&quot;, &quot;&amp; CHAR(34)&amp;[Hoja1.C139]&amp; CHAR(34)&amp;&quot;, &quot;&amp; CHAR(34)&amp;[Hoja1.D139]&amp; CHAR(34)&amp;&quot;, &quot;&amp; CHAR(34)&amp;[Hoja1.E139]&amp; CHAR(34)&amp;&quot;], correcta:  &quot;&amp;[Hoja1.F139]-1&amp; &quot;, observaciones: &quot; &amp; CHAR(34)&amp;[Hoja1.G139]&amp; CHAR(34) &amp; &quot; },&quot;" office:value-type="string" office:string-value=" { id: 138, enunciado: &quot;Observa el número 3160. Indica cuál es la cifra de las UNIDADES:&quot;, opciones: [&quot;7&quot;, &quot;2&quot;, &quot;3&quot;, &quot;0&quot;], correcta:  3, observaciones: &quot;La cifra de las unidades es la última de la parte entera.&quot; },">
            <text:p><text:s/>{ id: 138, enunciado: "Observa el número 3160. Indica cuál es la cifra de las UNIDADES:", opciones: ["7", "2", "3", "0"], correcta: <text:s/>3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0]&amp; CHAR(34) &amp; &quot;, opciones: [&quot;&amp; CHAR(34)&amp;[Hoja1.B140]&amp; CHAR(34)&amp;&quot;, &quot;&amp; CHAR(34)&amp;[Hoja1.C140]&amp; CHAR(34)&amp;&quot;, &quot;&amp; CHAR(34)&amp;[Hoja1.D140]&amp; CHAR(34)&amp;&quot;, &quot;&amp; CHAR(34)&amp;[Hoja1.E140]&amp; CHAR(34)&amp;&quot;], correcta:  &quot;&amp;[Hoja1.F140]-1&amp; &quot;, observaciones: &quot; &amp; CHAR(34)&amp;[Hoja1.G140]&amp; CHAR(34) &amp; &quot; },&quot;" office:value-type="string" office:string-value=" { id: 139, enunciado: &quot;Observa el número 2349. Indica cuál es la cifra de las UNIDADES:&quot;, opciones: [&quot;9&quot;, &quot;7&quot;, &quot;6&quot;, &quot;5&quot;], correcta:  0, observaciones: &quot;La cifra de las unidades es la última de la parte entera.&quot; },">
            <text:p><text:s/>{ id: 139, enunciado: "Observa el número 2349. Indica cuál es la cifra de las UNIDADES:", opciones: ["9", "7", "6", "5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1]&amp; CHAR(34) &amp; &quot;, opciones: [&quot;&amp; CHAR(34)&amp;[Hoja1.B141]&amp; CHAR(34)&amp;&quot;, &quot;&amp; CHAR(34)&amp;[Hoja1.C141]&amp; CHAR(34)&amp;&quot;, &quot;&amp; CHAR(34)&amp;[Hoja1.D141]&amp; CHAR(34)&amp;&quot;, &quot;&amp; CHAR(34)&amp;[Hoja1.E141]&amp; CHAR(34)&amp;&quot;], correcta:  &quot;&amp;[Hoja1.F141]-1&amp; &quot;, observaciones: &quot; &amp; CHAR(34)&amp;[Hoja1.G141]&amp; CHAR(34) &amp; &quot; },&quot;" office:value-type="string" office:string-value=" { id: 140, enunciado: &quot;Observa el número 3980. Indica cuál es la cifra de las UNIDADES:&quot;, opciones: [&quot;1&quot;, &quot;9&quot;, &quot;0&quot;, &quot;6&quot;], correcta:  2, observaciones: &quot;La cifra de las unidades es la última de la parte entera.&quot; },">
            <text:p><text:s/>{ id: 140, enunciado: "Observa el número 3980. Indica cuál es la cifra de las UNIDADES:", opciones: ["1", "9", "0", "6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2]&amp; CHAR(34) &amp; &quot;, opciones: [&quot;&amp; CHAR(34)&amp;[Hoja1.B142]&amp; CHAR(34)&amp;&quot;, &quot;&amp; CHAR(34)&amp;[Hoja1.C142]&amp; CHAR(34)&amp;&quot;, &quot;&amp; CHAR(34)&amp;[Hoja1.D142]&amp; CHAR(34)&amp;&quot;, &quot;&amp; CHAR(34)&amp;[Hoja1.E142]&amp; CHAR(34)&amp;&quot;], correcta:  &quot;&amp;[Hoja1.F142]-1&amp; &quot;, observaciones: &quot; &amp; CHAR(34)&amp;[Hoja1.G142]&amp; CHAR(34) &amp; &quot; },&quot;" office:value-type="string" office:string-value=" { id: 141, enunciado: &quot;Observa el número 1846. Indica cuál es la cifra de las UNIDADES:&quot;, opciones: [&quot;6&quot;, &quot;5&quot;, &quot;7&quot;, &quot;8&quot;], correcta:  0, observaciones: &quot;La cifra de las unidades es la última de la parte entera.&quot; },">
            <text:p><text:s/>{ id: 141, enunciado: "Observa el número 1846. Indica cuál es la cifra de las UNIDADES:", opciones: ["6", "5", "7", "8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3]&amp; CHAR(34) &amp; &quot;, opciones: [&quot;&amp; CHAR(34)&amp;[Hoja1.B143]&amp; CHAR(34)&amp;&quot;, &quot;&amp; CHAR(34)&amp;[Hoja1.C143]&amp; CHAR(34)&amp;&quot;, &quot;&amp; CHAR(34)&amp;[Hoja1.D143]&amp; CHAR(34)&amp;&quot;, &quot;&amp; CHAR(34)&amp;[Hoja1.E143]&amp; CHAR(34)&amp;&quot;], correcta:  &quot;&amp;[Hoja1.F143]-1&amp; &quot;, observaciones: &quot; &amp; CHAR(34)&amp;[Hoja1.G143]&amp; CHAR(34) &amp; &quot; },&quot;" office:value-type="string" office:string-value=" { id: 142, enunciado: &quot;Observa el número 2167. Indica cuál es la cifra de las UNIDADES:&quot;, opciones: [&quot;7&quot;, &quot;0&quot;, &quot;4&quot;, &quot;8&quot;], correcta:  0, observaciones: &quot;La cifra de las unidades es la última de la parte entera.&quot; },">
            <text:p><text:s/>{ id: 142, enunciado: "Observa el número 2167. Indica cuál es la cifra de las UNIDADES:", opciones: ["7", "0", "4", "8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4]&amp; CHAR(34) &amp; &quot;, opciones: [&quot;&amp; CHAR(34)&amp;[Hoja1.B144]&amp; CHAR(34)&amp;&quot;, &quot;&amp; CHAR(34)&amp;[Hoja1.C144]&amp; CHAR(34)&amp;&quot;, &quot;&amp; CHAR(34)&amp;[Hoja1.D144]&amp; CHAR(34)&amp;&quot;, &quot;&amp; CHAR(34)&amp;[Hoja1.E144]&amp; CHAR(34)&amp;&quot;], correcta:  &quot;&amp;[Hoja1.F144]-1&amp; &quot;, observaciones: &quot; &amp; CHAR(34)&amp;[Hoja1.G144]&amp; CHAR(34) &amp; &quot; },&quot;" office:value-type="string" office:string-value=" { id: 143, enunciado: &quot;Observa el número 1249. Indica cuál es la cifra de las UNIDADES:&quot;, opciones: [&quot;4&quot;, &quot;9&quot;, &quot;3&quot;, &quot;5&quot;], correcta:  1, observaciones: &quot;La cifra de las unidades es la última de la parte entera.&quot; },">
            <text:p><text:s/>{ id: 143, enunciado: "Observa el número 1249. Indica cuál es la cifra de las UNIDADES:", opciones: ["4", "9", "3", "5"], correcta: <text:s/>1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5]&amp; CHAR(34) &amp; &quot;, opciones: [&quot;&amp; CHAR(34)&amp;[Hoja1.B145]&amp; CHAR(34)&amp;&quot;, &quot;&amp; CHAR(34)&amp;[Hoja1.C145]&amp; CHAR(34)&amp;&quot;, &quot;&amp; CHAR(34)&amp;[Hoja1.D145]&amp; CHAR(34)&amp;&quot;, &quot;&amp; CHAR(34)&amp;[Hoja1.E145]&amp; CHAR(34)&amp;&quot;], correcta:  &quot;&amp;[Hoja1.F145]-1&amp; &quot;, observaciones: &quot; &amp; CHAR(34)&amp;[Hoja1.G145]&amp; CHAR(34) &amp; &quot; },&quot;" office:value-type="string" office:string-value=" { id: 144, enunciado: &quot;Observa el número 4709. Indica cuál es la cifra de las UNIDADES:&quot;, opciones: [&quot;3&quot;, &quot;9&quot;, &quot;2&quot;, &quot;7&quot;], correcta:  1, observaciones: &quot;La cifra de las unidades es la última de la parte entera.&quot; },">
            <text:p><text:s/>{ id: 144, enunciado: "Observa el número 4709. Indica cuál es la cifra de las UNIDADES:", opciones: ["3", "9", "2", "7"], correcta: <text:s/>1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6]&amp; CHAR(34) &amp; &quot;, opciones: [&quot;&amp; CHAR(34)&amp;[Hoja1.B146]&amp; CHAR(34)&amp;&quot;, &quot;&amp; CHAR(34)&amp;[Hoja1.C146]&amp; CHAR(34)&amp;&quot;, &quot;&amp; CHAR(34)&amp;[Hoja1.D146]&amp; CHAR(34)&amp;&quot;, &quot;&amp; CHAR(34)&amp;[Hoja1.E146]&amp; CHAR(34)&amp;&quot;], correcta:  &quot;&amp;[Hoja1.F146]-1&amp; &quot;, observaciones: &quot; &amp; CHAR(34)&amp;[Hoja1.G146]&amp; CHAR(34) &amp; &quot; },&quot;" office:value-type="string" office:string-value=" { id: 145, enunciado: &quot;Observa el número 3687. Indica cuál es la cifra de las UNIDADES:&quot;, opciones: [&quot;9&quot;, &quot;6&quot;, &quot;7&quot;, &quot;3&quot;], correcta:  2, observaciones: &quot;La cifra de las unidades es la última de la parte entera.&quot; },">
            <text:p><text:s/>{ id: 145, enunciado: "Observa el número 3687. Indica cuál es la cifra de las UNIDADES:", opciones: ["9", "6", "7", "3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7]&amp; CHAR(34) &amp; &quot;, opciones: [&quot;&amp; CHAR(34)&amp;[Hoja1.B147]&amp; CHAR(34)&amp;&quot;, &quot;&amp; CHAR(34)&amp;[Hoja1.C147]&amp; CHAR(34)&amp;&quot;, &quot;&amp; CHAR(34)&amp;[Hoja1.D147]&amp; CHAR(34)&amp;&quot;, &quot;&amp; CHAR(34)&amp;[Hoja1.E147]&amp; CHAR(34)&amp;&quot;], correcta:  &quot;&amp;[Hoja1.F147]-1&amp; &quot;, observaciones: &quot; &amp; CHAR(34)&amp;[Hoja1.G147]&amp; CHAR(34) &amp; &quot; },&quot;" office:value-type="string" office:string-value=" { id: 146, enunciado: &quot;Observa el número 5068. Indica cuál es la cifra de las UNIDADES:&quot;, opciones: [&quot;5&quot;, &quot;4&quot;, &quot;8&quot;, &quot;7&quot;], correcta:  2, observaciones: &quot;La cifra de las unidades es la última de la parte entera.&quot; },">
            <text:p><text:s/>{ id: 146, enunciado: "Observa el número 5068. Indica cuál es la cifra de las UNIDADES:", opciones: ["5", "4", "8", "7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8]&amp; CHAR(34) &amp; &quot;, opciones: [&quot;&amp; CHAR(34)&amp;[Hoja1.B148]&amp; CHAR(34)&amp;&quot;, &quot;&amp; CHAR(34)&amp;[Hoja1.C148]&amp; CHAR(34)&amp;&quot;, &quot;&amp; CHAR(34)&amp;[Hoja1.D148]&amp; CHAR(34)&amp;&quot;, &quot;&amp; CHAR(34)&amp;[Hoja1.E148]&amp; CHAR(34)&amp;&quot;], correcta:  &quot;&amp;[Hoja1.F148]-1&amp; &quot;, observaciones: &quot; &amp; CHAR(34)&amp;[Hoja1.G148]&amp; CHAR(34) &amp; &quot; },&quot;" office:value-type="string" office:string-value=" { id: 147, enunciado: &quot;Observa el número 2746. Indica cuál es la cifra de las UNIDADES:&quot;, opciones: [&quot;7&quot;, &quot;4&quot;, &quot;3&quot;, &quot;6&quot;], correcta:  3, observaciones: &quot;La cifra de las unidades es la última de la parte entera.&quot; },">
            <text:p><text:s/>{ id: 147, enunciado: "Observa el número 2746. Indica cuál es la cifra de las UNIDADES:", opciones: ["7", "4", "3", "6"], correcta: <text:s/>3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49]&amp; CHAR(34) &amp; &quot;, opciones: [&quot;&amp; CHAR(34)&amp;[Hoja1.B149]&amp; CHAR(34)&amp;&quot;, &quot;&amp; CHAR(34)&amp;[Hoja1.C149]&amp; CHAR(34)&amp;&quot;, &quot;&amp; CHAR(34)&amp;[Hoja1.D149]&amp; CHAR(34)&amp;&quot;, &quot;&amp; CHAR(34)&amp;[Hoja1.E149]&amp; CHAR(34)&amp;&quot;], correcta:  &quot;&amp;[Hoja1.F149]-1&amp; &quot;, observaciones: &quot; &amp; CHAR(34)&amp;[Hoja1.G149]&amp; CHAR(34) &amp; &quot; },&quot;" office:value-type="string" office:string-value=" { id: 148, enunciado: &quot;Observa el número 5186. Indica cuál es la cifra de las UNIDADES:&quot;, opciones: [&quot;1&quot;, &quot;5&quot;, &quot;6&quot;, &quot;0&quot;], correcta:  2, observaciones: &quot;La cifra de las unidades es la última de la parte entera.&quot; },">
            <text:p><text:s/>{ id: 148, enunciado: "Observa el número 5186. Indica cuál es la cifra de las UNIDADES:", opciones: ["1", "5", "6", "0"], correcta: <text:s/>2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0]&amp; CHAR(34) &amp; &quot;, opciones: [&quot;&amp; CHAR(34)&amp;[Hoja1.B150]&amp; CHAR(34)&amp;&quot;, &quot;&amp; CHAR(34)&amp;[Hoja1.C150]&amp; CHAR(34)&amp;&quot;, &quot;&amp; CHAR(34)&amp;[Hoja1.D150]&amp; CHAR(34)&amp;&quot;, &quot;&amp; CHAR(34)&amp;[Hoja1.E150]&amp; CHAR(34)&amp;&quot;], correcta:  &quot;&amp;[Hoja1.F150]-1&amp; &quot;, observaciones: &quot; &amp; CHAR(34)&amp;[Hoja1.G150]&amp; CHAR(34) &amp; &quot; },&quot;" office:value-type="string" office:string-value=" { id: 149, enunciado: &quot;Observa el número 2078. Indica cuál es la cifra de las UNIDADES:&quot;, opciones: [&quot;6&quot;, &quot;0&quot;, &quot;7&quot;, &quot;8&quot;], correcta:  3, observaciones: &quot;La cifra de las unidades es la última de la parte entera.&quot; },">
            <text:p><text:s/>{ id: 149, enunciado: "Observa el número 2078. Indica cuál es la cifra de las UNIDADES:", opciones: ["6", "0", "7", "8"], correcta: <text:s/>3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1]&amp; CHAR(34) &amp; &quot;, opciones: [&quot;&amp; CHAR(34)&amp;[Hoja1.B151]&amp; CHAR(34)&amp;&quot;, &quot;&amp; CHAR(34)&amp;[Hoja1.C151]&amp; CHAR(34)&amp;&quot;, &quot;&amp; CHAR(34)&amp;[Hoja1.D151]&amp; CHAR(34)&amp;&quot;, &quot;&amp; CHAR(34)&amp;[Hoja1.E151]&amp; CHAR(34)&amp;&quot;], correcta:  &quot;&amp;[Hoja1.F151]-1&amp; &quot;, observaciones: &quot; &amp; CHAR(34)&amp;[Hoja1.G151]&amp; CHAR(34) &amp; &quot; },&quot;" office:value-type="string" office:string-value=" { id: 150, enunciado: &quot;Observa el número 1879. Indica cuál es la cifra de las UNIDADES:&quot;, opciones: [&quot;2&quot;, &quot;9&quot;, &quot;6&quot;, &quot;8&quot;], correcta:  1, observaciones: &quot;La cifra de las unidades es la última de la parte entera.&quot; },">
            <text:p><text:s/>{ id: 150, enunciado: "Observa el número 1879. Indica cuál es la cifra de las UNIDADES:", opciones: ["2", "9", "6", "8"], correcta: <text:s/>1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2]&amp; CHAR(34) &amp; &quot;, opciones: [&quot;&amp; CHAR(34)&amp;[Hoja1.B152]&amp; CHAR(34)&amp;&quot;, &quot;&amp; CHAR(34)&amp;[Hoja1.C152]&amp; CHAR(34)&amp;&quot;, &quot;&amp; CHAR(34)&amp;[Hoja1.D152]&amp; CHAR(34)&amp;&quot;, &quot;&amp; CHAR(34)&amp;[Hoja1.E152]&amp; CHAR(34)&amp;&quot;], correcta:  &quot;&amp;[Hoja1.F152]-1&amp; &quot;, observaciones: &quot; &amp; CHAR(34)&amp;[Hoja1.G152]&amp; CHAR(34) &amp; &quot; },&quot;" office:value-type="string" office:string-value=" { id: 151, enunciado: &quot;Observa el número 7685. Indica cuál es la cifra de las UNIDADES:&quot;, opciones: [&quot;5&quot;, &quot;3&quot;, &quot;0&quot;, &quot;7&quot;], correcta:  0, observaciones: &quot;La cifra de las unidades es la última de la parte entera.&quot; },">
            <text:p><text:s/>{ id: 151, enunciado: "Observa el número 7685. Indica cuál es la cifra de las UNIDADES:", opciones: ["5", "3", "0", "7"], correcta: <text:s/>0, observaciones: "La cifra de las unidades es la última de la parte enter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3]&amp; CHAR(34) &amp; &quot;, opciones: [&quot;&amp; CHAR(34)&amp;[Hoja1.B153]&amp; CHAR(34)&amp;&quot;, &quot;&amp; CHAR(34)&amp;[Hoja1.C153]&amp; CHAR(34)&amp;&quot;, &quot;&amp; CHAR(34)&amp;[Hoja1.D153]&amp; CHAR(34)&amp;&quot;, &quot;&amp; CHAR(34)&amp;[Hoja1.E153]&amp; CHAR(34)&amp;&quot;], correcta:  &quot;&amp;[Hoja1.F153]-1&amp; &quot;, observaciones: &quot; &amp; CHAR(34)&amp;[Hoja1.G153]&amp; CHAR(34) &amp; &quot; },&quot;" office:value-type="string" office:string-value=" { id: 152, enunciado: &quot;Observa el número 3260. Indica cuál es la cifra de las UNIDADES DE MILLAR:&quot;, opciones: [&quot;0&quot;, &quot;8&quot;, &quot;1&quot;, &quot;3&quot;], correcta:  3, observaciones: &quot;La cifra de los millares es la cuarta de la parte entera contando desde la derecha.&quot; },">
            <text:p><text:s/>{ id: 152, enunciado: "Observa el número 3260. Indica cuál es la cifra de las UNIDADES DE MILLAR:", opciones: ["0", "8", "1", "3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4]&amp; CHAR(34) &amp; &quot;, opciones: [&quot;&amp; CHAR(34)&amp;[Hoja1.B154]&amp; CHAR(34)&amp;&quot;, &quot;&amp; CHAR(34)&amp;[Hoja1.C154]&amp; CHAR(34)&amp;&quot;, &quot;&amp; CHAR(34)&amp;[Hoja1.D154]&amp; CHAR(34)&amp;&quot;, &quot;&amp; CHAR(34)&amp;[Hoja1.E154]&amp; CHAR(34)&amp;&quot;], correcta:  &quot;&amp;[Hoja1.F154]-1&amp; &quot;, observaciones: &quot; &amp; CHAR(34)&amp;[Hoja1.G154]&amp; CHAR(34) &amp; &quot; },&quot;" office:value-type="string" office:string-value=" { id: 153, enunciado: &quot;Observa el número 6893. Indica cuál es la cifra de las UNIDADES DE MILLAR:&quot;, opciones: [&quot;0&quot;, &quot;4&quot;, &quot;7&quot;, &quot;6&quot;], correcta:  3, observaciones: &quot;La cifra de los millares es la cuarta de la parte entera contando desde la derecha.&quot; },">
            <text:p><text:s/>{ id: 153, enunciado: "Observa el número 6893. Indica cuál es la cifra de las UNIDADES DE MILLAR:", opciones: ["0", "4", "7", "6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5]&amp; CHAR(34) &amp; &quot;, opciones: [&quot;&amp; CHAR(34)&amp;[Hoja1.B155]&amp; CHAR(34)&amp;&quot;, &quot;&amp; CHAR(34)&amp;[Hoja1.C155]&amp; CHAR(34)&amp;&quot;, &quot;&amp; CHAR(34)&amp;[Hoja1.D155]&amp; CHAR(34)&amp;&quot;, &quot;&amp; CHAR(34)&amp;[Hoja1.E155]&amp; CHAR(34)&amp;&quot;], correcta:  &quot;&amp;[Hoja1.F155]-1&amp; &quot;, observaciones: &quot; &amp; CHAR(34)&amp;[Hoja1.G155]&amp; CHAR(34) &amp; &quot; },&quot;" office:value-type="string" office:string-value=" { id: 154, enunciado: &quot;Observa el número 6728. Indica cuál es la cifra de las UNIDADES DE MILLAR:&quot;, opciones: [&quot;0&quot;, &quot;5&quot;, &quot;4&quot;, &quot;6&quot;], correcta:  3, observaciones: &quot;La cifra de los millares es la cuarta de la parte entera contando desde la derecha.&quot; },">
            <text:p><text:s/>{ id: 154, enunciado: "Observa el número 6728. Indica cuál es la cifra de las UNIDADES DE MILLAR:", opciones: ["0", "5", "4", "6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6]&amp; CHAR(34) &amp; &quot;, opciones: [&quot;&amp; CHAR(34)&amp;[Hoja1.B156]&amp; CHAR(34)&amp;&quot;, &quot;&amp; CHAR(34)&amp;[Hoja1.C156]&amp; CHAR(34)&amp;&quot;, &quot;&amp; CHAR(34)&amp;[Hoja1.D156]&amp; CHAR(34)&amp;&quot;, &quot;&amp; CHAR(34)&amp;[Hoja1.E156]&amp; CHAR(34)&amp;&quot;], correcta:  &quot;&amp;[Hoja1.F156]-1&amp; &quot;, observaciones: &quot; &amp; CHAR(34)&amp;[Hoja1.G156]&amp; CHAR(34) &amp; &quot; },&quot;" office:value-type="string" office:string-value=" { id: 155, enunciado: &quot;Observa el número 9268. Indica cuál es la cifra de las UNIDADES DE MILLAR:&quot;, opciones: [&quot;2&quot;, &quot;9&quot;, &quot;6&quot;, &quot;7&quot;], correcta:  1, observaciones: &quot;La cifra de los millares es la cuarta de la parte entera contando desde la derecha.&quot; },">
            <text:p><text:s/>{ id: 155, enunciado: "Observa el número 9268. Indica cuál es la cifra de las UNIDADES DE MILLAR:", opciones: ["2", "9", "6", "7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7]&amp; CHAR(34) &amp; &quot;, opciones: [&quot;&amp; CHAR(34)&amp;[Hoja1.B157]&amp; CHAR(34)&amp;&quot;, &quot;&amp; CHAR(34)&amp;[Hoja1.C157]&amp; CHAR(34)&amp;&quot;, &quot;&amp; CHAR(34)&amp;[Hoja1.D157]&amp; CHAR(34)&amp;&quot;, &quot;&amp; CHAR(34)&amp;[Hoja1.E157]&amp; CHAR(34)&amp;&quot;], correcta:  &quot;&amp;[Hoja1.F157]-1&amp; &quot;, observaciones: &quot; &amp; CHAR(34)&amp;[Hoja1.G157]&amp; CHAR(34) &amp; &quot; },&quot;" office:value-type="string" office:string-value=" { id: 156, enunciado: &quot;Observa el número 6728. Indica cuál es la cifra de las UNIDADES DE MILLAR:&quot;, opciones: [&quot;7&quot;, &quot;5&quot;, &quot;8&quot;, &quot;6&quot;], correcta:  3, observaciones: &quot;La cifra de los millares es la cuarta de la parte entera contando desde la derecha.&quot; },">
            <text:p><text:s/>{ id: 156, enunciado: "Observa el número 6728. Indica cuál es la cifra de las UNIDADES DE MILLAR:", opciones: ["7", "5", "8", "6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8]&amp; CHAR(34) &amp; &quot;, opciones: [&quot;&amp; CHAR(34)&amp;[Hoja1.B158]&amp; CHAR(34)&amp;&quot;, &quot;&amp; CHAR(34)&amp;[Hoja1.C158]&amp; CHAR(34)&amp;&quot;, &quot;&amp; CHAR(34)&amp;[Hoja1.D158]&amp; CHAR(34)&amp;&quot;, &quot;&amp; CHAR(34)&amp;[Hoja1.E158]&amp; CHAR(34)&amp;&quot;], correcta:  &quot;&amp;[Hoja1.F158]-1&amp; &quot;, observaciones: &quot; &amp; CHAR(34)&amp;[Hoja1.G158]&amp; CHAR(34) &amp; &quot; },&quot;" office:value-type="string" office:string-value=" { id: 157, enunciado: &quot;Observa el número 3485. Indica cuál es la cifra de las UNIDADES DE MILLAR:&quot;, opciones: [&quot;2&quot;, &quot;0&quot;, &quot;6&quot;, &quot;3&quot;], correcta:  3, observaciones: &quot;La cifra de los millares es la cuarta de la parte entera contando desde la derecha.&quot; },">
            <text:p><text:s/>{ id: 157, enunciado: "Observa el número 3485. Indica cuál es la cifra de las UNIDADES DE MILLAR:", opciones: ["2", "0", "6", "3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59]&amp; CHAR(34) &amp; &quot;, opciones: [&quot;&amp; CHAR(34)&amp;[Hoja1.B159]&amp; CHAR(34)&amp;&quot;, &quot;&amp; CHAR(34)&amp;[Hoja1.C159]&amp; CHAR(34)&amp;&quot;, &quot;&amp; CHAR(34)&amp;[Hoja1.D159]&amp; CHAR(34)&amp;&quot;, &quot;&amp; CHAR(34)&amp;[Hoja1.E159]&amp; CHAR(34)&amp;&quot;], correcta:  &quot;&amp;[Hoja1.F159]-1&amp; &quot;, observaciones: &quot; &amp; CHAR(34)&amp;[Hoja1.G159]&amp; CHAR(34) &amp; &quot; },&quot;" office:value-type="string" office:string-value=" { id: 158, enunciado: &quot;Observa el número 8476. Indica cuál es la cifra de las UNIDADES DE MILLAR:&quot;, opciones: [&quot;7&quot;, &quot;8&quot;, &quot;5&quot;, &quot;4&quot;], correcta:  1, observaciones: &quot;La cifra de los millares es la cuarta de la parte entera contando desde la derecha.&quot; },">
            <text:p><text:s/>{ id: 158, enunciado: "Observa el número 8476. Indica cuál es la cifra de las UNIDADES DE MILLAR:", opciones: ["7", "8", "5", "4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0]&amp; CHAR(34) &amp; &quot;, opciones: [&quot;&amp; CHAR(34)&amp;[Hoja1.B160]&amp; CHAR(34)&amp;&quot;, &quot;&amp; CHAR(34)&amp;[Hoja1.C160]&amp; CHAR(34)&amp;&quot;, &quot;&amp; CHAR(34)&amp;[Hoja1.D160]&amp; CHAR(34)&amp;&quot;, &quot;&amp; CHAR(34)&amp;[Hoja1.E160]&amp; CHAR(34)&amp;&quot;], correcta:  &quot;&amp;[Hoja1.F160]-1&amp; &quot;, observaciones: &quot; &amp; CHAR(34)&amp;[Hoja1.G160]&amp; CHAR(34) &amp; &quot; },&quot;" office:value-type="string" office:string-value=" { id: 159, enunciado: &quot;Observa el número 9602. Indica cuál es la cifra de las UNIDADES DE MILLAR:&quot;, opciones: [&quot;1&quot;, &quot;9&quot;, &quot;4&quot;, &quot;6&quot;], correcta:  1, observaciones: &quot;La cifra de los millares es la cuarta de la parte entera contando desde la derecha.&quot; },">
            <text:p><text:s/>{ id: 159, enunciado: "Observa el número 9602. Indica cuál es la cifra de las UNIDADES DE MILLAR:", opciones: ["1", "9", "4", "6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1]&amp; CHAR(34) &amp; &quot;, opciones: [&quot;&amp; CHAR(34)&amp;[Hoja1.B161]&amp; CHAR(34)&amp;&quot;, &quot;&amp; CHAR(34)&amp;[Hoja1.C161]&amp; CHAR(34)&amp;&quot;, &quot;&amp; CHAR(34)&amp;[Hoja1.D161]&amp; CHAR(34)&amp;&quot;, &quot;&amp; CHAR(34)&amp;[Hoja1.E161]&amp; CHAR(34)&amp;&quot;], correcta:  &quot;&amp;[Hoja1.F161]-1&amp; &quot;, observaciones: &quot; &amp; CHAR(34)&amp;[Hoja1.G161]&amp; CHAR(34) &amp; &quot; },&quot;" office:value-type="string" office:string-value=" { id: 160, enunciado: &quot;Observa el número 7935. Indica cuál es la cifra de las UNIDADES DE MILLAR:&quot;, opciones: [&quot;9&quot;, &quot;1&quot;, &quot;5&quot;, &quot;7&quot;], correcta:  3, observaciones: &quot;La cifra de los millares es la cuarta de la parte entera contando desde la derecha.&quot; },">
            <text:p><text:s/>{ id: 160, enunciado: "Observa el número 7935. Indica cuál es la cifra de las UNIDADES DE MILLAR:", opciones: ["9", "1", "5", "7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2]&amp; CHAR(34) &amp; &quot;, opciones: [&quot;&amp; CHAR(34)&amp;[Hoja1.B162]&amp; CHAR(34)&amp;&quot;, &quot;&amp; CHAR(34)&amp;[Hoja1.C162]&amp; CHAR(34)&amp;&quot;, &quot;&amp; CHAR(34)&amp;[Hoja1.D162]&amp; CHAR(34)&amp;&quot;, &quot;&amp; CHAR(34)&amp;[Hoja1.E162]&amp; CHAR(34)&amp;&quot;], correcta:  &quot;&amp;[Hoja1.F162]-1&amp; &quot;, observaciones: &quot; &amp; CHAR(34)&amp;[Hoja1.G162]&amp; CHAR(34) &amp; &quot; },&quot;" office:value-type="string" office:string-value=" { id: 161, enunciado: &quot;Observa el número 9127. Indica cuál es la cifra de las UNIDADES DE MILLAR:&quot;, opciones: [&quot;4&quot;, &quot;2&quot;, &quot;9&quot;, &quot;0&quot;], correcta:  2, observaciones: &quot;La cifra de los millares es la cuarta de la parte entera contando desde la derecha.&quot; },">
            <text:p><text:s/>{ id: 161, enunciado: "Observa el número 9127. Indica cuál es la cifra de las UNIDADES DE MILLAR:", opciones: ["4", "2", "9", "0"], correcta: <text:s/>2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3]&amp; CHAR(34) &amp; &quot;, opciones: [&quot;&amp; CHAR(34)&amp;[Hoja1.B163]&amp; CHAR(34)&amp;&quot;, &quot;&amp; CHAR(34)&amp;[Hoja1.C163]&amp; CHAR(34)&amp;&quot;, &quot;&amp; CHAR(34)&amp;[Hoja1.D163]&amp; CHAR(34)&amp;&quot;, &quot;&amp; CHAR(34)&amp;[Hoja1.E163]&amp; CHAR(34)&amp;&quot;], correcta:  &quot;&amp;[Hoja1.F163]-1&amp; &quot;, observaciones: &quot; &amp; CHAR(34)&amp;[Hoja1.G163]&amp; CHAR(34) &amp; &quot; },&quot;" office:value-type="string" office:string-value=" { id: 162, enunciado: &quot;Observa el número 7149. Indica cuál es la cifra de las UNIDADES DE MILLAR:&quot;, opciones: [&quot;7&quot;, &quot;9&quot;, &quot;6&quot;, &quot;8&quot;], correcta:  0, observaciones: &quot;La cifra de los millares es la cuarta de la parte entera contando desde la derecha.&quot; },">
            <text:p><text:s/>{ id: 162, enunciado: "Observa el número 7149. Indica cuál es la cifra de las UNIDADES DE MILLAR:", opciones: ["7", "9", "6", "8"], correcta: <text:s/>0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4]&amp; CHAR(34) &amp; &quot;, opciones: [&quot;&amp; CHAR(34)&amp;[Hoja1.B164]&amp; CHAR(34)&amp;&quot;, &quot;&amp; CHAR(34)&amp;[Hoja1.C164]&amp; CHAR(34)&amp;&quot;, &quot;&amp; CHAR(34)&amp;[Hoja1.D164]&amp; CHAR(34)&amp;&quot;, &quot;&amp; CHAR(34)&amp;[Hoja1.E164]&amp; CHAR(34)&amp;&quot;], correcta:  &quot;&amp;[Hoja1.F164]-1&amp; &quot;, observaciones: &quot; &amp; CHAR(34)&amp;[Hoja1.G164]&amp; CHAR(34) &amp; &quot; },&quot;" office:value-type="string" office:string-value=" { id: 163, enunciado: &quot;Observa el número 5017. Indica cuál es la cifra de las UNIDADES DE MILLAR:&quot;, opciones: [&quot;5&quot;, &quot;6&quot;, &quot;2&quot;, &quot;0&quot;], correcta:  0, observaciones: &quot;La cifra de los millares es la cuarta de la parte entera contando desde la derecha.&quot; },">
            <text:p><text:s/>{ id: 163, enunciado: "Observa el número 5017. Indica cuál es la cifra de las UNIDADES DE MILLAR:", opciones: ["5", "6", "2", "0"], correcta: <text:s/>0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5]&amp; CHAR(34) &amp; &quot;, opciones: [&quot;&amp; CHAR(34)&amp;[Hoja1.B165]&amp; CHAR(34)&amp;&quot;, &quot;&amp; CHAR(34)&amp;[Hoja1.C165]&amp; CHAR(34)&amp;&quot;, &quot;&amp; CHAR(34)&amp;[Hoja1.D165]&amp; CHAR(34)&amp;&quot;, &quot;&amp; CHAR(34)&amp;[Hoja1.E165]&amp; CHAR(34)&amp;&quot;], correcta:  &quot;&amp;[Hoja1.F165]-1&amp; &quot;, observaciones: &quot; &amp; CHAR(34)&amp;[Hoja1.G165]&amp; CHAR(34) &amp; &quot; },&quot;" office:value-type="string" office:string-value=" { id: 164, enunciado: &quot;Observa el número 7405. Indica cuál es la cifra de las UNIDADES DE MILLAR:&quot;, opciones: [&quot;4&quot;, &quot;1&quot;, &quot;2&quot;, &quot;7&quot;], correcta:  3, observaciones: &quot;La cifra de los millares es la cuarta de la parte entera contando desde la derecha.&quot; },">
            <text:p><text:s/>{ id: 164, enunciado: "Observa el número 7405. Indica cuál es la cifra de las UNIDADES DE MILLAR:", opciones: ["4", "1", "2", "7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6]&amp; CHAR(34) &amp; &quot;, opciones: [&quot;&amp; CHAR(34)&amp;[Hoja1.B166]&amp; CHAR(34)&amp;&quot;, &quot;&amp; CHAR(34)&amp;[Hoja1.C166]&amp; CHAR(34)&amp;&quot;, &quot;&amp; CHAR(34)&amp;[Hoja1.D166]&amp; CHAR(34)&amp;&quot;, &quot;&amp; CHAR(34)&amp;[Hoja1.E166]&amp; CHAR(34)&amp;&quot;], correcta:  &quot;&amp;[Hoja1.F166]-1&amp; &quot;, observaciones: &quot; &amp; CHAR(34)&amp;[Hoja1.G166]&amp; CHAR(34) &amp; &quot; },&quot;" office:value-type="string" office:string-value=" { id: 165, enunciado: &quot;Observa el número 8739. Indica cuál es la cifra de las UNIDADES DE MILLAR:&quot;, opciones: [&quot;8&quot;, &quot;5&quot;, &quot;6&quot;, &quot;3&quot;], correcta:  0, observaciones: &quot;La cifra de los millares es la cuarta de la parte entera contando desde la derecha.&quot; },">
            <text:p><text:s/>{ id: 165, enunciado: "Observa el número 8739. Indica cuál es la cifra de las UNIDADES DE MILLAR:", opciones: ["8", "5", "6", "3"], correcta: <text:s/>0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7]&amp; CHAR(34) &amp; &quot;, opciones: [&quot;&amp; CHAR(34)&amp;[Hoja1.B167]&amp; CHAR(34)&amp;&quot;, &quot;&amp; CHAR(34)&amp;[Hoja1.C167]&amp; CHAR(34)&amp;&quot;, &quot;&amp; CHAR(34)&amp;[Hoja1.D167]&amp; CHAR(34)&amp;&quot;, &quot;&amp; CHAR(34)&amp;[Hoja1.E167]&amp; CHAR(34)&amp;&quot;], correcta:  &quot;&amp;[Hoja1.F167]-1&amp; &quot;, observaciones: &quot; &amp; CHAR(34)&amp;[Hoja1.G167]&amp; CHAR(34) &amp; &quot; },&quot;" office:value-type="string" office:string-value=" { id: 166, enunciado: &quot;Observa el número 4821. Indica cuál es la cifra de las UNIDADES DE MILLAR:&quot;, opciones: [&quot;8&quot;, &quot;2&quot;, &quot;4&quot;, &quot;3&quot;], correcta:  2, observaciones: &quot;La cifra de los millares es la cuarta de la parte entera contando desde la derecha.&quot; },">
            <text:p><text:s/>{ id: 166, enunciado: "Observa el número 4821. Indica cuál es la cifra de las UNIDADES DE MILLAR:", opciones: ["8", "2", "4", "3"], correcta: <text:s/>2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8]&amp; CHAR(34) &amp; &quot;, opciones: [&quot;&amp; CHAR(34)&amp;[Hoja1.B168]&amp; CHAR(34)&amp;&quot;, &quot;&amp; CHAR(34)&amp;[Hoja1.C168]&amp; CHAR(34)&amp;&quot;, &quot;&amp; CHAR(34)&amp;[Hoja1.D168]&amp; CHAR(34)&amp;&quot;, &quot;&amp; CHAR(34)&amp;[Hoja1.E168]&amp; CHAR(34)&amp;&quot;], correcta:  &quot;&amp;[Hoja1.F168]-1&amp; &quot;, observaciones: &quot; &amp; CHAR(34)&amp;[Hoja1.G168]&amp; CHAR(34) &amp; &quot; },&quot;" office:value-type="string" office:string-value=" { id: 167, enunciado: &quot;Observa el número 9817. Indica cuál es la cifra de las UNIDADES DE MILLAR:&quot;, opciones: [&quot;4&quot;, &quot;8&quot;, &quot;9&quot;, &quot;0&quot;], correcta:  2, observaciones: &quot;La cifra de los millares es la cuarta de la parte entera contando desde la derecha.&quot; },">
            <text:p><text:s/>{ id: 167, enunciado: "Observa el número 9817. Indica cuál es la cifra de las UNIDADES DE MILLAR:", opciones: ["4", "8", "9", "0"], correcta: <text:s/>2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69]&amp; CHAR(34) &amp; &quot;, opciones: [&quot;&amp; CHAR(34)&amp;[Hoja1.B169]&amp; CHAR(34)&amp;&quot;, &quot;&amp; CHAR(34)&amp;[Hoja1.C169]&amp; CHAR(34)&amp;&quot;, &quot;&amp; CHAR(34)&amp;[Hoja1.D169]&amp; CHAR(34)&amp;&quot;, &quot;&amp; CHAR(34)&amp;[Hoja1.E169]&amp; CHAR(34)&amp;&quot;], correcta:  &quot;&amp;[Hoja1.F169]-1&amp; &quot;, observaciones: &quot; &amp; CHAR(34)&amp;[Hoja1.G169]&amp; CHAR(34) &amp; &quot; },&quot;" office:value-type="string" office:string-value=" { id: 168, enunciado: &quot;Observa el número 1589. Indica cuál es la cifra de las UNIDADES DE MILLAR:&quot;, opciones: [&quot;7&quot;, &quot;8&quot;, &quot;1&quot;, &quot;0&quot;], correcta:  2, observaciones: &quot;La cifra de los millares es la cuarta de la parte entera contando desde la derecha.&quot; },">
            <text:p><text:s/>{ id: 168, enunciado: "Observa el número 1589. Indica cuál es la cifra de las UNIDADES DE MILLAR:", opciones: ["7", "8", "1", "0"], correcta: <text:s/>2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70]&amp; CHAR(34) &amp; &quot;, opciones: [&quot;&amp; CHAR(34)&amp;[Hoja1.B170]&amp; CHAR(34)&amp;&quot;, &quot;&amp; CHAR(34)&amp;[Hoja1.C170]&amp; CHAR(34)&amp;&quot;, &quot;&amp; CHAR(34)&amp;[Hoja1.D170]&amp; CHAR(34)&amp;&quot;, &quot;&amp; CHAR(34)&amp;[Hoja1.E170]&amp; CHAR(34)&amp;&quot;], correcta:  &quot;&amp;[Hoja1.F170]-1&amp; &quot;, observaciones: &quot; &amp; CHAR(34)&amp;[Hoja1.G170]&amp; CHAR(34) &amp; &quot; },&quot;" office:value-type="string" office:string-value=" { id: 169, enunciado: &quot;Observa el número 8241. Indica cuál es la cifra de las UNIDADES DE MILLAR:&quot;, opciones: [&quot;0&quot;, &quot;9&quot;, &quot;8&quot;, &quot;7&quot;], correcta:  2, observaciones: &quot;La cifra de los millares es la cuarta de la parte entera contando desde la derecha.&quot; },">
            <text:p><text:s/>{ id: 169, enunciado: "Observa el número 8241. Indica cuál es la cifra de las UNIDADES DE MILLAR:", opciones: ["0", "9", "8", "7"], correcta: <text:s/>2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71]&amp; CHAR(34) &amp; &quot;, opciones: [&quot;&amp; CHAR(34)&amp;[Hoja1.B171]&amp; CHAR(34)&amp;&quot;, &quot;&amp; CHAR(34)&amp;[Hoja1.C171]&amp; CHAR(34)&amp;&quot;, &quot;&amp; CHAR(34)&amp;[Hoja1.D171]&amp; CHAR(34)&amp;&quot;, &quot;&amp; CHAR(34)&amp;[Hoja1.E171]&amp; CHAR(34)&amp;&quot;], correcta:  &quot;&amp;[Hoja1.F171]-1&amp; &quot;, observaciones: &quot; &amp; CHAR(34)&amp;[Hoja1.G171]&amp; CHAR(34) &amp; &quot; },&quot;" office:value-type="string" office:string-value=" { id: 170, enunciado: &quot;Observa el número 1627. Indica cuál es la cifra de las UNIDADES DE MILLAR:&quot;, opciones: [&quot;1&quot;, &quot;7&quot;, &quot;5&quot;, &quot;6&quot;], correcta:  0, observaciones: &quot;La cifra de los millares es la cuarta de la parte entera contando desde la derecha.&quot; },">
            <text:p><text:s/>{ id: 170, enunciado: "Observa el número 1627. Indica cuál es la cifra de las UNIDADES DE MILLAR:", opciones: ["1", "7", "5", "6"], correcta: <text:s/>0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72]&amp; CHAR(34) &amp; &quot;, opciones: [&quot;&amp; CHAR(34)&amp;[Hoja1.B172]&amp; CHAR(34)&amp;&quot;, &quot;&amp; CHAR(34)&amp;[Hoja1.C172]&amp; CHAR(34)&amp;&quot;, &quot;&amp; CHAR(34)&amp;[Hoja1.D172]&amp; CHAR(34)&amp;&quot;, &quot;&amp; CHAR(34)&amp;[Hoja1.E172]&amp; CHAR(34)&amp;&quot;], correcta:  &quot;&amp;[Hoja1.F172]-1&amp; &quot;, observaciones: &quot; &amp; CHAR(34)&amp;[Hoja1.G172]&amp; CHAR(34) &amp; &quot; },&quot;" office:value-type="string" office:string-value=" { id: 171, enunciado: &quot;Observa el número 6824. Indica cuál es la cifra de las UNIDADES DE MILLAR:&quot;, opciones: [&quot;2&quot;, &quot;4&quot;, &quot;6&quot;, &quot;5&quot;], correcta:  2, observaciones: &quot;La cifra de los millares es la cuarta de la parte entera contando desde la derecha.&quot; },">
            <text:p><text:s/>{ id: 171, enunciado: "Observa el número 6824. Indica cuál es la cifra de las UNIDADES DE MILLAR:", opciones: ["2", "4", "6", "5"], correcta: <text:s/>2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73]&amp; CHAR(34) &amp; &quot;, opciones: [&quot;&amp; CHAR(34)&amp;[Hoja1.B173]&amp; CHAR(34)&amp;&quot;, &quot;&amp; CHAR(34)&amp;[Hoja1.C173]&amp; CHAR(34)&amp;&quot;, &quot;&amp; CHAR(34)&amp;[Hoja1.D173]&amp; CHAR(34)&amp;&quot;, &quot;&amp; CHAR(34)&amp;[Hoja1.E173]&amp; CHAR(34)&amp;&quot;], correcta:  &quot;&amp;[Hoja1.F173]-1&amp; &quot;, observaciones: &quot; &amp; CHAR(34)&amp;[Hoja1.G173]&amp; CHAR(34) &amp; &quot; },&quot;" office:value-type="string" office:string-value=" { id: 172, enunciado: &quot;Observa el número 3602. Indica cuál es la cifra de las UNIDADES DE MILLAR:&quot;, opciones: [&quot;6&quot;, &quot;3&quot;, &quot;1&quot;, &quot;2&quot;], correcta:  1, observaciones: &quot;La cifra de los millares es la cuarta de la parte entera contando desde la derecha.&quot; },">
            <text:p><text:s/>{ id: 172, enunciado: "Observa el número 3602. Indica cuál es la cifra de las UNIDADES DE MILLAR:", opciones: ["6", "3", "1", "2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style-name="ce15" table:formula="of:=&quot; { id: &quot;&amp;ROW()-1&amp;&quot;, enunciado: &quot; &amp; CHAR(34)&amp;[Hoja1.A174]&amp; CHAR(34) &amp; &quot;, opciones: [&quot;&amp; CHAR(34)&amp;[Hoja1.B174]&amp; CHAR(34)&amp;&quot;, &quot;&amp; CHAR(34)&amp;[Hoja1.C174]&amp; CHAR(34)&amp;&quot;, &quot;&amp; CHAR(34)&amp;[Hoja1.D174]&amp; CHAR(34)&amp;&quot;, &quot;&amp; CHAR(34)&amp;[Hoja1.E174]&amp; CHAR(34)&amp;&quot;], correcta:  &quot;&amp;[Hoja1.F174]-1&amp; &quot;, observaciones: &quot; &amp; CHAR(34)&amp;[Hoja1.G174]&amp; CHAR(34) &amp; &quot; },&quot;" office:value-type="string" office:string-value=" { id: 173, enunciado: &quot;Observa el número 7205. Indica cuál es la cifra de las UNIDADES DE MILLAR:&quot;, opciones: [&quot;8&quot;, &quot;7&quot;, &quot;0&quot;, &quot;6&quot;], correcta:  1, observaciones: &quot;La cifra de los millares es la cuarta de la parte entera contando desde la derecha.&quot; },">
            <text:p><text:s/>{ id: 173, enunciado: "Observa el número 7205. Indica cuál es la cifra de las UNIDADES DE MILLAR:", opciones: ["8", "7", "0", "6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75]&amp; CHAR(34) &amp; &quot;, opciones: [&quot;&amp; CHAR(34)&amp;[Hoja1.B175]&amp; CHAR(34)&amp;&quot;, &quot;&amp; CHAR(34)&amp;[Hoja1.C175]&amp; CHAR(34)&amp;&quot;, &quot;&amp; CHAR(34)&amp;[Hoja1.D175]&amp; CHAR(34)&amp;&quot;, &quot;&amp; CHAR(34)&amp;[Hoja1.E175]&amp; CHAR(34)&amp;&quot;], correcta:  &quot;&amp;[Hoja1.F175]-1&amp; &quot;, observaciones: &quot; &amp; CHAR(34)&amp;[Hoja1.G175]&amp; CHAR(34) &amp; &quot; },&quot;" office:value-type="string" office:string-value=" { id: 174, enunciado: &quot;Observa el número 2173. Indica cuál es la cifra de las UNIDADES DE MILLAR:&quot;, opciones: [&quot;0&quot;, &quot;1&quot;, &quot;3&quot;, &quot;2&quot;], correcta:  3, observaciones: &quot;La cifra de los millares es la cuarta de la parte entera contando desde la derecha.&quot; },">
            <text:p><text:s/>{ id: 174, enunciado: "Observa el número 2173. Indica cuál es la cifra de las UNIDADES DE MILLAR:", opciones: ["0", "1", "3", "2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76]&amp; CHAR(34) &amp; &quot;, opciones: [&quot;&amp; CHAR(34)&amp;[Hoja1.B176]&amp; CHAR(34)&amp;&quot;, &quot;&amp; CHAR(34)&amp;[Hoja1.C176]&amp; CHAR(34)&amp;&quot;, &quot;&amp; CHAR(34)&amp;[Hoja1.D176]&amp; CHAR(34)&amp;&quot;, &quot;&amp; CHAR(34)&amp;[Hoja1.E176]&amp; CHAR(34)&amp;&quot;], correcta:  &quot;&amp;[Hoja1.F176]-1&amp; &quot;, observaciones: &quot; &amp; CHAR(34)&amp;[Hoja1.G176]&amp; CHAR(34) &amp; &quot; },&quot;" office:value-type="string" office:string-value=" { id: 175, enunciado: &quot;Observa el número 4768. Indica cuál es la cifra de las UNIDADES DE MILLAR:&quot;, opciones: [&quot;7&quot;, &quot;4&quot;, &quot;1&quot;, &quot;3&quot;], correcta:  1, observaciones: &quot;La cifra de los millares es la cuarta de la parte entera contando desde la derecha.&quot; },">
            <text:p><text:s/>{ id: 175, enunciado: "Observa el número 4768. Indica cuál es la cifra de las UNIDADES DE MILLAR:", opciones: ["7", "4", "1", "3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77]&amp; CHAR(34) &amp; &quot;, opciones: [&quot;&amp; CHAR(34)&amp;[Hoja1.B177]&amp; CHAR(34)&amp;&quot;, &quot;&amp; CHAR(34)&amp;[Hoja1.C177]&amp; CHAR(34)&amp;&quot;, &quot;&amp; CHAR(34)&amp;[Hoja1.D177]&amp; CHAR(34)&amp;&quot;, &quot;&amp; CHAR(34)&amp;[Hoja1.E177]&amp; CHAR(34)&amp;&quot;], correcta:  &quot;&amp;[Hoja1.F177]-1&amp; &quot;, observaciones: &quot; &amp; CHAR(34)&amp;[Hoja1.G177]&amp; CHAR(34) &amp; &quot; },&quot;" office:value-type="string" office:string-value=" { id: 176, enunciado: &quot;Observa el número 5294. Indica cuál es la cifra de las UNIDADES DE MILLAR:&quot;, opciones: [&quot;4&quot;, &quot;5&quot;, &quot;2&quot;, &quot;9&quot;], correcta:  1, observaciones: &quot;La cifra de los millares es la cuarta de la parte entera contando desde la derecha.&quot; },">
            <text:p><text:s/>{ id: 176, enunciado: "Observa el número 5294. Indica cuál es la cifra de las UNIDADES DE MILLAR:", opciones: ["4", "5", "2", "9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78]&amp; CHAR(34) &amp; &quot;, opciones: [&quot;&amp; CHAR(34)&amp;[Hoja1.B178]&amp; CHAR(34)&amp;&quot;, &quot;&amp; CHAR(34)&amp;[Hoja1.C178]&amp; CHAR(34)&amp;&quot;, &quot;&amp; CHAR(34)&amp;[Hoja1.D178]&amp; CHAR(34)&amp;&quot;, &quot;&amp; CHAR(34)&amp;[Hoja1.E178]&amp; CHAR(34)&amp;&quot;], correcta:  &quot;&amp;[Hoja1.F178]-1&amp; &quot;, observaciones: &quot; &amp; CHAR(34)&amp;[Hoja1.G178]&amp; CHAR(34) &amp; &quot; },&quot;" office:value-type="string" office:string-value=" { id: 177, enunciado: &quot;Observa el número 1731. Indica cuál es la cifra de las UNIDADES DE MILLAR:&quot;, opciones: [&quot;5&quot;, &quot;4&quot;, &quot;2&quot;, &quot;1&quot;], correcta:  3, observaciones: &quot;La cifra de los millares es la cuarta de la parte entera contando desde la derecha.&quot; },">
            <text:p><text:s/>{ id: 177, enunciado: "Observa el número 1731. Indica cuál es la cifra de las UNIDADES DE MILLAR:", opciones: ["5", "4", "2", "1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79]&amp; CHAR(34) &amp; &quot;, opciones: [&quot;&amp; CHAR(34)&amp;[Hoja1.B179]&amp; CHAR(34)&amp;&quot;, &quot;&amp; CHAR(34)&amp;[Hoja1.C179]&amp; CHAR(34)&amp;&quot;, &quot;&amp; CHAR(34)&amp;[Hoja1.D179]&amp; CHAR(34)&amp;&quot;, &quot;&amp; CHAR(34)&amp;[Hoja1.E179]&amp; CHAR(34)&amp;&quot;], correcta:  &quot;&amp;[Hoja1.F179]-1&amp; &quot;, observaciones: &quot; &amp; CHAR(34)&amp;[Hoja1.G179]&amp; CHAR(34) &amp; &quot; },&quot;" office:value-type="string" office:string-value=" { id: 178, enunciado: &quot;Observa el número 8967. Indica cuál es la cifra de las UNIDADES DE MILLAR:&quot;, opciones: [&quot;8&quot;, &quot;0&quot;, &quot;5&quot;, &quot;2&quot;], correcta:  0, observaciones: &quot;La cifra de los millares es la cuarta de la parte entera contando desde la derecha.&quot; },">
            <text:p><text:s/>{ id: 178, enunciado: "Observa el número 8967. Indica cuál es la cifra de las UNIDADES DE MILLAR:", opciones: ["8", "0", "5", "2"], correcta: <text:s/>0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0]&amp; CHAR(34) &amp; &quot;, opciones: [&quot;&amp; CHAR(34)&amp;[Hoja1.B180]&amp; CHAR(34)&amp;&quot;, &quot;&amp; CHAR(34)&amp;[Hoja1.C180]&amp; CHAR(34)&amp;&quot;, &quot;&amp; CHAR(34)&amp;[Hoja1.D180]&amp; CHAR(34)&amp;&quot;, &quot;&amp; CHAR(34)&amp;[Hoja1.E180]&amp; CHAR(34)&amp;&quot;], correcta:  &quot;&amp;[Hoja1.F180]-1&amp; &quot;, observaciones: &quot; &amp; CHAR(34)&amp;[Hoja1.G180]&amp; CHAR(34) &amp; &quot; },&quot;" office:value-type="string" office:string-value=" { id: 179, enunciado: &quot;Observa el número 2849. Indica cuál es la cifra de las UNIDADES DE MILLAR:&quot;, opciones: [&quot;1&quot;, &quot;2&quot;, &quot;8&quot;, &quot;3&quot;], correcta:  1, observaciones: &quot;La cifra de los millares es la cuarta de la parte entera contando desde la derecha.&quot; },">
            <text:p><text:s/>{ id: 179, enunciado: "Observa el número 2849. Indica cuál es la cifra de las UNIDADES DE MILLAR:", opciones: ["1", "2", "8", "3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1]&amp; CHAR(34) &amp; &quot;, opciones: [&quot;&amp; CHAR(34)&amp;[Hoja1.B181]&amp; CHAR(34)&amp;&quot;, &quot;&amp; CHAR(34)&amp;[Hoja1.C181]&amp; CHAR(34)&amp;&quot;, &quot;&amp; CHAR(34)&amp;[Hoja1.D181]&amp; CHAR(34)&amp;&quot;, &quot;&amp; CHAR(34)&amp;[Hoja1.E181]&amp; CHAR(34)&amp;&quot;], correcta:  &quot;&amp;[Hoja1.F181]-1&amp; &quot;, observaciones: &quot; &amp; CHAR(34)&amp;[Hoja1.G181]&amp; CHAR(34) &amp; &quot; },&quot;" office:value-type="string" office:string-value=" { id: 180, enunciado: &quot;Observa el número 5743. Indica cuál es la cifra de las UNIDADES DE MILLAR:&quot;, opciones: [&quot;4&quot;, &quot;7&quot;, &quot;8&quot;, &quot;5&quot;], correcta:  3, observaciones: &quot;La cifra de los millares es la cuarta de la parte entera contando desde la derecha.&quot; },">
            <text:p><text:s/>{ id: 180, enunciado: "Observa el número 5743. Indica cuál es la cifra de las UNIDADES DE MILLAR:", opciones: ["4", "7", "8", "5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2]&amp; CHAR(34) &amp; &quot;, opciones: [&quot;&amp; CHAR(34)&amp;[Hoja1.B182]&amp; CHAR(34)&amp;&quot;, &quot;&amp; CHAR(34)&amp;[Hoja1.C182]&amp; CHAR(34)&amp;&quot;, &quot;&amp; CHAR(34)&amp;[Hoja1.D182]&amp; CHAR(34)&amp;&quot;, &quot;&amp; CHAR(34)&amp;[Hoja1.E182]&amp; CHAR(34)&amp;&quot;], correcta:  &quot;&amp;[Hoja1.F182]-1&amp; &quot;, observaciones: &quot; &amp; CHAR(34)&amp;[Hoja1.G182]&amp; CHAR(34) &amp; &quot; },&quot;" office:value-type="string" office:string-value=" { id: 181, enunciado: &quot;Observa el número 4072. Indica cuál es la cifra de las UNIDADES DE MILLAR:&quot;, opciones: [&quot;7&quot;, &quot;1&quot;, &quot;0&quot;, &quot;4&quot;], correcta:  3, observaciones: &quot;La cifra de los millares es la cuarta de la parte entera contando desde la derecha.&quot; },">
            <text:p><text:s/>{ id: 181, enunciado: "Observa el número 4072. Indica cuál es la cifra de las UNIDADES DE MILLAR:", opciones: ["7", "1", "0", "4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3]&amp; CHAR(34) &amp; &quot;, opciones: [&quot;&amp; CHAR(34)&amp;[Hoja1.B183]&amp; CHAR(34)&amp;&quot;, &quot;&amp; CHAR(34)&amp;[Hoja1.C183]&amp; CHAR(34)&amp;&quot;, &quot;&amp; CHAR(34)&amp;[Hoja1.D183]&amp; CHAR(34)&amp;&quot;, &quot;&amp; CHAR(34)&amp;[Hoja1.E183]&amp; CHAR(34)&amp;&quot;], correcta:  &quot;&amp;[Hoja1.F183]-1&amp; &quot;, observaciones: &quot; &amp; CHAR(34)&amp;[Hoja1.G183]&amp; CHAR(34) &amp; &quot; },&quot;" office:value-type="string" office:string-value=" { id: 182, enunciado: &quot;Observa el número 7986. Indica cuál es la cifra de las UNIDADES DE MILLAR:&quot;, opciones: [&quot;0&quot;, &quot;7&quot;, &quot;1&quot;, &quot;4&quot;], correcta:  1, observaciones: &quot;La cifra de los millares es la cuarta de la parte entera contando desde la derecha.&quot; },">
            <text:p><text:s/>{ id: 182, enunciado: "Observa el número 7986. Indica cuál es la cifra de las UNIDADES DE MILLAR:", opciones: ["0", "7", "1", "4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4]&amp; CHAR(34) &amp; &quot;, opciones: [&quot;&amp; CHAR(34)&amp;[Hoja1.B184]&amp; CHAR(34)&amp;&quot;, &quot;&amp; CHAR(34)&amp;[Hoja1.C184]&amp; CHAR(34)&amp;&quot;, &quot;&amp; CHAR(34)&amp;[Hoja1.D184]&amp; CHAR(34)&amp;&quot;, &quot;&amp; CHAR(34)&amp;[Hoja1.E184]&amp; CHAR(34)&amp;&quot;], correcta:  &quot;&amp;[Hoja1.F184]-1&amp; &quot;, observaciones: &quot; &amp; CHAR(34)&amp;[Hoja1.G184]&amp; CHAR(34) &amp; &quot; },&quot;" office:value-type="string" office:string-value=" { id: 183, enunciado: &quot;Observa el número 1165. Indica cuál es la cifra de las UNIDADES DE MILLAR:&quot;, opciones: [&quot;1&quot;, &quot;7&quot;, &quot;5&quot;, &quot;6&quot;], correcta:  0, observaciones: &quot;La cifra de los millares es la cuarta de la parte entera contando desde la derecha.&quot; },">
            <text:p><text:s/>{ id: 183, enunciado: "Observa el número 1165. Indica cuál es la cifra de las UNIDADES DE MILLAR:", opciones: ["1", "7", "5", "6"], correcta: <text:s/>0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5]&amp; CHAR(34) &amp; &quot;, opciones: [&quot;&amp; CHAR(34)&amp;[Hoja1.B185]&amp; CHAR(34)&amp;&quot;, &quot;&amp; CHAR(34)&amp;[Hoja1.C185]&amp; CHAR(34)&amp;&quot;, &quot;&amp; CHAR(34)&amp;[Hoja1.D185]&amp; CHAR(34)&amp;&quot;, &quot;&amp; CHAR(34)&amp;[Hoja1.E185]&amp; CHAR(34)&amp;&quot;], correcta:  &quot;&amp;[Hoja1.F185]-1&amp; &quot;, observaciones: &quot; &amp; CHAR(34)&amp;[Hoja1.G185]&amp; CHAR(34) &amp; &quot; },&quot;" office:value-type="string" office:string-value=" { id: 184, enunciado: &quot;Observa el número 8594. Indica cuál es la cifra de las UNIDADES DE MILLAR:&quot;, opciones: [&quot;6&quot;, &quot;8&quot;, &quot;5&quot;, &quot;7&quot;], correcta:  1, observaciones: &quot;La cifra de los millares es la cuarta de la parte entera contando desde la derecha.&quot; },">
            <text:p><text:s/>{ id: 184, enunciado: "Observa el número 8594. Indica cuál es la cifra de las UNIDADES DE MILLAR:", opciones: ["6", "8", "5", "7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6]&amp; CHAR(34) &amp; &quot;, opciones: [&quot;&amp; CHAR(34)&amp;[Hoja1.B186]&amp; CHAR(34)&amp;&quot;, &quot;&amp; CHAR(34)&amp;[Hoja1.C186]&amp; CHAR(34)&amp;&quot;, &quot;&amp; CHAR(34)&amp;[Hoja1.D186]&amp; CHAR(34)&amp;&quot;, &quot;&amp; CHAR(34)&amp;[Hoja1.E186]&amp; CHAR(34)&amp;&quot;], correcta:  &quot;&amp;[Hoja1.F186]-1&amp; &quot;, observaciones: &quot; &amp; CHAR(34)&amp;[Hoja1.G186]&amp; CHAR(34) &amp; &quot; },&quot;" office:value-type="string" office:string-value=" { id: 185, enunciado: &quot;Observa el número 1564. Indica cuál es la cifra de las UNIDADES DE MILLAR:&quot;, opciones: [&quot;2&quot;, &quot;4&quot;, &quot;1&quot;, &quot;5&quot;], correcta:  2, observaciones: &quot;La cifra de los millares es la cuarta de la parte entera contando desde la derecha.&quot; },">
            <text:p><text:s/>{ id: 185, enunciado: "Observa el número 1564. Indica cuál es la cifra de las UNIDADES DE MILLAR:", opciones: ["2", "4", "1", "5"], correcta: <text:s/>2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7]&amp; CHAR(34) &amp; &quot;, opciones: [&quot;&amp; CHAR(34)&amp;[Hoja1.B187]&amp; CHAR(34)&amp;&quot;, &quot;&amp; CHAR(34)&amp;[Hoja1.C187]&amp; CHAR(34)&amp;&quot;, &quot;&amp; CHAR(34)&amp;[Hoja1.D187]&amp; CHAR(34)&amp;&quot;, &quot;&amp; CHAR(34)&amp;[Hoja1.E187]&amp; CHAR(34)&amp;&quot;], correcta:  &quot;&amp;[Hoja1.F187]-1&amp; &quot;, observaciones: &quot; &amp; CHAR(34)&amp;[Hoja1.G187]&amp; CHAR(34) &amp; &quot; },&quot;" office:value-type="string" office:string-value=" { id: 186, enunciado: &quot;Observa el número 1253. Indica cuál es la cifra de las UNIDADES DE MILLAR:&quot;, opciones: [&quot;6&quot;, &quot;1&quot;, &quot;8&quot;, &quot;5&quot;], correcta:  1, observaciones: &quot;La cifra de los millares es la cuarta de la parte entera contando desde la derecha.&quot; },">
            <text:p><text:s/>{ id: 186, enunciado: "Observa el número 1253. Indica cuál es la cifra de las UNIDADES DE MILLAR:", opciones: ["6", "1", "8", "5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8]&amp; CHAR(34) &amp; &quot;, opciones: [&quot;&amp; CHAR(34)&amp;[Hoja1.B188]&amp; CHAR(34)&amp;&quot;, &quot;&amp; CHAR(34)&amp;[Hoja1.C188]&amp; CHAR(34)&amp;&quot;, &quot;&amp; CHAR(34)&amp;[Hoja1.D188]&amp; CHAR(34)&amp;&quot;, &quot;&amp; CHAR(34)&amp;[Hoja1.E188]&amp; CHAR(34)&amp;&quot;], correcta:  &quot;&amp;[Hoja1.F188]-1&amp; &quot;, observaciones: &quot; &amp; CHAR(34)&amp;[Hoja1.G188]&amp; CHAR(34) &amp; &quot; },&quot;" office:value-type="string" office:string-value=" { id: 187, enunciado: &quot;Observa el número 1423. Indica cuál es la cifra de las UNIDADES DE MILLAR:&quot;, opciones: [&quot;2&quot;, &quot;4&quot;, &quot;3&quot;, &quot;1&quot;], correcta:  3, observaciones: &quot;La cifra de los millares es la cuarta de la parte entera contando desde la derecha.&quot; },">
            <text:p><text:s/>{ id: 187, enunciado: "Observa el número 1423. Indica cuál es la cifra de las UNIDADES DE MILLAR:", opciones: ["2", "4", "3", "1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89]&amp; CHAR(34) &amp; &quot;, opciones: [&quot;&amp; CHAR(34)&amp;[Hoja1.B189]&amp; CHAR(34)&amp;&quot;, &quot;&amp; CHAR(34)&amp;[Hoja1.C189]&amp; CHAR(34)&amp;&quot;, &quot;&amp; CHAR(34)&amp;[Hoja1.D189]&amp; CHAR(34)&amp;&quot;, &quot;&amp; CHAR(34)&amp;[Hoja1.E189]&amp; CHAR(34)&amp;&quot;], correcta:  &quot;&amp;[Hoja1.F189]-1&amp; &quot;, observaciones: &quot; &amp; CHAR(34)&amp;[Hoja1.G189]&amp; CHAR(34) &amp; &quot; },&quot;" office:value-type="string" office:string-value=" { id: 188, enunciado: &quot;Observa el número 1784. Indica cuál es la cifra de las UNIDADES DE MILLAR:&quot;, opciones: [&quot;5&quot;, &quot;1&quot;, &quot;2&quot;, &quot;6&quot;], correcta:  1, observaciones: &quot;La cifra de los millares es la cuarta de la parte entera contando desde la derecha.&quot; },">
            <text:p><text:s/>{ id: 188, enunciado: "Observa el número 1784. Indica cuál es la cifra de las UNIDADES DE MILLAR:", opciones: ["5", "1", "2", "6"], correcta: <text:s/>1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0]&amp; CHAR(34) &amp; &quot;, opciones: [&quot;&amp; CHAR(34)&amp;[Hoja1.B190]&amp; CHAR(34)&amp;&quot;, &quot;&amp; CHAR(34)&amp;[Hoja1.C190]&amp; CHAR(34)&amp;&quot;, &quot;&amp; CHAR(34)&amp;[Hoja1.D190]&amp; CHAR(34)&amp;&quot;, &quot;&amp; CHAR(34)&amp;[Hoja1.E190]&amp; CHAR(34)&amp;&quot;], correcta:  &quot;&amp;[Hoja1.F190]-1&amp; &quot;, observaciones: &quot; &amp; CHAR(34)&amp;[Hoja1.G190]&amp; CHAR(34) &amp; &quot; },&quot;" office:value-type="string" office:string-value=" { id: 189, enunciado: &quot;Observa el número 9705. Indica cuál es la cifra de las UNIDADES DE MILLAR:&quot;, opciones: [&quot;2&quot;, &quot;1&quot;, &quot;5&quot;, &quot;9&quot;], correcta:  3, observaciones: &quot;La cifra de los millares es la cuarta de la parte entera contando desde la derecha.&quot; },">
            <text:p><text:s/>{ id: 189, enunciado: "Observa el número 9705. Indica cuál es la cifra de las UNIDADES DE MILLAR:", opciones: ["2", "1", "5", "9"], correcta: <text:s/>3, observaciones: "La cifra de los millares es la cuarta de la parte entera contando desde la derecha.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1]&amp; CHAR(34) &amp; &quot;, opciones: [&quot;&amp; CHAR(34)&amp;[Hoja1.B191]&amp; CHAR(34)&amp;&quot;, &quot;&amp; CHAR(34)&amp;[Hoja1.C191]&amp; CHAR(34)&amp;&quot;, &quot;&amp; CHAR(34)&amp;[Hoja1.D191]&amp; CHAR(34)&amp;&quot;, &quot;&amp; CHAR(34)&amp;[Hoja1.E191]&amp; CHAR(34)&amp;&quot;], correcta:  &quot;&amp;[Hoja1.F191]-1&amp; &quot;, observaciones: &quot; &amp; CHAR(34)&amp;[Hoja1.G191]&amp; CHAR(34) &amp; &quot; },&quot;" office:value-type="string" office:string-value=" { id: 190, enunciado: &quot;&quot;, opciones: [&quot;&quot;, &quot;&quot;, &quot;&quot;, &quot;&quot;], correcta:  -1, observaciones: &quot;&quot; },">
            <text:p><text:s/>{ id: 19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2]&amp; CHAR(34) &amp; &quot;, opciones: [&quot;&amp; CHAR(34)&amp;[Hoja1.B192]&amp; CHAR(34)&amp;&quot;, &quot;&amp; CHAR(34)&amp;[Hoja1.C192]&amp; CHAR(34)&amp;&quot;, &quot;&amp; CHAR(34)&amp;[Hoja1.D192]&amp; CHAR(34)&amp;&quot;, &quot;&amp; CHAR(34)&amp;[Hoja1.E192]&amp; CHAR(34)&amp;&quot;], correcta:  &quot;&amp;[Hoja1.F192]-1&amp; &quot;, observaciones: &quot; &amp; CHAR(34)&amp;[Hoja1.G192]&amp; CHAR(34) &amp; &quot; },&quot;" office:value-type="string" office:string-value=" { id: 191, enunciado: &quot;&quot;, opciones: [&quot;&quot;, &quot;&quot;, &quot;&quot;, &quot;&quot;], correcta:  -1, observaciones: &quot;&quot; },">
            <text:p><text:s/>{ id: 19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3]&amp; CHAR(34) &amp; &quot;, opciones: [&quot;&amp; CHAR(34)&amp;[Hoja1.B193]&amp; CHAR(34)&amp;&quot;, &quot;&amp; CHAR(34)&amp;[Hoja1.C193]&amp; CHAR(34)&amp;&quot;, &quot;&amp; CHAR(34)&amp;[Hoja1.D193]&amp; CHAR(34)&amp;&quot;, &quot;&amp; CHAR(34)&amp;[Hoja1.E193]&amp; CHAR(34)&amp;&quot;], correcta:  &quot;&amp;[Hoja1.F193]-1&amp; &quot;, observaciones: &quot; &amp; CHAR(34)&amp;[Hoja1.G193]&amp; CHAR(34) &amp; &quot; },&quot;" office:value-type="string" office:string-value=" { id: 192, enunciado: &quot;&quot;, opciones: [&quot;&quot;, &quot;&quot;, &quot;&quot;, &quot;&quot;], correcta:  -1, observaciones: &quot;&quot; },">
            <text:p><text:s/>{ id: 19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4]&amp; CHAR(34) &amp; &quot;, opciones: [&quot;&amp; CHAR(34)&amp;[Hoja1.B194]&amp; CHAR(34)&amp;&quot;, &quot;&amp; CHAR(34)&amp;[Hoja1.C194]&amp; CHAR(34)&amp;&quot;, &quot;&amp; CHAR(34)&amp;[Hoja1.D194]&amp; CHAR(34)&amp;&quot;, &quot;&amp; CHAR(34)&amp;[Hoja1.E194]&amp; CHAR(34)&amp;&quot;], correcta:  &quot;&amp;[Hoja1.F194]-1&amp; &quot;, observaciones: &quot; &amp; CHAR(34)&amp;[Hoja1.G194]&amp; CHAR(34) &amp; &quot; },&quot;" office:value-type="string" office:string-value=" { id: 193, enunciado: &quot;&quot;, opciones: [&quot;&quot;, &quot;&quot;, &quot;&quot;, &quot;&quot;], correcta:  -1, observaciones: &quot;&quot; },">
            <text:p><text:s/>{ id: 19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5]&amp; CHAR(34) &amp; &quot;, opciones: [&quot;&amp; CHAR(34)&amp;[Hoja1.B195]&amp; CHAR(34)&amp;&quot;, &quot;&amp; CHAR(34)&amp;[Hoja1.C195]&amp; CHAR(34)&amp;&quot;, &quot;&amp; CHAR(34)&amp;[Hoja1.D195]&amp; CHAR(34)&amp;&quot;, &quot;&amp; CHAR(34)&amp;[Hoja1.E195]&amp; CHAR(34)&amp;&quot;], correcta:  &quot;&amp;[Hoja1.F195]-1&amp; &quot;, observaciones: &quot; &amp; CHAR(34)&amp;[Hoja1.G195]&amp; CHAR(34) &amp; &quot; },&quot;" office:value-type="string" office:string-value=" { id: 194, enunciado: &quot;&quot;, opciones: [&quot;&quot;, &quot;&quot;, &quot;&quot;, &quot;&quot;], correcta:  -1, observaciones: &quot;&quot; },">
            <text:p><text:s/>{ id: 19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6]&amp; CHAR(34) &amp; &quot;, opciones: [&quot;&amp; CHAR(34)&amp;[Hoja1.B196]&amp; CHAR(34)&amp;&quot;, &quot;&amp; CHAR(34)&amp;[Hoja1.C196]&amp; CHAR(34)&amp;&quot;, &quot;&amp; CHAR(34)&amp;[Hoja1.D196]&amp; CHAR(34)&amp;&quot;, &quot;&amp; CHAR(34)&amp;[Hoja1.E196]&amp; CHAR(34)&amp;&quot;], correcta:  &quot;&amp;[Hoja1.F196]-1&amp; &quot;, observaciones: &quot; &amp; CHAR(34)&amp;[Hoja1.G196]&amp; CHAR(34) &amp; &quot; },&quot;" office:value-type="string" office:string-value=" { id: 195, enunciado: &quot;&quot;, opciones: [&quot;&quot;, &quot;&quot;, &quot;&quot;, &quot;&quot;], correcta:  -1, observaciones: &quot;&quot; },">
            <text:p><text:s/>{ id: 19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7]&amp; CHAR(34) &amp; &quot;, opciones: [&quot;&amp; CHAR(34)&amp;[Hoja1.B197]&amp; CHAR(34)&amp;&quot;, &quot;&amp; CHAR(34)&amp;[Hoja1.C197]&amp; CHAR(34)&amp;&quot;, &quot;&amp; CHAR(34)&amp;[Hoja1.D197]&amp; CHAR(34)&amp;&quot;, &quot;&amp; CHAR(34)&amp;[Hoja1.E197]&amp; CHAR(34)&amp;&quot;], correcta:  &quot;&amp;[Hoja1.F197]-1&amp; &quot;, observaciones: &quot; &amp; CHAR(34)&amp;[Hoja1.G197]&amp; CHAR(34) &amp; &quot; },&quot;" office:value-type="string" office:string-value=" { id: 196, enunciado: &quot;&quot;, opciones: [&quot;&quot;, &quot;&quot;, &quot;&quot;, &quot;&quot;], correcta:  -1, observaciones: &quot;&quot; },">
            <text:p><text:s/>{ id: 19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8]&amp; CHAR(34) &amp; &quot;, opciones: [&quot;&amp; CHAR(34)&amp;[Hoja1.B198]&amp; CHAR(34)&amp;&quot;, &quot;&amp; CHAR(34)&amp;[Hoja1.C198]&amp; CHAR(34)&amp;&quot;, &quot;&amp; CHAR(34)&amp;[Hoja1.D198]&amp; CHAR(34)&amp;&quot;, &quot;&amp; CHAR(34)&amp;[Hoja1.E198]&amp; CHAR(34)&amp;&quot;], correcta:  &quot;&amp;[Hoja1.F198]-1&amp; &quot;, observaciones: &quot; &amp; CHAR(34)&amp;[Hoja1.G198]&amp; CHAR(34) &amp; &quot; },&quot;" office:value-type="string" office:string-value=" { id: 197, enunciado: &quot;&quot;, opciones: [&quot;&quot;, &quot;&quot;, &quot;&quot;, &quot;&quot;], correcta:  -1, observaciones: &quot;&quot; },">
            <text:p><text:s/>{ id: 19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199]&amp; CHAR(34) &amp; &quot;, opciones: [&quot;&amp; CHAR(34)&amp;[Hoja1.B199]&amp; CHAR(34)&amp;&quot;, &quot;&amp; CHAR(34)&amp;[Hoja1.C199]&amp; CHAR(34)&amp;&quot;, &quot;&amp; CHAR(34)&amp;[Hoja1.D199]&amp; CHAR(34)&amp;&quot;, &quot;&amp; CHAR(34)&amp;[Hoja1.E199]&amp; CHAR(34)&amp;&quot;], correcta:  &quot;&amp;[Hoja1.F199]-1&amp; &quot;, observaciones: &quot; &amp; CHAR(34)&amp;[Hoja1.G199]&amp; CHAR(34) &amp; &quot; },&quot;" office:value-type="string" office:string-value=" { id: 198, enunciado: &quot;&quot;, opciones: [&quot;&quot;, &quot;&quot;, &quot;&quot;, &quot;&quot;], correcta:  -1, observaciones: &quot;&quot; },">
            <text:p><text:s/>{ id: 19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0]&amp; CHAR(34) &amp; &quot;, opciones: [&quot;&amp; CHAR(34)&amp;[Hoja1.B200]&amp; CHAR(34)&amp;&quot;, &quot;&amp; CHAR(34)&amp;[Hoja1.C200]&amp; CHAR(34)&amp;&quot;, &quot;&amp; CHAR(34)&amp;[Hoja1.D200]&amp; CHAR(34)&amp;&quot;, &quot;&amp; CHAR(34)&amp;[Hoja1.E200]&amp; CHAR(34)&amp;&quot;], correcta:  &quot;&amp;[Hoja1.F200]-1&amp; &quot;, observaciones: &quot; &amp; CHAR(34)&amp;[Hoja1.G200]&amp; CHAR(34) &amp; &quot; },&quot;" office:value-type="string" office:string-value=" { id: 199, enunciado: &quot;&quot;, opciones: [&quot;&quot;, &quot;&quot;, &quot;&quot;, &quot;&quot;], correcta:  -1, observaciones: &quot;&quot; },">
            <text:p><text:s/>{ id: 19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1]&amp; CHAR(34) &amp; &quot;, opciones: [&quot;&amp; CHAR(34)&amp;[Hoja1.B201]&amp; CHAR(34)&amp;&quot;, &quot;&amp; CHAR(34)&amp;[Hoja1.C201]&amp; CHAR(34)&amp;&quot;, &quot;&amp; CHAR(34)&amp;[Hoja1.D201]&amp; CHAR(34)&amp;&quot;, &quot;&amp; CHAR(34)&amp;[Hoja1.E201]&amp; CHAR(34)&amp;&quot;], correcta:  &quot;&amp;[Hoja1.F201]-1&amp; &quot;, observaciones: &quot; &amp; CHAR(34)&amp;[Hoja1.G201]&amp; CHAR(34) &amp; &quot; },&quot;" office:value-type="string" office:string-value=" { id: 200, enunciado: &quot;&quot;, opciones: [&quot;&quot;, &quot;&quot;, &quot;&quot;, &quot;&quot;], correcta:  -1, observaciones: &quot;&quot; },">
            <text:p><text:s/>{ id: 20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2]&amp; CHAR(34) &amp; &quot;, opciones: [&quot;&amp; CHAR(34)&amp;[Hoja1.B202]&amp; CHAR(34)&amp;&quot;, &quot;&amp; CHAR(34)&amp;[Hoja1.C202]&amp; CHAR(34)&amp;&quot;, &quot;&amp; CHAR(34)&amp;[Hoja1.D202]&amp; CHAR(34)&amp;&quot;, &quot;&amp; CHAR(34)&amp;[Hoja1.E202]&amp; CHAR(34)&amp;&quot;], correcta:  &quot;&amp;[Hoja1.F202]-1&amp; &quot;, observaciones: &quot; &amp; CHAR(34)&amp;[Hoja1.G202]&amp; CHAR(34) &amp; &quot; },&quot;" office:value-type="string" office:string-value=" { id: 201, enunciado: &quot;&quot;, opciones: [&quot;&quot;, &quot;&quot;, &quot;&quot;, &quot;&quot;], correcta:  -1, observaciones: &quot;&quot; },">
            <text:p><text:s/>{ id: 20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3]&amp; CHAR(34) &amp; &quot;, opciones: [&quot;&amp; CHAR(34)&amp;[Hoja1.B203]&amp; CHAR(34)&amp;&quot;, &quot;&amp; CHAR(34)&amp;[Hoja1.C203]&amp; CHAR(34)&amp;&quot;, &quot;&amp; CHAR(34)&amp;[Hoja1.D203]&amp; CHAR(34)&amp;&quot;, &quot;&amp; CHAR(34)&amp;[Hoja1.E203]&amp; CHAR(34)&amp;&quot;], correcta:  &quot;&amp;[Hoja1.F203]-1&amp; &quot;, observaciones: &quot; &amp; CHAR(34)&amp;[Hoja1.G203]&amp; CHAR(34) &amp; &quot; },&quot;" office:value-type="string" office:string-value=" { id: 202, enunciado: &quot;&quot;, opciones: [&quot;&quot;, &quot;&quot;, &quot;&quot;, &quot;&quot;], correcta:  -1, observaciones: &quot;&quot; },">
            <text:p><text:s/>{ id: 20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4]&amp; CHAR(34) &amp; &quot;, opciones: [&quot;&amp; CHAR(34)&amp;[Hoja1.B204]&amp; CHAR(34)&amp;&quot;, &quot;&amp; CHAR(34)&amp;[Hoja1.C204]&amp; CHAR(34)&amp;&quot;, &quot;&amp; CHAR(34)&amp;[Hoja1.D204]&amp; CHAR(34)&amp;&quot;, &quot;&amp; CHAR(34)&amp;[Hoja1.E204]&amp; CHAR(34)&amp;&quot;], correcta:  &quot;&amp;[Hoja1.F204]-1&amp; &quot;, observaciones: &quot; &amp; CHAR(34)&amp;[Hoja1.G204]&amp; CHAR(34) &amp; &quot; },&quot;" office:value-type="string" office:string-value=" { id: 203, enunciado: &quot;&quot;, opciones: [&quot;&quot;, &quot;&quot;, &quot;&quot;, &quot;&quot;], correcta:  -1, observaciones: &quot;&quot; },">
            <text:p><text:s/>{ id: 20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5]&amp; CHAR(34) &amp; &quot;, opciones: [&quot;&amp; CHAR(34)&amp;[Hoja1.B205]&amp; CHAR(34)&amp;&quot;, &quot;&amp; CHAR(34)&amp;[Hoja1.C205]&amp; CHAR(34)&amp;&quot;, &quot;&amp; CHAR(34)&amp;[Hoja1.D205]&amp; CHAR(34)&amp;&quot;, &quot;&amp; CHAR(34)&amp;[Hoja1.E205]&amp; CHAR(34)&amp;&quot;], correcta:  &quot;&amp;[Hoja1.F205]-1&amp; &quot;, observaciones: &quot; &amp; CHAR(34)&amp;[Hoja1.G205]&amp; CHAR(34) &amp; &quot; },&quot;" office:value-type="string" office:string-value=" { id: 204, enunciado: &quot;&quot;, opciones: [&quot;&quot;, &quot;&quot;, &quot;&quot;, &quot;&quot;], correcta:  -1, observaciones: &quot;&quot; },">
            <text:p><text:s/>{ id: 20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6]&amp; CHAR(34) &amp; &quot;, opciones: [&quot;&amp; CHAR(34)&amp;[Hoja1.B206]&amp; CHAR(34)&amp;&quot;, &quot;&amp; CHAR(34)&amp;[Hoja1.C206]&amp; CHAR(34)&amp;&quot;, &quot;&amp; CHAR(34)&amp;[Hoja1.D206]&amp; CHAR(34)&amp;&quot;, &quot;&amp; CHAR(34)&amp;[Hoja1.E206]&amp; CHAR(34)&amp;&quot;], correcta:  &quot;&amp;[Hoja1.F206]-1&amp; &quot;, observaciones: &quot; &amp; CHAR(34)&amp;[Hoja1.G206]&amp; CHAR(34) &amp; &quot; },&quot;" office:value-type="string" office:string-value=" { id: 205, enunciado: &quot;&quot;, opciones: [&quot;&quot;, &quot;&quot;, &quot;&quot;, &quot;&quot;], correcta:  -1, observaciones: &quot;&quot; },">
            <text:p><text:s/>{ id: 20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7]&amp; CHAR(34) &amp; &quot;, opciones: [&quot;&amp; CHAR(34)&amp;[Hoja1.B207]&amp; CHAR(34)&amp;&quot;, &quot;&amp; CHAR(34)&amp;[Hoja1.C207]&amp; CHAR(34)&amp;&quot;, &quot;&amp; CHAR(34)&amp;[Hoja1.D207]&amp; CHAR(34)&amp;&quot;, &quot;&amp; CHAR(34)&amp;[Hoja1.E207]&amp; CHAR(34)&amp;&quot;], correcta:  &quot;&amp;[Hoja1.F207]-1&amp; &quot;, observaciones: &quot; &amp; CHAR(34)&amp;[Hoja1.G207]&amp; CHAR(34) &amp; &quot; },&quot;" office:value-type="string" office:string-value=" { id: 206, enunciado: &quot;&quot;, opciones: [&quot;&quot;, &quot;&quot;, &quot;&quot;, &quot;&quot;], correcta:  -1, observaciones: &quot;&quot; },">
            <text:p><text:s/>{ id: 20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8]&amp; CHAR(34) &amp; &quot;, opciones: [&quot;&amp; CHAR(34)&amp;[Hoja1.B208]&amp; CHAR(34)&amp;&quot;, &quot;&amp; CHAR(34)&amp;[Hoja1.C208]&amp; CHAR(34)&amp;&quot;, &quot;&amp; CHAR(34)&amp;[Hoja1.D208]&amp; CHAR(34)&amp;&quot;, &quot;&amp; CHAR(34)&amp;[Hoja1.E208]&amp; CHAR(34)&amp;&quot;], correcta:  &quot;&amp;[Hoja1.F208]-1&amp; &quot;, observaciones: &quot; &amp; CHAR(34)&amp;[Hoja1.G208]&amp; CHAR(34) &amp; &quot; },&quot;" office:value-type="string" office:string-value=" { id: 207, enunciado: &quot;&quot;, opciones: [&quot;&quot;, &quot;&quot;, &quot;&quot;, &quot;&quot;], correcta:  -1, observaciones: &quot;&quot; },">
            <text:p><text:s/>{ id: 20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09]&amp; CHAR(34) &amp; &quot;, opciones: [&quot;&amp; CHAR(34)&amp;[Hoja1.B209]&amp; CHAR(34)&amp;&quot;, &quot;&amp; CHAR(34)&amp;[Hoja1.C209]&amp; CHAR(34)&amp;&quot;, &quot;&amp; CHAR(34)&amp;[Hoja1.D209]&amp; CHAR(34)&amp;&quot;, &quot;&amp; CHAR(34)&amp;[Hoja1.E209]&amp; CHAR(34)&amp;&quot;], correcta:  &quot;&amp;[Hoja1.F209]-1&amp; &quot;, observaciones: &quot; &amp; CHAR(34)&amp;[Hoja1.G209]&amp; CHAR(34) &amp; &quot; },&quot;" office:value-type="string" office:string-value=" { id: 208, enunciado: &quot;&quot;, opciones: [&quot;&quot;, &quot;&quot;, &quot;&quot;, &quot;&quot;], correcta:  -1, observaciones: &quot;&quot; },">
            <text:p><text:s/>{ id: 20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0]&amp; CHAR(34) &amp; &quot;, opciones: [&quot;&amp; CHAR(34)&amp;[Hoja1.B210]&amp; CHAR(34)&amp;&quot;, &quot;&amp; CHAR(34)&amp;[Hoja1.C210]&amp; CHAR(34)&amp;&quot;, &quot;&amp; CHAR(34)&amp;[Hoja1.D210]&amp; CHAR(34)&amp;&quot;, &quot;&amp; CHAR(34)&amp;[Hoja1.E210]&amp; CHAR(34)&amp;&quot;], correcta:  &quot;&amp;[Hoja1.F210]-1&amp; &quot;, observaciones: &quot; &amp; CHAR(34)&amp;[Hoja1.G210]&amp; CHAR(34) &amp; &quot; },&quot;" office:value-type="string" office:string-value=" { id: 209, enunciado: &quot;&quot;, opciones: [&quot;&quot;, &quot;&quot;, &quot;&quot;, &quot;&quot;], correcta:  -1, observaciones: &quot;&quot; },">
            <text:p><text:s/>{ id: 20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1]&amp; CHAR(34) &amp; &quot;, opciones: [&quot;&amp; CHAR(34)&amp;[Hoja1.B211]&amp; CHAR(34)&amp;&quot;, &quot;&amp; CHAR(34)&amp;[Hoja1.C211]&amp; CHAR(34)&amp;&quot;, &quot;&amp; CHAR(34)&amp;[Hoja1.D211]&amp; CHAR(34)&amp;&quot;, &quot;&amp; CHAR(34)&amp;[Hoja1.E211]&amp; CHAR(34)&amp;&quot;], correcta:  &quot;&amp;[Hoja1.F211]-1&amp; &quot;, observaciones: &quot; &amp; CHAR(34)&amp;[Hoja1.G211]&amp; CHAR(34) &amp; &quot; },&quot;" office:value-type="string" office:string-value=" { id: 210, enunciado: &quot;&quot;, opciones: [&quot;&quot;, &quot;&quot;, &quot;&quot;, &quot;&quot;], correcta:  -1, observaciones: &quot;&quot; },">
            <text:p><text:s/>{ id: 21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2]&amp; CHAR(34) &amp; &quot;, opciones: [&quot;&amp; CHAR(34)&amp;[Hoja1.B212]&amp; CHAR(34)&amp;&quot;, &quot;&amp; CHAR(34)&amp;[Hoja1.C212]&amp; CHAR(34)&amp;&quot;, &quot;&amp; CHAR(34)&amp;[Hoja1.D212]&amp; CHAR(34)&amp;&quot;, &quot;&amp; CHAR(34)&amp;[Hoja1.E212]&amp; CHAR(34)&amp;&quot;], correcta:  &quot;&amp;[Hoja1.F212]-1&amp; &quot;, observaciones: &quot; &amp; CHAR(34)&amp;[Hoja1.G212]&amp; CHAR(34) &amp; &quot; },&quot;" office:value-type="string" office:string-value=" { id: 211, enunciado: &quot;&quot;, opciones: [&quot;&quot;, &quot;&quot;, &quot;&quot;, &quot;&quot;], correcta:  -1, observaciones: &quot;&quot; },">
            <text:p><text:s/>{ id: 21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3]&amp; CHAR(34) &amp; &quot;, opciones: [&quot;&amp; CHAR(34)&amp;[Hoja1.B213]&amp; CHAR(34)&amp;&quot;, &quot;&amp; CHAR(34)&amp;[Hoja1.C213]&amp; CHAR(34)&amp;&quot;, &quot;&amp; CHAR(34)&amp;[Hoja1.D213]&amp; CHAR(34)&amp;&quot;, &quot;&amp; CHAR(34)&amp;[Hoja1.E213]&amp; CHAR(34)&amp;&quot;], correcta:  &quot;&amp;[Hoja1.F213]-1&amp; &quot;, observaciones: &quot; &amp; CHAR(34)&amp;[Hoja1.G213]&amp; CHAR(34) &amp; &quot; },&quot;" office:value-type="string" office:string-value=" { id: 212, enunciado: &quot;&quot;, opciones: [&quot;&quot;, &quot;&quot;, &quot;&quot;, &quot;&quot;], correcta:  -1, observaciones: &quot;&quot; },">
            <text:p><text:s/>{ id: 21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4]&amp; CHAR(34) &amp; &quot;, opciones: [&quot;&amp; CHAR(34)&amp;[Hoja1.B214]&amp; CHAR(34)&amp;&quot;, &quot;&amp; CHAR(34)&amp;[Hoja1.C214]&amp; CHAR(34)&amp;&quot;, &quot;&amp; CHAR(34)&amp;[Hoja1.D214]&amp; CHAR(34)&amp;&quot;, &quot;&amp; CHAR(34)&amp;[Hoja1.E214]&amp; CHAR(34)&amp;&quot;], correcta:  &quot;&amp;[Hoja1.F214]-1&amp; &quot;, observaciones: &quot; &amp; CHAR(34)&amp;[Hoja1.G214]&amp; CHAR(34) &amp; &quot; },&quot;" office:value-type="string" office:string-value=" { id: 213, enunciado: &quot;&quot;, opciones: [&quot;&quot;, &quot;&quot;, &quot;&quot;, &quot;&quot;], correcta:  -1, observaciones: &quot;&quot; },">
            <text:p><text:s/>{ id: 21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5]&amp; CHAR(34) &amp; &quot;, opciones: [&quot;&amp; CHAR(34)&amp;[Hoja1.B215]&amp; CHAR(34)&amp;&quot;, &quot;&amp; CHAR(34)&amp;[Hoja1.C215]&amp; CHAR(34)&amp;&quot;, &quot;&amp; CHAR(34)&amp;[Hoja1.D215]&amp; CHAR(34)&amp;&quot;, &quot;&amp; CHAR(34)&amp;[Hoja1.E215]&amp; CHAR(34)&amp;&quot;], correcta:  &quot;&amp;[Hoja1.F215]-1&amp; &quot;, observaciones: &quot; &amp; CHAR(34)&amp;[Hoja1.G215]&amp; CHAR(34) &amp; &quot; },&quot;" office:value-type="string" office:string-value=" { id: 214, enunciado: &quot;&quot;, opciones: [&quot;&quot;, &quot;&quot;, &quot;&quot;, &quot;&quot;], correcta:  -1, observaciones: &quot;&quot; },">
            <text:p><text:s/>{ id: 21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6]&amp; CHAR(34) &amp; &quot;, opciones: [&quot;&amp; CHAR(34)&amp;[Hoja1.B216]&amp; CHAR(34)&amp;&quot;, &quot;&amp; CHAR(34)&amp;[Hoja1.C216]&amp; CHAR(34)&amp;&quot;, &quot;&amp; CHAR(34)&amp;[Hoja1.D216]&amp; CHAR(34)&amp;&quot;, &quot;&amp; CHAR(34)&amp;[Hoja1.E216]&amp; CHAR(34)&amp;&quot;], correcta:  &quot;&amp;[Hoja1.F216]-1&amp; &quot;, observaciones: &quot; &amp; CHAR(34)&amp;[Hoja1.G216]&amp; CHAR(34) &amp; &quot; },&quot;" office:value-type="string" office:string-value=" { id: 215, enunciado: &quot;&quot;, opciones: [&quot;&quot;, &quot;&quot;, &quot;&quot;, &quot;&quot;], correcta:  -1, observaciones: &quot;&quot; },">
            <text:p><text:s/>{ id: 21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7]&amp; CHAR(34) &amp; &quot;, opciones: [&quot;&amp; CHAR(34)&amp;[Hoja1.B217]&amp; CHAR(34)&amp;&quot;, &quot;&amp; CHAR(34)&amp;[Hoja1.C217]&amp; CHAR(34)&amp;&quot;, &quot;&amp; CHAR(34)&amp;[Hoja1.D217]&amp; CHAR(34)&amp;&quot;, &quot;&amp; CHAR(34)&amp;[Hoja1.E217]&amp; CHAR(34)&amp;&quot;], correcta:  &quot;&amp;[Hoja1.F217]-1&amp; &quot;, observaciones: &quot; &amp; CHAR(34)&amp;[Hoja1.G217]&amp; CHAR(34) &amp; &quot; },&quot;" office:value-type="string" office:string-value=" { id: 216, enunciado: &quot;&quot;, opciones: [&quot;&quot;, &quot;&quot;, &quot;&quot;, &quot;&quot;], correcta:  -1, observaciones: &quot;&quot; },">
            <text:p><text:s/>{ id: 21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8]&amp; CHAR(34) &amp; &quot;, opciones: [&quot;&amp; CHAR(34)&amp;[Hoja1.B218]&amp; CHAR(34)&amp;&quot;, &quot;&amp; CHAR(34)&amp;[Hoja1.C218]&amp; CHAR(34)&amp;&quot;, &quot;&amp; CHAR(34)&amp;[Hoja1.D218]&amp; CHAR(34)&amp;&quot;, &quot;&amp; CHAR(34)&amp;[Hoja1.E218]&amp; CHAR(34)&amp;&quot;], correcta:  &quot;&amp;[Hoja1.F218]-1&amp; &quot;, observaciones: &quot; &amp; CHAR(34)&amp;[Hoja1.G218]&amp; CHAR(34) &amp; &quot; },&quot;" office:value-type="string" office:string-value=" { id: 217, enunciado: &quot;&quot;, opciones: [&quot;&quot;, &quot;&quot;, &quot;&quot;, &quot;&quot;], correcta:  -1, observaciones: &quot;&quot; },">
            <text:p><text:s/>{ id: 21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19]&amp; CHAR(34) &amp; &quot;, opciones: [&quot;&amp; CHAR(34)&amp;[Hoja1.B219]&amp; CHAR(34)&amp;&quot;, &quot;&amp; CHAR(34)&amp;[Hoja1.C219]&amp; CHAR(34)&amp;&quot;, &quot;&amp; CHAR(34)&amp;[Hoja1.D219]&amp; CHAR(34)&amp;&quot;, &quot;&amp; CHAR(34)&amp;[Hoja1.E219]&amp; CHAR(34)&amp;&quot;], correcta:  &quot;&amp;[Hoja1.F219]-1&amp; &quot;, observaciones: &quot; &amp; CHAR(34)&amp;[Hoja1.G219]&amp; CHAR(34) &amp; &quot; },&quot;" office:value-type="string" office:string-value=" { id: 218, enunciado: &quot;&quot;, opciones: [&quot;&quot;, &quot;&quot;, &quot;&quot;, &quot;&quot;], correcta:  -1, observaciones: &quot;&quot; },">
            <text:p><text:s/>{ id: 21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0]&amp; CHAR(34) &amp; &quot;, opciones: [&quot;&amp; CHAR(34)&amp;[Hoja1.B220]&amp; CHAR(34)&amp;&quot;, &quot;&amp; CHAR(34)&amp;[Hoja1.C220]&amp; CHAR(34)&amp;&quot;, &quot;&amp; CHAR(34)&amp;[Hoja1.D220]&amp; CHAR(34)&amp;&quot;, &quot;&amp; CHAR(34)&amp;[Hoja1.E220]&amp; CHAR(34)&amp;&quot;], correcta:  &quot;&amp;[Hoja1.F220]-1&amp; &quot;, observaciones: &quot; &amp; CHAR(34)&amp;[Hoja1.G220]&amp; CHAR(34) &amp; &quot; },&quot;" office:value-type="string" office:string-value=" { id: 219, enunciado: &quot;&quot;, opciones: [&quot;&quot;, &quot;&quot;, &quot;&quot;, &quot;&quot;], correcta:  -1, observaciones: &quot;&quot; },">
            <text:p><text:s/>{ id: 21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1]&amp; CHAR(34) &amp; &quot;, opciones: [&quot;&amp; CHAR(34)&amp;[Hoja1.B221]&amp; CHAR(34)&amp;&quot;, &quot;&amp; CHAR(34)&amp;[Hoja1.C221]&amp; CHAR(34)&amp;&quot;, &quot;&amp; CHAR(34)&amp;[Hoja1.D221]&amp; CHAR(34)&amp;&quot;, &quot;&amp; CHAR(34)&amp;[Hoja1.E221]&amp; CHAR(34)&amp;&quot;], correcta:  &quot;&amp;[Hoja1.F221]-1&amp; &quot;, observaciones: &quot; &amp; CHAR(34)&amp;[Hoja1.G221]&amp; CHAR(34) &amp; &quot; },&quot;" office:value-type="string" office:string-value=" { id: 220, enunciado: &quot;&quot;, opciones: [&quot;&quot;, &quot;&quot;, &quot;&quot;, &quot;&quot;], correcta:  -1, observaciones: &quot;&quot; },">
            <text:p><text:s/>{ id: 22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2]&amp; CHAR(34) &amp; &quot;, opciones: [&quot;&amp; CHAR(34)&amp;[Hoja1.B222]&amp; CHAR(34)&amp;&quot;, &quot;&amp; CHAR(34)&amp;[Hoja1.C222]&amp; CHAR(34)&amp;&quot;, &quot;&amp; CHAR(34)&amp;[Hoja1.D222]&amp; CHAR(34)&amp;&quot;, &quot;&amp; CHAR(34)&amp;[Hoja1.E222]&amp; CHAR(34)&amp;&quot;], correcta:  &quot;&amp;[Hoja1.F222]-1&amp; &quot;, observaciones: &quot; &amp; CHAR(34)&amp;[Hoja1.G222]&amp; CHAR(34) &amp; &quot; },&quot;" office:value-type="string" office:string-value=" { id: 221, enunciado: &quot;&quot;, opciones: [&quot;&quot;, &quot;&quot;, &quot;&quot;, &quot;&quot;], correcta:  -1, observaciones: &quot;&quot; },">
            <text:p><text:s/>{ id: 22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3]&amp; CHAR(34) &amp; &quot;, opciones: [&quot;&amp; CHAR(34)&amp;[Hoja1.B223]&amp; CHAR(34)&amp;&quot;, &quot;&amp; CHAR(34)&amp;[Hoja1.C223]&amp; CHAR(34)&amp;&quot;, &quot;&amp; CHAR(34)&amp;[Hoja1.D223]&amp; CHAR(34)&amp;&quot;, &quot;&amp; CHAR(34)&amp;[Hoja1.E223]&amp; CHAR(34)&amp;&quot;], correcta:  &quot;&amp;[Hoja1.F223]-1&amp; &quot;, observaciones: &quot; &amp; CHAR(34)&amp;[Hoja1.G223]&amp; CHAR(34) &amp; &quot; },&quot;" office:value-type="string" office:string-value=" { id: 222, enunciado: &quot;&quot;, opciones: [&quot;&quot;, &quot;&quot;, &quot;&quot;, &quot;&quot;], correcta:  -1, observaciones: &quot;&quot; },">
            <text:p><text:s/>{ id: 22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4]&amp; CHAR(34) &amp; &quot;, opciones: [&quot;&amp; CHAR(34)&amp;[Hoja1.B224]&amp; CHAR(34)&amp;&quot;, &quot;&amp; CHAR(34)&amp;[Hoja1.C224]&amp; CHAR(34)&amp;&quot;, &quot;&amp; CHAR(34)&amp;[Hoja1.D224]&amp; CHAR(34)&amp;&quot;, &quot;&amp; CHAR(34)&amp;[Hoja1.E224]&amp; CHAR(34)&amp;&quot;], correcta:  &quot;&amp;[Hoja1.F224]-1&amp; &quot;, observaciones: &quot; &amp; CHAR(34)&amp;[Hoja1.G224]&amp; CHAR(34) &amp; &quot; },&quot;" office:value-type="string" office:string-value=" { id: 223, enunciado: &quot;&quot;, opciones: [&quot;&quot;, &quot;&quot;, &quot;&quot;, &quot;&quot;], correcta:  -1, observaciones: &quot;&quot; },">
            <text:p><text:s/>{ id: 22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5]&amp; CHAR(34) &amp; &quot;, opciones: [&quot;&amp; CHAR(34)&amp;[Hoja1.B225]&amp; CHAR(34)&amp;&quot;, &quot;&amp; CHAR(34)&amp;[Hoja1.C225]&amp; CHAR(34)&amp;&quot;, &quot;&amp; CHAR(34)&amp;[Hoja1.D225]&amp; CHAR(34)&amp;&quot;, &quot;&amp; CHAR(34)&amp;[Hoja1.E225]&amp; CHAR(34)&amp;&quot;], correcta:  &quot;&amp;[Hoja1.F225]-1&amp; &quot;, observaciones: &quot; &amp; CHAR(34)&amp;[Hoja1.G225]&amp; CHAR(34) &amp; &quot; },&quot;" office:value-type="string" office:string-value=" { id: 224, enunciado: &quot;&quot;, opciones: [&quot;&quot;, &quot;&quot;, &quot;&quot;, &quot;&quot;], correcta:  -1, observaciones: &quot;&quot; },">
            <text:p><text:s/>{ id: 22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6]&amp; CHAR(34) &amp; &quot;, opciones: [&quot;&amp; CHAR(34)&amp;[Hoja1.B226]&amp; CHAR(34)&amp;&quot;, &quot;&amp; CHAR(34)&amp;[Hoja1.C226]&amp; CHAR(34)&amp;&quot;, &quot;&amp; CHAR(34)&amp;[Hoja1.D226]&amp; CHAR(34)&amp;&quot;, &quot;&amp; CHAR(34)&amp;[Hoja1.E226]&amp; CHAR(34)&amp;&quot;], correcta:  &quot;&amp;[Hoja1.F226]-1&amp; &quot;, observaciones: &quot; &amp; CHAR(34)&amp;[Hoja1.G226]&amp; CHAR(34) &amp; &quot; },&quot;" office:value-type="string" office:string-value=" { id: 225, enunciado: &quot;&quot;, opciones: [&quot;&quot;, &quot;&quot;, &quot;&quot;, &quot;&quot;], correcta:  -1, observaciones: &quot;&quot; },">
            <text:p><text:s/>{ id: 22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7]&amp; CHAR(34) &amp; &quot;, opciones: [&quot;&amp; CHAR(34)&amp;[Hoja1.B227]&amp; CHAR(34)&amp;&quot;, &quot;&amp; CHAR(34)&amp;[Hoja1.C227]&amp; CHAR(34)&amp;&quot;, &quot;&amp; CHAR(34)&amp;[Hoja1.D227]&amp; CHAR(34)&amp;&quot;, &quot;&amp; CHAR(34)&amp;[Hoja1.E227]&amp; CHAR(34)&amp;&quot;], correcta:  &quot;&amp;[Hoja1.F227]-1&amp; &quot;, observaciones: &quot; &amp; CHAR(34)&amp;[Hoja1.G227]&amp; CHAR(34) &amp; &quot; },&quot;" office:value-type="string" office:string-value=" { id: 226, enunciado: &quot;&quot;, opciones: [&quot;&quot;, &quot;&quot;, &quot;&quot;, &quot;&quot;], correcta:  -1, observaciones: &quot;&quot; },">
            <text:p><text:s/>{ id: 22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8]&amp; CHAR(34) &amp; &quot;, opciones: [&quot;&amp; CHAR(34)&amp;[Hoja1.B228]&amp; CHAR(34)&amp;&quot;, &quot;&amp; CHAR(34)&amp;[Hoja1.C228]&amp; CHAR(34)&amp;&quot;, &quot;&amp; CHAR(34)&amp;[Hoja1.D228]&amp; CHAR(34)&amp;&quot;, &quot;&amp; CHAR(34)&amp;[Hoja1.E228]&amp; CHAR(34)&amp;&quot;], correcta:  &quot;&amp;[Hoja1.F228]-1&amp; &quot;, observaciones: &quot; &amp; CHAR(34)&amp;[Hoja1.G228]&amp; CHAR(34) &amp; &quot; },&quot;" office:value-type="string" office:string-value=" { id: 227, enunciado: &quot;&quot;, opciones: [&quot;&quot;, &quot;&quot;, &quot;&quot;, &quot;&quot;], correcta:  -1, observaciones: &quot;&quot; },">
            <text:p><text:s/>{ id: 22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29]&amp; CHAR(34) &amp; &quot;, opciones: [&quot;&amp; CHAR(34)&amp;[Hoja1.B229]&amp; CHAR(34)&amp;&quot;, &quot;&amp; CHAR(34)&amp;[Hoja1.C229]&amp; CHAR(34)&amp;&quot;, &quot;&amp; CHAR(34)&amp;[Hoja1.D229]&amp; CHAR(34)&amp;&quot;, &quot;&amp; CHAR(34)&amp;[Hoja1.E229]&amp; CHAR(34)&amp;&quot;], correcta:  &quot;&amp;[Hoja1.F229]-1&amp; &quot;, observaciones: &quot; &amp; CHAR(34)&amp;[Hoja1.G229]&amp; CHAR(34) &amp; &quot; },&quot;" office:value-type="string" office:string-value=" { id: 228, enunciado: &quot;&quot;, opciones: [&quot;&quot;, &quot;&quot;, &quot;&quot;, &quot;&quot;], correcta:  -1, observaciones: &quot;&quot; },">
            <text:p><text:s/>{ id: 22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0]&amp; CHAR(34) &amp; &quot;, opciones: [&quot;&amp; CHAR(34)&amp;[Hoja1.B230]&amp; CHAR(34)&amp;&quot;, &quot;&amp; CHAR(34)&amp;[Hoja1.C230]&amp; CHAR(34)&amp;&quot;, &quot;&amp; CHAR(34)&amp;[Hoja1.D230]&amp; CHAR(34)&amp;&quot;, &quot;&amp; CHAR(34)&amp;[Hoja1.E230]&amp; CHAR(34)&amp;&quot;], correcta:  &quot;&amp;[Hoja1.F230]-1&amp; &quot;, observaciones: &quot; &amp; CHAR(34)&amp;[Hoja1.G230]&amp; CHAR(34) &amp; &quot; },&quot;" office:value-type="string" office:string-value=" { id: 229, enunciado: &quot;&quot;, opciones: [&quot;&quot;, &quot;&quot;, &quot;&quot;, &quot;&quot;], correcta:  -1, observaciones: &quot;&quot; },">
            <text:p><text:s/>{ id: 22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1]&amp; CHAR(34) &amp; &quot;, opciones: [&quot;&amp; CHAR(34)&amp;[Hoja1.B231]&amp; CHAR(34)&amp;&quot;, &quot;&amp; CHAR(34)&amp;[Hoja1.C231]&amp; CHAR(34)&amp;&quot;, &quot;&amp; CHAR(34)&amp;[Hoja1.D231]&amp; CHAR(34)&amp;&quot;, &quot;&amp; CHAR(34)&amp;[Hoja1.E231]&amp; CHAR(34)&amp;&quot;], correcta:  &quot;&amp;[Hoja1.F231]-1&amp; &quot;, observaciones: &quot; &amp; CHAR(34)&amp;[Hoja1.G231]&amp; CHAR(34) &amp; &quot; },&quot;" office:value-type="string" office:string-value=" { id: 230, enunciado: &quot;&quot;, opciones: [&quot;&quot;, &quot;&quot;, &quot;&quot;, &quot;&quot;], correcta:  -1, observaciones: &quot;&quot; },">
            <text:p><text:s/>{ id: 23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2]&amp; CHAR(34) &amp; &quot;, opciones: [&quot;&amp; CHAR(34)&amp;[Hoja1.B232]&amp; CHAR(34)&amp;&quot;, &quot;&amp; CHAR(34)&amp;[Hoja1.C232]&amp; CHAR(34)&amp;&quot;, &quot;&amp; CHAR(34)&amp;[Hoja1.D232]&amp; CHAR(34)&amp;&quot;, &quot;&amp; CHAR(34)&amp;[Hoja1.E232]&amp; CHAR(34)&amp;&quot;], correcta:  &quot;&amp;[Hoja1.F232]-1&amp; &quot;, observaciones: &quot; &amp; CHAR(34)&amp;[Hoja1.G232]&amp; CHAR(34) &amp; &quot; },&quot;" office:value-type="string" office:string-value=" { id: 231, enunciado: &quot;&quot;, opciones: [&quot;&quot;, &quot;&quot;, &quot;&quot;, &quot;&quot;], correcta:  -1, observaciones: &quot;&quot; },">
            <text:p><text:s/>{ id: 23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3]&amp; CHAR(34) &amp; &quot;, opciones: [&quot;&amp; CHAR(34)&amp;[Hoja1.B233]&amp; CHAR(34)&amp;&quot;, &quot;&amp; CHAR(34)&amp;[Hoja1.C233]&amp; CHAR(34)&amp;&quot;, &quot;&amp; CHAR(34)&amp;[Hoja1.D233]&amp; CHAR(34)&amp;&quot;, &quot;&amp; CHAR(34)&amp;[Hoja1.E233]&amp; CHAR(34)&amp;&quot;], correcta:  &quot;&amp;[Hoja1.F233]-1&amp; &quot;, observaciones: &quot; &amp; CHAR(34)&amp;[Hoja1.G233]&amp; CHAR(34) &amp; &quot; },&quot;" office:value-type="string" office:string-value=" { id: 232, enunciado: &quot;&quot;, opciones: [&quot;&quot;, &quot;&quot;, &quot;&quot;, &quot;&quot;], correcta:  -1, observaciones: &quot;&quot; },">
            <text:p><text:s/>{ id: 23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4]&amp; CHAR(34) &amp; &quot;, opciones: [&quot;&amp; CHAR(34)&amp;[Hoja1.B234]&amp; CHAR(34)&amp;&quot;, &quot;&amp; CHAR(34)&amp;[Hoja1.C234]&amp; CHAR(34)&amp;&quot;, &quot;&amp; CHAR(34)&amp;[Hoja1.D234]&amp; CHAR(34)&amp;&quot;, &quot;&amp; CHAR(34)&amp;[Hoja1.E234]&amp; CHAR(34)&amp;&quot;], correcta:  &quot;&amp;[Hoja1.F234]-1&amp; &quot;, observaciones: &quot; &amp; CHAR(34)&amp;[Hoja1.G234]&amp; CHAR(34) &amp; &quot; },&quot;" office:value-type="string" office:string-value=" { id: 233, enunciado: &quot;&quot;, opciones: [&quot;&quot;, &quot;&quot;, &quot;&quot;, &quot;&quot;], correcta:  -1, observaciones: &quot;&quot; },">
            <text:p><text:s/>{ id: 23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5]&amp; CHAR(34) &amp; &quot;, opciones: [&quot;&amp; CHAR(34)&amp;[Hoja1.B235]&amp; CHAR(34)&amp;&quot;, &quot;&amp; CHAR(34)&amp;[Hoja1.C235]&amp; CHAR(34)&amp;&quot;, &quot;&amp; CHAR(34)&amp;[Hoja1.D235]&amp; CHAR(34)&amp;&quot;, &quot;&amp; CHAR(34)&amp;[Hoja1.E235]&amp; CHAR(34)&amp;&quot;], correcta:  &quot;&amp;[Hoja1.F235]-1&amp; &quot;, observaciones: &quot; &amp; CHAR(34)&amp;[Hoja1.G235]&amp; CHAR(34) &amp; &quot; },&quot;" office:value-type="string" office:string-value=" { id: 234, enunciado: &quot;&quot;, opciones: [&quot;&quot;, &quot;&quot;, &quot;&quot;, &quot;&quot;], correcta:  -1, observaciones: &quot;&quot; },">
            <text:p><text:s/>{ id: 23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6]&amp; CHAR(34) &amp; &quot;, opciones: [&quot;&amp; CHAR(34)&amp;[Hoja1.B236]&amp; CHAR(34)&amp;&quot;, &quot;&amp; CHAR(34)&amp;[Hoja1.C236]&amp; CHAR(34)&amp;&quot;, &quot;&amp; CHAR(34)&amp;[Hoja1.D236]&amp; CHAR(34)&amp;&quot;, &quot;&amp; CHAR(34)&amp;[Hoja1.E236]&amp; CHAR(34)&amp;&quot;], correcta:  &quot;&amp;[Hoja1.F236]-1&amp; &quot;, observaciones: &quot; &amp; CHAR(34)&amp;[Hoja1.G236]&amp; CHAR(34) &amp; &quot; },&quot;" office:value-type="string" office:string-value=" { id: 235, enunciado: &quot;&quot;, opciones: [&quot;&quot;, &quot;&quot;, &quot;&quot;, &quot;&quot;], correcta:  -1, observaciones: &quot;&quot; },">
            <text:p><text:s/>{ id: 23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7]&amp; CHAR(34) &amp; &quot;, opciones: [&quot;&amp; CHAR(34)&amp;[Hoja1.B237]&amp; CHAR(34)&amp;&quot;, &quot;&amp; CHAR(34)&amp;[Hoja1.C237]&amp; CHAR(34)&amp;&quot;, &quot;&amp; CHAR(34)&amp;[Hoja1.D237]&amp; CHAR(34)&amp;&quot;, &quot;&amp; CHAR(34)&amp;[Hoja1.E237]&amp; CHAR(34)&amp;&quot;], correcta:  &quot;&amp;[Hoja1.F237]-1&amp; &quot;, observaciones: &quot; &amp; CHAR(34)&amp;[Hoja1.G237]&amp; CHAR(34) &amp; &quot; },&quot;" office:value-type="string" office:string-value=" { id: 236, enunciado: &quot;&quot;, opciones: [&quot;&quot;, &quot;&quot;, &quot;&quot;, &quot;&quot;], correcta:  -1, observaciones: &quot;&quot; },">
            <text:p><text:s/>{ id: 23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8]&amp; CHAR(34) &amp; &quot;, opciones: [&quot;&amp; CHAR(34)&amp;[Hoja1.B238]&amp; CHAR(34)&amp;&quot;, &quot;&amp; CHAR(34)&amp;[Hoja1.C238]&amp; CHAR(34)&amp;&quot;, &quot;&amp; CHAR(34)&amp;[Hoja1.D238]&amp; CHAR(34)&amp;&quot;, &quot;&amp; CHAR(34)&amp;[Hoja1.E238]&amp; CHAR(34)&amp;&quot;], correcta:  &quot;&amp;[Hoja1.F238]-1&amp; &quot;, observaciones: &quot; &amp; CHAR(34)&amp;[Hoja1.G238]&amp; CHAR(34) &amp; &quot; },&quot;" office:value-type="string" office:string-value=" { id: 237, enunciado: &quot;&quot;, opciones: [&quot;&quot;, &quot;&quot;, &quot;&quot;, &quot;&quot;], correcta:  -1, observaciones: &quot;&quot; },">
            <text:p><text:s/>{ id: 23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39]&amp; CHAR(34) &amp; &quot;, opciones: [&quot;&amp; CHAR(34)&amp;[Hoja1.B239]&amp; CHAR(34)&amp;&quot;, &quot;&amp; CHAR(34)&amp;[Hoja1.C239]&amp; CHAR(34)&amp;&quot;, &quot;&amp; CHAR(34)&amp;[Hoja1.D239]&amp; CHAR(34)&amp;&quot;, &quot;&amp; CHAR(34)&amp;[Hoja1.E239]&amp; CHAR(34)&amp;&quot;], correcta:  &quot;&amp;[Hoja1.F239]-1&amp; &quot;, observaciones: &quot; &amp; CHAR(34)&amp;[Hoja1.G239]&amp; CHAR(34) &amp; &quot; },&quot;" office:value-type="string" office:string-value=" { id: 238, enunciado: &quot;&quot;, opciones: [&quot;&quot;, &quot;&quot;, &quot;&quot;, &quot;&quot;], correcta:  -1, observaciones: &quot;&quot; },">
            <text:p><text:s/>{ id: 23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0]&amp; CHAR(34) &amp; &quot;, opciones: [&quot;&amp; CHAR(34)&amp;[Hoja1.B240]&amp; CHAR(34)&amp;&quot;, &quot;&amp; CHAR(34)&amp;[Hoja1.C240]&amp; CHAR(34)&amp;&quot;, &quot;&amp; CHAR(34)&amp;[Hoja1.D240]&amp; CHAR(34)&amp;&quot;, &quot;&amp; CHAR(34)&amp;[Hoja1.E240]&amp; CHAR(34)&amp;&quot;], correcta:  &quot;&amp;[Hoja1.F240]-1&amp; &quot;, observaciones: &quot; &amp; CHAR(34)&amp;[Hoja1.G240]&amp; CHAR(34) &amp; &quot; },&quot;" office:value-type="string" office:string-value=" { id: 239, enunciado: &quot;&quot;, opciones: [&quot;&quot;, &quot;&quot;, &quot;&quot;, &quot;&quot;], correcta:  -1, observaciones: &quot;&quot; },">
            <text:p><text:s/>{ id: 23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1]&amp; CHAR(34) &amp; &quot;, opciones: [&quot;&amp; CHAR(34)&amp;[Hoja1.B241]&amp; CHAR(34)&amp;&quot;, &quot;&amp; CHAR(34)&amp;[Hoja1.C241]&amp; CHAR(34)&amp;&quot;, &quot;&amp; CHAR(34)&amp;[Hoja1.D241]&amp; CHAR(34)&amp;&quot;, &quot;&amp; CHAR(34)&amp;[Hoja1.E241]&amp; CHAR(34)&amp;&quot;], correcta:  &quot;&amp;[Hoja1.F241]-1&amp; &quot;, observaciones: &quot; &amp; CHAR(34)&amp;[Hoja1.G241]&amp; CHAR(34) &amp; &quot; },&quot;" office:value-type="string" office:string-value=" { id: 240, enunciado: &quot;&quot;, opciones: [&quot;&quot;, &quot;&quot;, &quot;&quot;, &quot;&quot;], correcta:  -1, observaciones: &quot;&quot; },">
            <text:p><text:s/>{ id: 24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2]&amp; CHAR(34) &amp; &quot;, opciones: [&quot;&amp; CHAR(34)&amp;[Hoja1.B242]&amp; CHAR(34)&amp;&quot;, &quot;&amp; CHAR(34)&amp;[Hoja1.C242]&amp; CHAR(34)&amp;&quot;, &quot;&amp; CHAR(34)&amp;[Hoja1.D242]&amp; CHAR(34)&amp;&quot;, &quot;&amp; CHAR(34)&amp;[Hoja1.E242]&amp; CHAR(34)&amp;&quot;], correcta:  &quot;&amp;[Hoja1.F242]-1&amp; &quot;, observaciones: &quot; &amp; CHAR(34)&amp;[Hoja1.G242]&amp; CHAR(34) &amp; &quot; },&quot;" office:value-type="string" office:string-value=" { id: 241, enunciado: &quot;&quot;, opciones: [&quot;&quot;, &quot;&quot;, &quot;&quot;, &quot;&quot;], correcta:  -1, observaciones: &quot;&quot; },">
            <text:p><text:s/>{ id: 24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3]&amp; CHAR(34) &amp; &quot;, opciones: [&quot;&amp; CHAR(34)&amp;[Hoja1.B243]&amp; CHAR(34)&amp;&quot;, &quot;&amp; CHAR(34)&amp;[Hoja1.C243]&amp; CHAR(34)&amp;&quot;, &quot;&amp; CHAR(34)&amp;[Hoja1.D243]&amp; CHAR(34)&amp;&quot;, &quot;&amp; CHAR(34)&amp;[Hoja1.E243]&amp; CHAR(34)&amp;&quot;], correcta:  &quot;&amp;[Hoja1.F243]-1&amp; &quot;, observaciones: &quot; &amp; CHAR(34)&amp;[Hoja1.G243]&amp; CHAR(34) &amp; &quot; },&quot;" office:value-type="string" office:string-value=" { id: 242, enunciado: &quot;&quot;, opciones: [&quot;&quot;, &quot;&quot;, &quot;&quot;, &quot;&quot;], correcta:  -1, observaciones: &quot;&quot; },">
            <text:p><text:s/>{ id: 24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4]&amp; CHAR(34) &amp; &quot;, opciones: [&quot;&amp; CHAR(34)&amp;[Hoja1.B244]&amp; CHAR(34)&amp;&quot;, &quot;&amp; CHAR(34)&amp;[Hoja1.C244]&amp; CHAR(34)&amp;&quot;, &quot;&amp; CHAR(34)&amp;[Hoja1.D244]&amp; CHAR(34)&amp;&quot;, &quot;&amp; CHAR(34)&amp;[Hoja1.E244]&amp; CHAR(34)&amp;&quot;], correcta:  &quot;&amp;[Hoja1.F244]-1&amp; &quot;, observaciones: &quot; &amp; CHAR(34)&amp;[Hoja1.G244]&amp; CHAR(34) &amp; &quot; },&quot;" office:value-type="string" office:string-value=" { id: 243, enunciado: &quot;&quot;, opciones: [&quot;&quot;, &quot;&quot;, &quot;&quot;, &quot;&quot;], correcta:  -1, observaciones: &quot;&quot; },">
            <text:p><text:s/>{ id: 24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5]&amp; CHAR(34) &amp; &quot;, opciones: [&quot;&amp; CHAR(34)&amp;[Hoja1.B245]&amp; CHAR(34)&amp;&quot;, &quot;&amp; CHAR(34)&amp;[Hoja1.C245]&amp; CHAR(34)&amp;&quot;, &quot;&amp; CHAR(34)&amp;[Hoja1.D245]&amp; CHAR(34)&amp;&quot;, &quot;&amp; CHAR(34)&amp;[Hoja1.E245]&amp; CHAR(34)&amp;&quot;], correcta:  &quot;&amp;[Hoja1.F245]-1&amp; &quot;, observaciones: &quot; &amp; CHAR(34)&amp;[Hoja1.G245]&amp; CHAR(34) &amp; &quot; },&quot;" office:value-type="string" office:string-value=" { id: 244, enunciado: &quot;&quot;, opciones: [&quot;&quot;, &quot;&quot;, &quot;&quot;, &quot;&quot;], correcta:  -1, observaciones: &quot;&quot; },">
            <text:p><text:s/>{ id: 24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6]&amp; CHAR(34) &amp; &quot;, opciones: [&quot;&amp; CHAR(34)&amp;[Hoja1.B246]&amp; CHAR(34)&amp;&quot;, &quot;&amp; CHAR(34)&amp;[Hoja1.C246]&amp; CHAR(34)&amp;&quot;, &quot;&amp; CHAR(34)&amp;[Hoja1.D246]&amp; CHAR(34)&amp;&quot;, &quot;&amp; CHAR(34)&amp;[Hoja1.E246]&amp; CHAR(34)&amp;&quot;], correcta:  &quot;&amp;[Hoja1.F246]-1&amp; &quot;, observaciones: &quot; &amp; CHAR(34)&amp;[Hoja1.G246]&amp; CHAR(34) &amp; &quot; },&quot;" office:value-type="string" office:string-value=" { id: 245, enunciado: &quot;&quot;, opciones: [&quot;&quot;, &quot;&quot;, &quot;&quot;, &quot;&quot;], correcta:  -1, observaciones: &quot;&quot; },">
            <text:p><text:s/>{ id: 24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7]&amp; CHAR(34) &amp; &quot;, opciones: [&quot;&amp; CHAR(34)&amp;[Hoja1.B247]&amp; CHAR(34)&amp;&quot;, &quot;&amp; CHAR(34)&amp;[Hoja1.C247]&amp; CHAR(34)&amp;&quot;, &quot;&amp; CHAR(34)&amp;[Hoja1.D247]&amp; CHAR(34)&amp;&quot;, &quot;&amp; CHAR(34)&amp;[Hoja1.E247]&amp; CHAR(34)&amp;&quot;], correcta:  &quot;&amp;[Hoja1.F247]-1&amp; &quot;, observaciones: &quot; &amp; CHAR(34)&amp;[Hoja1.G247]&amp; CHAR(34) &amp; &quot; },&quot;" office:value-type="string" office:string-value=" { id: 246, enunciado: &quot;&quot;, opciones: [&quot;&quot;, &quot;&quot;, &quot;&quot;, &quot;&quot;], correcta:  -1, observaciones: &quot;&quot; },">
            <text:p><text:s/>{ id: 24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8]&amp; CHAR(34) &amp; &quot;, opciones: [&quot;&amp; CHAR(34)&amp;[Hoja1.B248]&amp; CHAR(34)&amp;&quot;, &quot;&amp; CHAR(34)&amp;[Hoja1.C248]&amp; CHAR(34)&amp;&quot;, &quot;&amp; CHAR(34)&amp;[Hoja1.D248]&amp; CHAR(34)&amp;&quot;, &quot;&amp; CHAR(34)&amp;[Hoja1.E248]&amp; CHAR(34)&amp;&quot;], correcta:  &quot;&amp;[Hoja1.F248]-1&amp; &quot;, observaciones: &quot; &amp; CHAR(34)&amp;[Hoja1.G248]&amp; CHAR(34) &amp; &quot; },&quot;" office:value-type="string" office:string-value=" { id: 247, enunciado: &quot;&quot;, opciones: [&quot;&quot;, &quot;&quot;, &quot;&quot;, &quot;&quot;], correcta:  -1, observaciones: &quot;&quot; },">
            <text:p><text:s/>{ id: 24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49]&amp; CHAR(34) &amp; &quot;, opciones: [&quot;&amp; CHAR(34)&amp;[Hoja1.B249]&amp; CHAR(34)&amp;&quot;, &quot;&amp; CHAR(34)&amp;[Hoja1.C249]&amp; CHAR(34)&amp;&quot;, &quot;&amp; CHAR(34)&amp;[Hoja1.D249]&amp; CHAR(34)&amp;&quot;, &quot;&amp; CHAR(34)&amp;[Hoja1.E249]&amp; CHAR(34)&amp;&quot;], correcta:  &quot;&amp;[Hoja1.F249]-1&amp; &quot;, observaciones: &quot; &amp; CHAR(34)&amp;[Hoja1.G249]&amp; CHAR(34) &amp; &quot; },&quot;" office:value-type="string" office:string-value=" { id: 248, enunciado: &quot;&quot;, opciones: [&quot;&quot;, &quot;&quot;, &quot;&quot;, &quot;&quot;], correcta:  -1, observaciones: &quot;&quot; },">
            <text:p><text:s/>{ id: 24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0]&amp; CHAR(34) &amp; &quot;, opciones: [&quot;&amp; CHAR(34)&amp;[Hoja1.B250]&amp; CHAR(34)&amp;&quot;, &quot;&amp; CHAR(34)&amp;[Hoja1.C250]&amp; CHAR(34)&amp;&quot;, &quot;&amp; CHAR(34)&amp;[Hoja1.D250]&amp; CHAR(34)&amp;&quot;, &quot;&amp; CHAR(34)&amp;[Hoja1.E250]&amp; CHAR(34)&amp;&quot;], correcta:  &quot;&amp;[Hoja1.F250]-1&amp; &quot;, observaciones: &quot; &amp; CHAR(34)&amp;[Hoja1.G250]&amp; CHAR(34) &amp; &quot; },&quot;" office:value-type="string" office:string-value=" { id: 249, enunciado: &quot;&quot;, opciones: [&quot;&quot;, &quot;&quot;, &quot;&quot;, &quot;&quot;], correcta:  -1, observaciones: &quot;&quot; },">
            <text:p><text:s/>{ id: 24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1]&amp; CHAR(34) &amp; &quot;, opciones: [&quot;&amp; CHAR(34)&amp;[Hoja1.B251]&amp; CHAR(34)&amp;&quot;, &quot;&amp; CHAR(34)&amp;[Hoja1.C251]&amp; CHAR(34)&amp;&quot;, &quot;&amp; CHAR(34)&amp;[Hoja1.D251]&amp; CHAR(34)&amp;&quot;, &quot;&amp; CHAR(34)&amp;[Hoja1.E251]&amp; CHAR(34)&amp;&quot;], correcta:  &quot;&amp;[Hoja1.F251]-1&amp; &quot;, observaciones: &quot; &amp; CHAR(34)&amp;[Hoja1.G251]&amp; CHAR(34) &amp; &quot; },&quot;" office:value-type="string" office:string-value=" { id: 250, enunciado: &quot;&quot;, opciones: [&quot;&quot;, &quot;&quot;, &quot;&quot;, &quot;&quot;], correcta:  -1, observaciones: &quot;&quot; },">
            <text:p><text:s/>{ id: 25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2]&amp; CHAR(34) &amp; &quot;, opciones: [&quot;&amp; CHAR(34)&amp;[Hoja1.B252]&amp; CHAR(34)&amp;&quot;, &quot;&amp; CHAR(34)&amp;[Hoja1.C252]&amp; CHAR(34)&amp;&quot;, &quot;&amp; CHAR(34)&amp;[Hoja1.D252]&amp; CHAR(34)&amp;&quot;, &quot;&amp; CHAR(34)&amp;[Hoja1.E252]&amp; CHAR(34)&amp;&quot;], correcta:  &quot;&amp;[Hoja1.F252]-1&amp; &quot;, observaciones: &quot; &amp; CHAR(34)&amp;[Hoja1.G252]&amp; CHAR(34) &amp; &quot; },&quot;" office:value-type="string" office:string-value=" { id: 251, enunciado: &quot;&quot;, opciones: [&quot;&quot;, &quot;&quot;, &quot;&quot;, &quot;&quot;], correcta:  -1, observaciones: &quot;&quot; },">
            <text:p><text:s/>{ id: 25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3]&amp; CHAR(34) &amp; &quot;, opciones: [&quot;&amp; CHAR(34)&amp;[Hoja1.B253]&amp; CHAR(34)&amp;&quot;, &quot;&amp; CHAR(34)&amp;[Hoja1.C253]&amp; CHAR(34)&amp;&quot;, &quot;&amp; CHAR(34)&amp;[Hoja1.D253]&amp; CHAR(34)&amp;&quot;, &quot;&amp; CHAR(34)&amp;[Hoja1.E253]&amp; CHAR(34)&amp;&quot;], correcta:  &quot;&amp;[Hoja1.F253]-1&amp; &quot;, observaciones: &quot; &amp; CHAR(34)&amp;[Hoja1.G253]&amp; CHAR(34) &amp; &quot; },&quot;" office:value-type="string" office:string-value=" { id: 252, enunciado: &quot;&quot;, opciones: [&quot;&quot;, &quot;&quot;, &quot;&quot;, &quot;&quot;], correcta:  -1, observaciones: &quot;&quot; },">
            <text:p><text:s/>{ id: 25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4]&amp; CHAR(34) &amp; &quot;, opciones: [&quot;&amp; CHAR(34)&amp;[Hoja1.B254]&amp; CHAR(34)&amp;&quot;, &quot;&amp; CHAR(34)&amp;[Hoja1.C254]&amp; CHAR(34)&amp;&quot;, &quot;&amp; CHAR(34)&amp;[Hoja1.D254]&amp; CHAR(34)&amp;&quot;, &quot;&amp; CHAR(34)&amp;[Hoja1.E254]&amp; CHAR(34)&amp;&quot;], correcta:  &quot;&amp;[Hoja1.F254]-1&amp; &quot;, observaciones: &quot; &amp; CHAR(34)&amp;[Hoja1.G254]&amp; CHAR(34) &amp; &quot; },&quot;" office:value-type="string" office:string-value=" { id: 253, enunciado: &quot;&quot;, opciones: [&quot;&quot;, &quot;&quot;, &quot;&quot;, &quot;&quot;], correcta:  -1, observaciones: &quot;&quot; },">
            <text:p><text:s/>{ id: 25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5]&amp; CHAR(34) &amp; &quot;, opciones: [&quot;&amp; CHAR(34)&amp;[Hoja1.B255]&amp; CHAR(34)&amp;&quot;, &quot;&amp; CHAR(34)&amp;[Hoja1.C255]&amp; CHAR(34)&amp;&quot;, &quot;&amp; CHAR(34)&amp;[Hoja1.D255]&amp; CHAR(34)&amp;&quot;, &quot;&amp; CHAR(34)&amp;[Hoja1.E255]&amp; CHAR(34)&amp;&quot;], correcta:  &quot;&amp;[Hoja1.F255]-1&amp; &quot;, observaciones: &quot; &amp; CHAR(34)&amp;[Hoja1.G255]&amp; CHAR(34) &amp; &quot; },&quot;" office:value-type="string" office:string-value=" { id: 254, enunciado: &quot;&quot;, opciones: [&quot;&quot;, &quot;&quot;, &quot;&quot;, &quot;&quot;], correcta:  -1, observaciones: &quot;&quot; },">
            <text:p><text:s/>{ id: 25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6]&amp; CHAR(34) &amp; &quot;, opciones: [&quot;&amp; CHAR(34)&amp;[Hoja1.B256]&amp; CHAR(34)&amp;&quot;, &quot;&amp; CHAR(34)&amp;[Hoja1.C256]&amp; CHAR(34)&amp;&quot;, &quot;&amp; CHAR(34)&amp;[Hoja1.D256]&amp; CHAR(34)&amp;&quot;, &quot;&amp; CHAR(34)&amp;[Hoja1.E256]&amp; CHAR(34)&amp;&quot;], correcta:  &quot;&amp;[Hoja1.F256]-1&amp; &quot;, observaciones: &quot; &amp; CHAR(34)&amp;[Hoja1.G256]&amp; CHAR(34) &amp; &quot; },&quot;" office:value-type="string" office:string-value=" { id: 255, enunciado: &quot;&quot;, opciones: [&quot;&quot;, &quot;&quot;, &quot;&quot;, &quot;&quot;], correcta:  -1, observaciones: &quot;&quot; },">
            <text:p><text:s/>{ id: 25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7]&amp; CHAR(34) &amp; &quot;, opciones: [&quot;&amp; CHAR(34)&amp;[Hoja1.B257]&amp; CHAR(34)&amp;&quot;, &quot;&amp; CHAR(34)&amp;[Hoja1.C257]&amp; CHAR(34)&amp;&quot;, &quot;&amp; CHAR(34)&amp;[Hoja1.D257]&amp; CHAR(34)&amp;&quot;, &quot;&amp; CHAR(34)&amp;[Hoja1.E257]&amp; CHAR(34)&amp;&quot;], correcta:  &quot;&amp;[Hoja1.F257]-1&amp; &quot;, observaciones: &quot; &amp; CHAR(34)&amp;[Hoja1.G257]&amp; CHAR(34) &amp; &quot; },&quot;" office:value-type="string" office:string-value=" { id: 256, enunciado: &quot;&quot;, opciones: [&quot;&quot;, &quot;&quot;, &quot;&quot;, &quot;&quot;], correcta:  -1, observaciones: &quot;&quot; },">
            <text:p><text:s/>{ id: 25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8]&amp; CHAR(34) &amp; &quot;, opciones: [&quot;&amp; CHAR(34)&amp;[Hoja1.B258]&amp; CHAR(34)&amp;&quot;, &quot;&amp; CHAR(34)&amp;[Hoja1.C258]&amp; CHAR(34)&amp;&quot;, &quot;&amp; CHAR(34)&amp;[Hoja1.D258]&amp; CHAR(34)&amp;&quot;, &quot;&amp; CHAR(34)&amp;[Hoja1.E258]&amp; CHAR(34)&amp;&quot;], correcta:  &quot;&amp;[Hoja1.F258]-1&amp; &quot;, observaciones: &quot; &amp; CHAR(34)&amp;[Hoja1.G258]&amp; CHAR(34) &amp; &quot; },&quot;" office:value-type="string" office:string-value=" { id: 257, enunciado: &quot;&quot;, opciones: [&quot;&quot;, &quot;&quot;, &quot;&quot;, &quot;&quot;], correcta:  -1, observaciones: &quot;&quot; },">
            <text:p><text:s/>{ id: 25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59]&amp; CHAR(34) &amp; &quot;, opciones: [&quot;&amp; CHAR(34)&amp;[Hoja1.B259]&amp; CHAR(34)&amp;&quot;, &quot;&amp; CHAR(34)&amp;[Hoja1.C259]&amp; CHAR(34)&amp;&quot;, &quot;&amp; CHAR(34)&amp;[Hoja1.D259]&amp; CHAR(34)&amp;&quot;, &quot;&amp; CHAR(34)&amp;[Hoja1.E259]&amp; CHAR(34)&amp;&quot;], correcta:  &quot;&amp;[Hoja1.F259]-1&amp; &quot;, observaciones: &quot; &amp; CHAR(34)&amp;[Hoja1.G259]&amp; CHAR(34) &amp; &quot; },&quot;" office:value-type="string" office:string-value=" { id: 258, enunciado: &quot;&quot;, opciones: [&quot;&quot;, &quot;&quot;, &quot;&quot;, &quot;&quot;], correcta:  -1, observaciones: &quot;&quot; },">
            <text:p><text:s/>{ id: 25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0]&amp; CHAR(34) &amp; &quot;, opciones: [&quot;&amp; CHAR(34)&amp;[Hoja1.B260]&amp; CHAR(34)&amp;&quot;, &quot;&amp; CHAR(34)&amp;[Hoja1.C260]&amp; CHAR(34)&amp;&quot;, &quot;&amp; CHAR(34)&amp;[Hoja1.D260]&amp; CHAR(34)&amp;&quot;, &quot;&amp; CHAR(34)&amp;[Hoja1.E260]&amp; CHAR(34)&amp;&quot;], correcta:  &quot;&amp;[Hoja1.F260]-1&amp; &quot;, observaciones: &quot; &amp; CHAR(34)&amp;[Hoja1.G260]&amp; CHAR(34) &amp; &quot; },&quot;" office:value-type="string" office:string-value=" { id: 259, enunciado: &quot;&quot;, opciones: [&quot;&quot;, &quot;&quot;, &quot;&quot;, &quot;&quot;], correcta:  -1, observaciones: &quot;&quot; },">
            <text:p><text:s/>{ id: 25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1]&amp; CHAR(34) &amp; &quot;, opciones: [&quot;&amp; CHAR(34)&amp;[Hoja1.B261]&amp; CHAR(34)&amp;&quot;, &quot;&amp; CHAR(34)&amp;[Hoja1.C261]&amp; CHAR(34)&amp;&quot;, &quot;&amp; CHAR(34)&amp;[Hoja1.D261]&amp; CHAR(34)&amp;&quot;, &quot;&amp; CHAR(34)&amp;[Hoja1.E261]&amp; CHAR(34)&amp;&quot;], correcta:  &quot;&amp;[Hoja1.F261]-1&amp; &quot;, observaciones: &quot; &amp; CHAR(34)&amp;[Hoja1.G261]&amp; CHAR(34) &amp; &quot; },&quot;" office:value-type="string" office:string-value=" { id: 260, enunciado: &quot;&quot;, opciones: [&quot;&quot;, &quot;&quot;, &quot;&quot;, &quot;&quot;], correcta:  -1, observaciones: &quot;&quot; },">
            <text:p><text:s/>{ id: 26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2]&amp; CHAR(34) &amp; &quot;, opciones: [&quot;&amp; CHAR(34)&amp;[Hoja1.B262]&amp; CHAR(34)&amp;&quot;, &quot;&amp; CHAR(34)&amp;[Hoja1.C262]&amp; CHAR(34)&amp;&quot;, &quot;&amp; CHAR(34)&amp;[Hoja1.D262]&amp; CHAR(34)&amp;&quot;, &quot;&amp; CHAR(34)&amp;[Hoja1.E262]&amp; CHAR(34)&amp;&quot;], correcta:  &quot;&amp;[Hoja1.F262]-1&amp; &quot;, observaciones: &quot; &amp; CHAR(34)&amp;[Hoja1.G262]&amp; CHAR(34) &amp; &quot; },&quot;" office:value-type="string" office:string-value=" { id: 261, enunciado: &quot;&quot;, opciones: [&quot;&quot;, &quot;&quot;, &quot;&quot;, &quot;&quot;], correcta:  -1, observaciones: &quot;&quot; },">
            <text:p><text:s/>{ id: 26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3]&amp; CHAR(34) &amp; &quot;, opciones: [&quot;&amp; CHAR(34)&amp;[Hoja1.B263]&amp; CHAR(34)&amp;&quot;, &quot;&amp; CHAR(34)&amp;[Hoja1.C263]&amp; CHAR(34)&amp;&quot;, &quot;&amp; CHAR(34)&amp;[Hoja1.D263]&amp; CHAR(34)&amp;&quot;, &quot;&amp; CHAR(34)&amp;[Hoja1.E263]&amp; CHAR(34)&amp;&quot;], correcta:  &quot;&amp;[Hoja1.F263]-1&amp; &quot;, observaciones: &quot; &amp; CHAR(34)&amp;[Hoja1.G263]&amp; CHAR(34) &amp; &quot; },&quot;" office:value-type="string" office:string-value=" { id: 262, enunciado: &quot;&quot;, opciones: [&quot;&quot;, &quot;&quot;, &quot;&quot;, &quot;&quot;], correcta:  -1, observaciones: &quot;&quot; },">
            <text:p><text:s/>{ id: 26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4]&amp; CHAR(34) &amp; &quot;, opciones: [&quot;&amp; CHAR(34)&amp;[Hoja1.B264]&amp; CHAR(34)&amp;&quot;, &quot;&amp; CHAR(34)&amp;[Hoja1.C264]&amp; CHAR(34)&amp;&quot;, &quot;&amp; CHAR(34)&amp;[Hoja1.D264]&amp; CHAR(34)&amp;&quot;, &quot;&amp; CHAR(34)&amp;[Hoja1.E264]&amp; CHAR(34)&amp;&quot;], correcta:  &quot;&amp;[Hoja1.F264]-1&amp; &quot;, observaciones: &quot; &amp; CHAR(34)&amp;[Hoja1.G264]&amp; CHAR(34) &amp; &quot; },&quot;" office:value-type="string" office:string-value=" { id: 263, enunciado: &quot;&quot;, opciones: [&quot;&quot;, &quot;&quot;, &quot;&quot;, &quot;&quot;], correcta:  -1, observaciones: &quot;&quot; },">
            <text:p><text:s/>{ id: 26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5]&amp; CHAR(34) &amp; &quot;, opciones: [&quot;&amp; CHAR(34)&amp;[Hoja1.B265]&amp; CHAR(34)&amp;&quot;, &quot;&amp; CHAR(34)&amp;[Hoja1.C265]&amp; CHAR(34)&amp;&quot;, &quot;&amp; CHAR(34)&amp;[Hoja1.D265]&amp; CHAR(34)&amp;&quot;, &quot;&amp; CHAR(34)&amp;[Hoja1.E265]&amp; CHAR(34)&amp;&quot;], correcta:  &quot;&amp;[Hoja1.F265]-1&amp; &quot;, observaciones: &quot; &amp; CHAR(34)&amp;[Hoja1.G265]&amp; CHAR(34) &amp; &quot; },&quot;" office:value-type="string" office:string-value=" { id: 264, enunciado: &quot;&quot;, opciones: [&quot;&quot;, &quot;&quot;, &quot;&quot;, &quot;&quot;], correcta:  -1, observaciones: &quot;&quot; },">
            <text:p><text:s/>{ id: 26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6]&amp; CHAR(34) &amp; &quot;, opciones: [&quot;&amp; CHAR(34)&amp;[Hoja1.B266]&amp; CHAR(34)&amp;&quot;, &quot;&amp; CHAR(34)&amp;[Hoja1.C266]&amp; CHAR(34)&amp;&quot;, &quot;&amp; CHAR(34)&amp;[Hoja1.D266]&amp; CHAR(34)&amp;&quot;, &quot;&amp; CHAR(34)&amp;[Hoja1.E266]&amp; CHAR(34)&amp;&quot;], correcta:  &quot;&amp;[Hoja1.F266]-1&amp; &quot;, observaciones: &quot; &amp; CHAR(34)&amp;[Hoja1.G266]&amp; CHAR(34) &amp; &quot; },&quot;" office:value-type="string" office:string-value=" { id: 265, enunciado: &quot;&quot;, opciones: [&quot;&quot;, &quot;&quot;, &quot;&quot;, &quot;&quot;], correcta:  -1, observaciones: &quot;&quot; },">
            <text:p><text:s/>{ id: 26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7]&amp; CHAR(34) &amp; &quot;, opciones: [&quot;&amp; CHAR(34)&amp;[Hoja1.B267]&amp; CHAR(34)&amp;&quot;, &quot;&amp; CHAR(34)&amp;[Hoja1.C267]&amp; CHAR(34)&amp;&quot;, &quot;&amp; CHAR(34)&amp;[Hoja1.D267]&amp; CHAR(34)&amp;&quot;, &quot;&amp; CHAR(34)&amp;[Hoja1.E267]&amp; CHAR(34)&amp;&quot;], correcta:  &quot;&amp;[Hoja1.F267]-1&amp; &quot;, observaciones: &quot; &amp; CHAR(34)&amp;[Hoja1.G267]&amp; CHAR(34) &amp; &quot; },&quot;" office:value-type="string" office:string-value=" { id: 266, enunciado: &quot;&quot;, opciones: [&quot;&quot;, &quot;&quot;, &quot;&quot;, &quot;&quot;], correcta:  -1, observaciones: &quot;&quot; },">
            <text:p><text:s/>{ id: 26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8]&amp; CHAR(34) &amp; &quot;, opciones: [&quot;&amp; CHAR(34)&amp;[Hoja1.B268]&amp; CHAR(34)&amp;&quot;, &quot;&amp; CHAR(34)&amp;[Hoja1.C268]&amp; CHAR(34)&amp;&quot;, &quot;&amp; CHAR(34)&amp;[Hoja1.D268]&amp; CHAR(34)&amp;&quot;, &quot;&amp; CHAR(34)&amp;[Hoja1.E268]&amp; CHAR(34)&amp;&quot;], correcta:  &quot;&amp;[Hoja1.F268]-1&amp; &quot;, observaciones: &quot; &amp; CHAR(34)&amp;[Hoja1.G268]&amp; CHAR(34) &amp; &quot; },&quot;" office:value-type="string" office:string-value=" { id: 267, enunciado: &quot;&quot;, opciones: [&quot;&quot;, &quot;&quot;, &quot;&quot;, &quot;&quot;], correcta:  -1, observaciones: &quot;&quot; },">
            <text:p><text:s/>{ id: 26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69]&amp; CHAR(34) &amp; &quot;, opciones: [&quot;&amp; CHAR(34)&amp;[Hoja1.B269]&amp; CHAR(34)&amp;&quot;, &quot;&amp; CHAR(34)&amp;[Hoja1.C269]&amp; CHAR(34)&amp;&quot;, &quot;&amp; CHAR(34)&amp;[Hoja1.D269]&amp; CHAR(34)&amp;&quot;, &quot;&amp; CHAR(34)&amp;[Hoja1.E269]&amp; CHAR(34)&amp;&quot;], correcta:  &quot;&amp;[Hoja1.F269]-1&amp; &quot;, observaciones: &quot; &amp; CHAR(34)&amp;[Hoja1.G269]&amp; CHAR(34) &amp; &quot; },&quot;" office:value-type="string" office:string-value=" { id: 268, enunciado: &quot;&quot;, opciones: [&quot;&quot;, &quot;&quot;, &quot;&quot;, &quot;&quot;], correcta:  -1, observaciones: &quot;&quot; },">
            <text:p><text:s/>{ id: 26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0]&amp; CHAR(34) &amp; &quot;, opciones: [&quot;&amp; CHAR(34)&amp;[Hoja1.B270]&amp; CHAR(34)&amp;&quot;, &quot;&amp; CHAR(34)&amp;[Hoja1.C270]&amp; CHAR(34)&amp;&quot;, &quot;&amp; CHAR(34)&amp;[Hoja1.D270]&amp; CHAR(34)&amp;&quot;, &quot;&amp; CHAR(34)&amp;[Hoja1.E270]&amp; CHAR(34)&amp;&quot;], correcta:  &quot;&amp;[Hoja1.F270]-1&amp; &quot;, observaciones: &quot; &amp; CHAR(34)&amp;[Hoja1.G270]&amp; CHAR(34) &amp; &quot; },&quot;" office:value-type="string" office:string-value=" { id: 269, enunciado: &quot;&quot;, opciones: [&quot;&quot;, &quot;&quot;, &quot;&quot;, &quot;&quot;], correcta:  -1, observaciones: &quot;&quot; },">
            <text:p><text:s/>{ id: 26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1]&amp; CHAR(34) &amp; &quot;, opciones: [&quot;&amp; CHAR(34)&amp;[Hoja1.B271]&amp; CHAR(34)&amp;&quot;, &quot;&amp; CHAR(34)&amp;[Hoja1.C271]&amp; CHAR(34)&amp;&quot;, &quot;&amp; CHAR(34)&amp;[Hoja1.D271]&amp; CHAR(34)&amp;&quot;, &quot;&amp; CHAR(34)&amp;[Hoja1.E271]&amp; CHAR(34)&amp;&quot;], correcta:  &quot;&amp;[Hoja1.F271]-1&amp; &quot;, observaciones: &quot; &amp; CHAR(34)&amp;[Hoja1.G271]&amp; CHAR(34) &amp; &quot; },&quot;" office:value-type="string" office:string-value=" { id: 270, enunciado: &quot;&quot;, opciones: [&quot;&quot;, &quot;&quot;, &quot;&quot;, &quot;&quot;], correcta:  -1, observaciones: &quot;&quot; },">
            <text:p><text:s/>{ id: 27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2]&amp; CHAR(34) &amp; &quot;, opciones: [&quot;&amp; CHAR(34)&amp;[Hoja1.B272]&amp; CHAR(34)&amp;&quot;, &quot;&amp; CHAR(34)&amp;[Hoja1.C272]&amp; CHAR(34)&amp;&quot;, &quot;&amp; CHAR(34)&amp;[Hoja1.D272]&amp; CHAR(34)&amp;&quot;, &quot;&amp; CHAR(34)&amp;[Hoja1.E272]&amp; CHAR(34)&amp;&quot;], correcta:  &quot;&amp;[Hoja1.F272]-1&amp; &quot;, observaciones: &quot; &amp; CHAR(34)&amp;[Hoja1.G272]&amp; CHAR(34) &amp; &quot; },&quot;" office:value-type="string" office:string-value=" { id: 271, enunciado: &quot;&quot;, opciones: [&quot;&quot;, &quot;&quot;, &quot;&quot;, &quot;&quot;], correcta:  -1, observaciones: &quot;&quot; },">
            <text:p><text:s/>{ id: 27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3]&amp; CHAR(34) &amp; &quot;, opciones: [&quot;&amp; CHAR(34)&amp;[Hoja1.B273]&amp; CHAR(34)&amp;&quot;, &quot;&amp; CHAR(34)&amp;[Hoja1.C273]&amp; CHAR(34)&amp;&quot;, &quot;&amp; CHAR(34)&amp;[Hoja1.D273]&amp; CHAR(34)&amp;&quot;, &quot;&amp; CHAR(34)&amp;[Hoja1.E273]&amp; CHAR(34)&amp;&quot;], correcta:  &quot;&amp;[Hoja1.F273]-1&amp; &quot;, observaciones: &quot; &amp; CHAR(34)&amp;[Hoja1.G273]&amp; CHAR(34) &amp; &quot; },&quot;" office:value-type="string" office:string-value=" { id: 272, enunciado: &quot;&quot;, opciones: [&quot;&quot;, &quot;&quot;, &quot;&quot;, &quot;&quot;], correcta:  -1, observaciones: &quot;&quot; },">
            <text:p><text:s/>{ id: 27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4]&amp; CHAR(34) &amp; &quot;, opciones: [&quot;&amp; CHAR(34)&amp;[Hoja1.B274]&amp; CHAR(34)&amp;&quot;, &quot;&amp; CHAR(34)&amp;[Hoja1.C274]&amp; CHAR(34)&amp;&quot;, &quot;&amp; CHAR(34)&amp;[Hoja1.D274]&amp; CHAR(34)&amp;&quot;, &quot;&amp; CHAR(34)&amp;[Hoja1.E274]&amp; CHAR(34)&amp;&quot;], correcta:  &quot;&amp;[Hoja1.F274]-1&amp; &quot;, observaciones: &quot; &amp; CHAR(34)&amp;[Hoja1.G274]&amp; CHAR(34) &amp; &quot; },&quot;" office:value-type="string" office:string-value=" { id: 273, enunciado: &quot;&quot;, opciones: [&quot;&quot;, &quot;&quot;, &quot;&quot;, &quot;&quot;], correcta:  -1, observaciones: &quot;&quot; },">
            <text:p><text:s/>{ id: 27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5]&amp; CHAR(34) &amp; &quot;, opciones: [&quot;&amp; CHAR(34)&amp;[Hoja1.B275]&amp; CHAR(34)&amp;&quot;, &quot;&amp; CHAR(34)&amp;[Hoja1.C275]&amp; CHAR(34)&amp;&quot;, &quot;&amp; CHAR(34)&amp;[Hoja1.D275]&amp; CHAR(34)&amp;&quot;, &quot;&amp; CHAR(34)&amp;[Hoja1.E275]&amp; CHAR(34)&amp;&quot;], correcta:  &quot;&amp;[Hoja1.F275]-1&amp; &quot;, observaciones: &quot; &amp; CHAR(34)&amp;[Hoja1.G275]&amp; CHAR(34) &amp; &quot; },&quot;" office:value-type="string" office:string-value=" { id: 274, enunciado: &quot;&quot;, opciones: [&quot;&quot;, &quot;&quot;, &quot;&quot;, &quot;&quot;], correcta:  -1, observaciones: &quot;&quot; },">
            <text:p><text:s/>{ id: 27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6]&amp; CHAR(34) &amp; &quot;, opciones: [&quot;&amp; CHAR(34)&amp;[Hoja1.B276]&amp; CHAR(34)&amp;&quot;, &quot;&amp; CHAR(34)&amp;[Hoja1.C276]&amp; CHAR(34)&amp;&quot;, &quot;&amp; CHAR(34)&amp;[Hoja1.D276]&amp; CHAR(34)&amp;&quot;, &quot;&amp; CHAR(34)&amp;[Hoja1.E276]&amp; CHAR(34)&amp;&quot;], correcta:  &quot;&amp;[Hoja1.F276]-1&amp; &quot;, observaciones: &quot; &amp; CHAR(34)&amp;[Hoja1.G276]&amp; CHAR(34) &amp; &quot; },&quot;" office:value-type="string" office:string-value=" { id: 275, enunciado: &quot;&quot;, opciones: [&quot;&quot;, &quot;&quot;, &quot;&quot;, &quot;&quot;], correcta:  -1, observaciones: &quot;&quot; },">
            <text:p><text:s/>{ id: 27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7]&amp; CHAR(34) &amp; &quot;, opciones: [&quot;&amp; CHAR(34)&amp;[Hoja1.B277]&amp; CHAR(34)&amp;&quot;, &quot;&amp; CHAR(34)&amp;[Hoja1.C277]&amp; CHAR(34)&amp;&quot;, &quot;&amp; CHAR(34)&amp;[Hoja1.D277]&amp; CHAR(34)&amp;&quot;, &quot;&amp; CHAR(34)&amp;[Hoja1.E277]&amp; CHAR(34)&amp;&quot;], correcta:  &quot;&amp;[Hoja1.F277]-1&amp; &quot;, observaciones: &quot; &amp; CHAR(34)&amp;[Hoja1.G277]&amp; CHAR(34) &amp; &quot; },&quot;" office:value-type="string" office:string-value=" { id: 276, enunciado: &quot;&quot;, opciones: [&quot;&quot;, &quot;&quot;, &quot;&quot;, &quot;&quot;], correcta:  -1, observaciones: &quot;&quot; },">
            <text:p><text:s/>{ id: 27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8]&amp; CHAR(34) &amp; &quot;, opciones: [&quot;&amp; CHAR(34)&amp;[Hoja1.B278]&amp; CHAR(34)&amp;&quot;, &quot;&amp; CHAR(34)&amp;[Hoja1.C278]&amp; CHAR(34)&amp;&quot;, &quot;&amp; CHAR(34)&amp;[Hoja1.D278]&amp; CHAR(34)&amp;&quot;, &quot;&amp; CHAR(34)&amp;[Hoja1.E278]&amp; CHAR(34)&amp;&quot;], correcta:  &quot;&amp;[Hoja1.F278]-1&amp; &quot;, observaciones: &quot; &amp; CHAR(34)&amp;[Hoja1.G278]&amp; CHAR(34) &amp; &quot; },&quot;" office:value-type="string" office:string-value=" { id: 277, enunciado: &quot;&quot;, opciones: [&quot;&quot;, &quot;&quot;, &quot;&quot;, &quot;&quot;], correcta:  -1, observaciones: &quot;&quot; },">
            <text:p><text:s/>{ id: 27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79]&amp; CHAR(34) &amp; &quot;, opciones: [&quot;&amp; CHAR(34)&amp;[Hoja1.B279]&amp; CHAR(34)&amp;&quot;, &quot;&amp; CHAR(34)&amp;[Hoja1.C279]&amp; CHAR(34)&amp;&quot;, &quot;&amp; CHAR(34)&amp;[Hoja1.D279]&amp; CHAR(34)&amp;&quot;, &quot;&amp; CHAR(34)&amp;[Hoja1.E279]&amp; CHAR(34)&amp;&quot;], correcta:  &quot;&amp;[Hoja1.F279]-1&amp; &quot;, observaciones: &quot; &amp; CHAR(34)&amp;[Hoja1.G279]&amp; CHAR(34) &amp; &quot; },&quot;" office:value-type="string" office:string-value=" { id: 278, enunciado: &quot;&quot;, opciones: [&quot;&quot;, &quot;&quot;, &quot;&quot;, &quot;&quot;], correcta:  -1, observaciones: &quot;&quot; },">
            <text:p><text:s/>{ id: 27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0]&amp; CHAR(34) &amp; &quot;, opciones: [&quot;&amp; CHAR(34)&amp;[Hoja1.B280]&amp; CHAR(34)&amp;&quot;, &quot;&amp; CHAR(34)&amp;[Hoja1.C280]&amp; CHAR(34)&amp;&quot;, &quot;&amp; CHAR(34)&amp;[Hoja1.D280]&amp; CHAR(34)&amp;&quot;, &quot;&amp; CHAR(34)&amp;[Hoja1.E280]&amp; CHAR(34)&amp;&quot;], correcta:  &quot;&amp;[Hoja1.F280]-1&amp; &quot;, observaciones: &quot; &amp; CHAR(34)&amp;[Hoja1.G280]&amp; CHAR(34) &amp; &quot; },&quot;" office:value-type="string" office:string-value=" { id: 279, enunciado: &quot;&quot;, opciones: [&quot;&quot;, &quot;&quot;, &quot;&quot;, &quot;&quot;], correcta:  -1, observaciones: &quot;&quot; },">
            <text:p><text:s/>{ id: 27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1]&amp; CHAR(34) &amp; &quot;, opciones: [&quot;&amp; CHAR(34)&amp;[Hoja1.B281]&amp; CHAR(34)&amp;&quot;, &quot;&amp; CHAR(34)&amp;[Hoja1.C281]&amp; CHAR(34)&amp;&quot;, &quot;&amp; CHAR(34)&amp;[Hoja1.D281]&amp; CHAR(34)&amp;&quot;, &quot;&amp; CHAR(34)&amp;[Hoja1.E281]&amp; CHAR(34)&amp;&quot;], correcta:  &quot;&amp;[Hoja1.F281]-1&amp; &quot;, observaciones: &quot; &amp; CHAR(34)&amp;[Hoja1.G281]&amp; CHAR(34) &amp; &quot; },&quot;" office:value-type="string" office:string-value=" { id: 280, enunciado: &quot;&quot;, opciones: [&quot;&quot;, &quot;&quot;, &quot;&quot;, &quot;&quot;], correcta:  -1, observaciones: &quot;&quot; },">
            <text:p><text:s/>{ id: 28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2]&amp; CHAR(34) &amp; &quot;, opciones: [&quot;&amp; CHAR(34)&amp;[Hoja1.B282]&amp; CHAR(34)&amp;&quot;, &quot;&amp; CHAR(34)&amp;[Hoja1.C282]&amp; CHAR(34)&amp;&quot;, &quot;&amp; CHAR(34)&amp;[Hoja1.D282]&amp; CHAR(34)&amp;&quot;, &quot;&amp; CHAR(34)&amp;[Hoja1.E282]&amp; CHAR(34)&amp;&quot;], correcta:  &quot;&amp;[Hoja1.F282]-1&amp; &quot;, observaciones: &quot; &amp; CHAR(34)&amp;[Hoja1.G282]&amp; CHAR(34) &amp; &quot; },&quot;" office:value-type="string" office:string-value=" { id: 281, enunciado: &quot;&quot;, opciones: [&quot;&quot;, &quot;&quot;, &quot;&quot;, &quot;&quot;], correcta:  -1, observaciones: &quot;&quot; },">
            <text:p><text:s/>{ id: 28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3]&amp; CHAR(34) &amp; &quot;, opciones: [&quot;&amp; CHAR(34)&amp;[Hoja1.B283]&amp; CHAR(34)&amp;&quot;, &quot;&amp; CHAR(34)&amp;[Hoja1.C283]&amp; CHAR(34)&amp;&quot;, &quot;&amp; CHAR(34)&amp;[Hoja1.D283]&amp; CHAR(34)&amp;&quot;, &quot;&amp; CHAR(34)&amp;[Hoja1.E283]&amp; CHAR(34)&amp;&quot;], correcta:  &quot;&amp;[Hoja1.F283]-1&amp; &quot;, observaciones: &quot; &amp; CHAR(34)&amp;[Hoja1.G283]&amp; CHAR(34) &amp; &quot; },&quot;" office:value-type="string" office:string-value=" { id: 282, enunciado: &quot;&quot;, opciones: [&quot;&quot;, &quot;&quot;, &quot;&quot;, &quot;&quot;], correcta:  -1, observaciones: &quot;&quot; },">
            <text:p><text:s/>{ id: 28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4]&amp; CHAR(34) &amp; &quot;, opciones: [&quot;&amp; CHAR(34)&amp;[Hoja1.B284]&amp; CHAR(34)&amp;&quot;, &quot;&amp; CHAR(34)&amp;[Hoja1.C284]&amp; CHAR(34)&amp;&quot;, &quot;&amp; CHAR(34)&amp;[Hoja1.D284]&amp; CHAR(34)&amp;&quot;, &quot;&amp; CHAR(34)&amp;[Hoja1.E284]&amp; CHAR(34)&amp;&quot;], correcta:  &quot;&amp;[Hoja1.F284]-1&amp; &quot;, observaciones: &quot; &amp; CHAR(34)&amp;[Hoja1.G284]&amp; CHAR(34) &amp; &quot; },&quot;" office:value-type="string" office:string-value=" { id: 283, enunciado: &quot;&quot;, opciones: [&quot;&quot;, &quot;&quot;, &quot;&quot;, &quot;&quot;], correcta:  -1, observaciones: &quot;&quot; },">
            <text:p><text:s/>{ id: 28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5]&amp; CHAR(34) &amp; &quot;, opciones: [&quot;&amp; CHAR(34)&amp;[Hoja1.B285]&amp; CHAR(34)&amp;&quot;, &quot;&amp; CHAR(34)&amp;[Hoja1.C285]&amp; CHAR(34)&amp;&quot;, &quot;&amp; CHAR(34)&amp;[Hoja1.D285]&amp; CHAR(34)&amp;&quot;, &quot;&amp; CHAR(34)&amp;[Hoja1.E285]&amp; CHAR(34)&amp;&quot;], correcta:  &quot;&amp;[Hoja1.F285]-1&amp; &quot;, observaciones: &quot; &amp; CHAR(34)&amp;[Hoja1.G285]&amp; CHAR(34) &amp; &quot; },&quot;" office:value-type="string" office:string-value=" { id: 284, enunciado: &quot;&quot;, opciones: [&quot;&quot;, &quot;&quot;, &quot;&quot;, &quot;&quot;], correcta:  -1, observaciones: &quot;&quot; },">
            <text:p><text:s/>{ id: 28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6]&amp; CHAR(34) &amp; &quot;, opciones: [&quot;&amp; CHAR(34)&amp;[Hoja1.B286]&amp; CHAR(34)&amp;&quot;, &quot;&amp; CHAR(34)&amp;[Hoja1.C286]&amp; CHAR(34)&amp;&quot;, &quot;&amp; CHAR(34)&amp;[Hoja1.D286]&amp; CHAR(34)&amp;&quot;, &quot;&amp; CHAR(34)&amp;[Hoja1.E286]&amp; CHAR(34)&amp;&quot;], correcta:  &quot;&amp;[Hoja1.F286]-1&amp; &quot;, observaciones: &quot; &amp; CHAR(34)&amp;[Hoja1.G286]&amp; CHAR(34) &amp; &quot; },&quot;" office:value-type="string" office:string-value=" { id: 285, enunciado: &quot;&quot;, opciones: [&quot;&quot;, &quot;&quot;, &quot;&quot;, &quot;&quot;], correcta:  -1, observaciones: &quot;&quot; },">
            <text:p><text:s/>{ id: 28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7]&amp; CHAR(34) &amp; &quot;, opciones: [&quot;&amp; CHAR(34)&amp;[Hoja1.B287]&amp; CHAR(34)&amp;&quot;, &quot;&amp; CHAR(34)&amp;[Hoja1.C287]&amp; CHAR(34)&amp;&quot;, &quot;&amp; CHAR(34)&amp;[Hoja1.D287]&amp; CHAR(34)&amp;&quot;, &quot;&amp; CHAR(34)&amp;[Hoja1.E287]&amp; CHAR(34)&amp;&quot;], correcta:  &quot;&amp;[Hoja1.F287]-1&amp; &quot;, observaciones: &quot; &amp; CHAR(34)&amp;[Hoja1.G287]&amp; CHAR(34) &amp; &quot; },&quot;" office:value-type="string" office:string-value=" { id: 286, enunciado: &quot;&quot;, opciones: [&quot;&quot;, &quot;&quot;, &quot;&quot;, &quot;&quot;], correcta:  -1, observaciones: &quot;&quot; },">
            <text:p><text:s/>{ id: 28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8]&amp; CHAR(34) &amp; &quot;, opciones: [&quot;&amp; CHAR(34)&amp;[Hoja1.B288]&amp; CHAR(34)&amp;&quot;, &quot;&amp; CHAR(34)&amp;[Hoja1.C288]&amp; CHAR(34)&amp;&quot;, &quot;&amp; CHAR(34)&amp;[Hoja1.D288]&amp; CHAR(34)&amp;&quot;, &quot;&amp; CHAR(34)&amp;[Hoja1.E288]&amp; CHAR(34)&amp;&quot;], correcta:  &quot;&amp;[Hoja1.F288]-1&amp; &quot;, observaciones: &quot; &amp; CHAR(34)&amp;[Hoja1.G288]&amp; CHAR(34) &amp; &quot; },&quot;" office:value-type="string" office:string-value=" { id: 287, enunciado: &quot;&quot;, opciones: [&quot;&quot;, &quot;&quot;, &quot;&quot;, &quot;&quot;], correcta:  -1, observaciones: &quot;&quot; },">
            <text:p><text:s/>{ id: 28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89]&amp; CHAR(34) &amp; &quot;, opciones: [&quot;&amp; CHAR(34)&amp;[Hoja1.B289]&amp; CHAR(34)&amp;&quot;, &quot;&amp; CHAR(34)&amp;[Hoja1.C289]&amp; CHAR(34)&amp;&quot;, &quot;&amp; CHAR(34)&amp;[Hoja1.D289]&amp; CHAR(34)&amp;&quot;, &quot;&amp; CHAR(34)&amp;[Hoja1.E289]&amp; CHAR(34)&amp;&quot;], correcta:  &quot;&amp;[Hoja1.F289]-1&amp; &quot;, observaciones: &quot; &amp; CHAR(34)&amp;[Hoja1.G289]&amp; CHAR(34) &amp; &quot; },&quot;" office:value-type="string" office:string-value=" { id: 288, enunciado: &quot;&quot;, opciones: [&quot;&quot;, &quot;&quot;, &quot;&quot;, &quot;&quot;], correcta:  -1, observaciones: &quot;&quot; },">
            <text:p><text:s/>{ id: 28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0]&amp; CHAR(34) &amp; &quot;, opciones: [&quot;&amp; CHAR(34)&amp;[Hoja1.B290]&amp; CHAR(34)&amp;&quot;, &quot;&amp; CHAR(34)&amp;[Hoja1.C290]&amp; CHAR(34)&amp;&quot;, &quot;&amp; CHAR(34)&amp;[Hoja1.D290]&amp; CHAR(34)&amp;&quot;, &quot;&amp; CHAR(34)&amp;[Hoja1.E290]&amp; CHAR(34)&amp;&quot;], correcta:  &quot;&amp;[Hoja1.F290]-1&amp; &quot;, observaciones: &quot; &amp; CHAR(34)&amp;[Hoja1.G290]&amp; CHAR(34) &amp; &quot; },&quot;" office:value-type="string" office:string-value=" { id: 289, enunciado: &quot;&quot;, opciones: [&quot;&quot;, &quot;&quot;, &quot;&quot;, &quot;&quot;], correcta:  -1, observaciones: &quot;&quot; },">
            <text:p><text:s/>{ id: 28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1]&amp; CHAR(34) &amp; &quot;, opciones: [&quot;&amp; CHAR(34)&amp;[Hoja1.B291]&amp; CHAR(34)&amp;&quot;, &quot;&amp; CHAR(34)&amp;[Hoja1.C291]&amp; CHAR(34)&amp;&quot;, &quot;&amp; CHAR(34)&amp;[Hoja1.D291]&amp; CHAR(34)&amp;&quot;, &quot;&amp; CHAR(34)&amp;[Hoja1.E291]&amp; CHAR(34)&amp;&quot;], correcta:  &quot;&amp;[Hoja1.F291]-1&amp; &quot;, observaciones: &quot; &amp; CHAR(34)&amp;[Hoja1.G291]&amp; CHAR(34) &amp; &quot; },&quot;" office:value-type="string" office:string-value=" { id: 290, enunciado: &quot;&quot;, opciones: [&quot;&quot;, &quot;&quot;, &quot;&quot;, &quot;&quot;], correcta:  -1, observaciones: &quot;&quot; },">
            <text:p><text:s/>{ id: 29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2]&amp; CHAR(34) &amp; &quot;, opciones: [&quot;&amp; CHAR(34)&amp;[Hoja1.B292]&amp; CHAR(34)&amp;&quot;, &quot;&amp; CHAR(34)&amp;[Hoja1.C292]&amp; CHAR(34)&amp;&quot;, &quot;&amp; CHAR(34)&amp;[Hoja1.D292]&amp; CHAR(34)&amp;&quot;, &quot;&amp; CHAR(34)&amp;[Hoja1.E292]&amp; CHAR(34)&amp;&quot;], correcta:  &quot;&amp;[Hoja1.F292]-1&amp; &quot;, observaciones: &quot; &amp; CHAR(34)&amp;[Hoja1.G292]&amp; CHAR(34) &amp; &quot; },&quot;" office:value-type="string" office:string-value=" { id: 291, enunciado: &quot;&quot;, opciones: [&quot;&quot;, &quot;&quot;, &quot;&quot;, &quot;&quot;], correcta:  -1, observaciones: &quot;&quot; },">
            <text:p><text:s/>{ id: 29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3]&amp; CHAR(34) &amp; &quot;, opciones: [&quot;&amp; CHAR(34)&amp;[Hoja1.B293]&amp; CHAR(34)&amp;&quot;, &quot;&amp; CHAR(34)&amp;[Hoja1.C293]&amp; CHAR(34)&amp;&quot;, &quot;&amp; CHAR(34)&amp;[Hoja1.D293]&amp; CHAR(34)&amp;&quot;, &quot;&amp; CHAR(34)&amp;[Hoja1.E293]&amp; CHAR(34)&amp;&quot;], correcta:  &quot;&amp;[Hoja1.F293]-1&amp; &quot;, observaciones: &quot; &amp; CHAR(34)&amp;[Hoja1.G293]&amp; CHAR(34) &amp; &quot; },&quot;" office:value-type="string" office:string-value=" { id: 292, enunciado: &quot;&quot;, opciones: [&quot;&quot;, &quot;&quot;, &quot;&quot;, &quot;&quot;], correcta:  -1, observaciones: &quot;&quot; },">
            <text:p><text:s/>{ id: 29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4]&amp; CHAR(34) &amp; &quot;, opciones: [&quot;&amp; CHAR(34)&amp;[Hoja1.B294]&amp; CHAR(34)&amp;&quot;, &quot;&amp; CHAR(34)&amp;[Hoja1.C294]&amp; CHAR(34)&amp;&quot;, &quot;&amp; CHAR(34)&amp;[Hoja1.D294]&amp; CHAR(34)&amp;&quot;, &quot;&amp; CHAR(34)&amp;[Hoja1.E294]&amp; CHAR(34)&amp;&quot;], correcta:  &quot;&amp;[Hoja1.F294]-1&amp; &quot;, observaciones: &quot; &amp; CHAR(34)&amp;[Hoja1.G294]&amp; CHAR(34) &amp; &quot; },&quot;" office:value-type="string" office:string-value=" { id: 293, enunciado: &quot;&quot;, opciones: [&quot;&quot;, &quot;&quot;, &quot;&quot;, &quot;&quot;], correcta:  -1, observaciones: &quot;&quot; },">
            <text:p><text:s/>{ id: 29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5]&amp; CHAR(34) &amp; &quot;, opciones: [&quot;&amp; CHAR(34)&amp;[Hoja1.B295]&amp; CHAR(34)&amp;&quot;, &quot;&amp; CHAR(34)&amp;[Hoja1.C295]&amp; CHAR(34)&amp;&quot;, &quot;&amp; CHAR(34)&amp;[Hoja1.D295]&amp; CHAR(34)&amp;&quot;, &quot;&amp; CHAR(34)&amp;[Hoja1.E295]&amp; CHAR(34)&amp;&quot;], correcta:  &quot;&amp;[Hoja1.F295]-1&amp; &quot;, observaciones: &quot; &amp; CHAR(34)&amp;[Hoja1.G295]&amp; CHAR(34) &amp; &quot; },&quot;" office:value-type="string" office:string-value=" { id: 294, enunciado: &quot;&quot;, opciones: [&quot;&quot;, &quot;&quot;, &quot;&quot;, &quot;&quot;], correcta:  -1, observaciones: &quot;&quot; },">
            <text:p><text:s/>{ id: 29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6]&amp; CHAR(34) &amp; &quot;, opciones: [&quot;&amp; CHAR(34)&amp;[Hoja1.B296]&amp; CHAR(34)&amp;&quot;, &quot;&amp; CHAR(34)&amp;[Hoja1.C296]&amp; CHAR(34)&amp;&quot;, &quot;&amp; CHAR(34)&amp;[Hoja1.D296]&amp; CHAR(34)&amp;&quot;, &quot;&amp; CHAR(34)&amp;[Hoja1.E296]&amp; CHAR(34)&amp;&quot;], correcta:  &quot;&amp;[Hoja1.F296]-1&amp; &quot;, observaciones: &quot; &amp; CHAR(34)&amp;[Hoja1.G296]&amp; CHAR(34) &amp; &quot; },&quot;" office:value-type="string" office:string-value=" { id: 295, enunciado: &quot;&quot;, opciones: [&quot;&quot;, &quot;&quot;, &quot;&quot;, &quot;&quot;], correcta:  -1, observaciones: &quot;&quot; },">
            <text:p><text:s/>{ id: 29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7]&amp; CHAR(34) &amp; &quot;, opciones: [&quot;&amp; CHAR(34)&amp;[Hoja1.B297]&amp; CHAR(34)&amp;&quot;, &quot;&amp; CHAR(34)&amp;[Hoja1.C297]&amp; CHAR(34)&amp;&quot;, &quot;&amp; CHAR(34)&amp;[Hoja1.D297]&amp; CHAR(34)&amp;&quot;, &quot;&amp; CHAR(34)&amp;[Hoja1.E297]&amp; CHAR(34)&amp;&quot;], correcta:  &quot;&amp;[Hoja1.F297]-1&amp; &quot;, observaciones: &quot; &amp; CHAR(34)&amp;[Hoja1.G297]&amp; CHAR(34) &amp; &quot; },&quot;" office:value-type="string" office:string-value=" { id: 296, enunciado: &quot;&quot;, opciones: [&quot;&quot;, &quot;&quot;, &quot;&quot;, &quot;&quot;], correcta:  -1, observaciones: &quot;&quot; },">
            <text:p><text:s/>{ id: 29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8]&amp; CHAR(34) &amp; &quot;, opciones: [&quot;&amp; CHAR(34)&amp;[Hoja1.B298]&amp; CHAR(34)&amp;&quot;, &quot;&amp; CHAR(34)&amp;[Hoja1.C298]&amp; CHAR(34)&amp;&quot;, &quot;&amp; CHAR(34)&amp;[Hoja1.D298]&amp; CHAR(34)&amp;&quot;, &quot;&amp; CHAR(34)&amp;[Hoja1.E298]&amp; CHAR(34)&amp;&quot;], correcta:  &quot;&amp;[Hoja1.F298]-1&amp; &quot;, observaciones: &quot; &amp; CHAR(34)&amp;[Hoja1.G298]&amp; CHAR(34) &amp; &quot; },&quot;" office:value-type="string" office:string-value=" { id: 297, enunciado: &quot;&quot;, opciones: [&quot;&quot;, &quot;&quot;, &quot;&quot;, &quot;&quot;], correcta:  -1, observaciones: &quot;&quot; },">
            <text:p><text:s/>{ id: 29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299]&amp; CHAR(34) &amp; &quot;, opciones: [&quot;&amp; CHAR(34)&amp;[Hoja1.B299]&amp; CHAR(34)&amp;&quot;, &quot;&amp; CHAR(34)&amp;[Hoja1.C299]&amp; CHAR(34)&amp;&quot;, &quot;&amp; CHAR(34)&amp;[Hoja1.D299]&amp; CHAR(34)&amp;&quot;, &quot;&amp; CHAR(34)&amp;[Hoja1.E299]&amp; CHAR(34)&amp;&quot;], correcta:  &quot;&amp;[Hoja1.F299]-1&amp; &quot;, observaciones: &quot; &amp; CHAR(34)&amp;[Hoja1.G299]&amp; CHAR(34) &amp; &quot; },&quot;" office:value-type="string" office:string-value=" { id: 298, enunciado: &quot;&quot;, opciones: [&quot;&quot;, &quot;&quot;, &quot;&quot;, &quot;&quot;], correcta:  -1, observaciones: &quot;&quot; },">
            <text:p><text:s/>{ id: 29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0]&amp; CHAR(34) &amp; &quot;, opciones: [&quot;&amp; CHAR(34)&amp;[Hoja1.B300]&amp; CHAR(34)&amp;&quot;, &quot;&amp; CHAR(34)&amp;[Hoja1.C300]&amp; CHAR(34)&amp;&quot;, &quot;&amp; CHAR(34)&amp;[Hoja1.D300]&amp; CHAR(34)&amp;&quot;, &quot;&amp; CHAR(34)&amp;[Hoja1.E300]&amp; CHAR(34)&amp;&quot;], correcta:  &quot;&amp;[Hoja1.F300]-1&amp; &quot;, observaciones: &quot; &amp; CHAR(34)&amp;[Hoja1.G300]&amp; CHAR(34) &amp; &quot; },&quot;" office:value-type="string" office:string-value=" { id: 299, enunciado: &quot;&quot;, opciones: [&quot;&quot;, &quot;&quot;, &quot;&quot;, &quot;&quot;], correcta:  -1, observaciones: &quot;&quot; },">
            <text:p><text:s/>{ id: 29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1]&amp; CHAR(34) &amp; &quot;, opciones: [&quot;&amp; CHAR(34)&amp;[Hoja1.B301]&amp; CHAR(34)&amp;&quot;, &quot;&amp; CHAR(34)&amp;[Hoja1.C301]&amp; CHAR(34)&amp;&quot;, &quot;&amp; CHAR(34)&amp;[Hoja1.D301]&amp; CHAR(34)&amp;&quot;, &quot;&amp; CHAR(34)&amp;[Hoja1.E301]&amp; CHAR(34)&amp;&quot;], correcta:  &quot;&amp;[Hoja1.F301]-1&amp; &quot;, observaciones: &quot; &amp; CHAR(34)&amp;[Hoja1.G301]&amp; CHAR(34) &amp; &quot; },&quot;" office:value-type="string" office:string-value=" { id: 300, enunciado: &quot;&quot;, opciones: [&quot;&quot;, &quot;&quot;, &quot;&quot;, &quot;&quot;], correcta:  -1, observaciones: &quot;&quot; },">
            <text:p><text:s/>{ id: 30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2]&amp; CHAR(34) &amp; &quot;, opciones: [&quot;&amp; CHAR(34)&amp;[Hoja1.B302]&amp; CHAR(34)&amp;&quot;, &quot;&amp; CHAR(34)&amp;[Hoja1.C302]&amp; CHAR(34)&amp;&quot;, &quot;&amp; CHAR(34)&amp;[Hoja1.D302]&amp; CHAR(34)&amp;&quot;, &quot;&amp; CHAR(34)&amp;[Hoja1.E302]&amp; CHAR(34)&amp;&quot;], correcta:  &quot;&amp;[Hoja1.F302]-1&amp; &quot;, observaciones: &quot; &amp; CHAR(34)&amp;[Hoja1.G302]&amp; CHAR(34) &amp; &quot; },&quot;" office:value-type="string" office:string-value=" { id: 301, enunciado: &quot;&quot;, opciones: [&quot;&quot;, &quot;&quot;, &quot;&quot;, &quot;&quot;], correcta:  -1, observaciones: &quot;&quot; },">
            <text:p><text:s/>{ id: 30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3]&amp; CHAR(34) &amp; &quot;, opciones: [&quot;&amp; CHAR(34)&amp;[Hoja1.B303]&amp; CHAR(34)&amp;&quot;, &quot;&amp; CHAR(34)&amp;[Hoja1.C303]&amp; CHAR(34)&amp;&quot;, &quot;&amp; CHAR(34)&amp;[Hoja1.D303]&amp; CHAR(34)&amp;&quot;, &quot;&amp; CHAR(34)&amp;[Hoja1.E303]&amp; CHAR(34)&amp;&quot;], correcta:  &quot;&amp;[Hoja1.F303]-1&amp; &quot;, observaciones: &quot; &amp; CHAR(34)&amp;[Hoja1.G303]&amp; CHAR(34) &amp; &quot; },&quot;" office:value-type="string" office:string-value=" { id: 302, enunciado: &quot;&quot;, opciones: [&quot;&quot;, &quot;&quot;, &quot;&quot;, &quot;&quot;], correcta:  -1, observaciones: &quot;&quot; },">
            <text:p><text:s/>{ id: 30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4]&amp; CHAR(34) &amp; &quot;, opciones: [&quot;&amp; CHAR(34)&amp;[Hoja1.B304]&amp; CHAR(34)&amp;&quot;, &quot;&amp; CHAR(34)&amp;[Hoja1.C304]&amp; CHAR(34)&amp;&quot;, &quot;&amp; CHAR(34)&amp;[Hoja1.D304]&amp; CHAR(34)&amp;&quot;, &quot;&amp; CHAR(34)&amp;[Hoja1.E304]&amp; CHAR(34)&amp;&quot;], correcta:  &quot;&amp;[Hoja1.F304]-1&amp; &quot;, observaciones: &quot; &amp; CHAR(34)&amp;[Hoja1.G304]&amp; CHAR(34) &amp; &quot; },&quot;" office:value-type="string" office:string-value=" { id: 303, enunciado: &quot;&quot;, opciones: [&quot;&quot;, &quot;&quot;, &quot;&quot;, &quot;&quot;], correcta:  -1, observaciones: &quot;&quot; },">
            <text:p><text:s/>{ id: 30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5]&amp; CHAR(34) &amp; &quot;, opciones: [&quot;&amp; CHAR(34)&amp;[Hoja1.B305]&amp; CHAR(34)&amp;&quot;, &quot;&amp; CHAR(34)&amp;[Hoja1.C305]&amp; CHAR(34)&amp;&quot;, &quot;&amp; CHAR(34)&amp;[Hoja1.D305]&amp; CHAR(34)&amp;&quot;, &quot;&amp; CHAR(34)&amp;[Hoja1.E305]&amp; CHAR(34)&amp;&quot;], correcta:  &quot;&amp;[Hoja1.F305]-1&amp; &quot;, observaciones: &quot; &amp; CHAR(34)&amp;[Hoja1.G305]&amp; CHAR(34) &amp; &quot; },&quot;" office:value-type="string" office:string-value=" { id: 304, enunciado: &quot;&quot;, opciones: [&quot;&quot;, &quot;&quot;, &quot;&quot;, &quot;&quot;], correcta:  -1, observaciones: &quot;&quot; },">
            <text:p><text:s/>{ id: 30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6]&amp; CHAR(34) &amp; &quot;, opciones: [&quot;&amp; CHAR(34)&amp;[Hoja1.B306]&amp; CHAR(34)&amp;&quot;, &quot;&amp; CHAR(34)&amp;[Hoja1.C306]&amp; CHAR(34)&amp;&quot;, &quot;&amp; CHAR(34)&amp;[Hoja1.D306]&amp; CHAR(34)&amp;&quot;, &quot;&amp; CHAR(34)&amp;[Hoja1.E306]&amp; CHAR(34)&amp;&quot;], correcta:  &quot;&amp;[Hoja1.F306]-1&amp; &quot;, observaciones: &quot; &amp; CHAR(34)&amp;[Hoja1.G306]&amp; CHAR(34) &amp; &quot; },&quot;" office:value-type="string" office:string-value=" { id: 305, enunciado: &quot;&quot;, opciones: [&quot;&quot;, &quot;&quot;, &quot;&quot;, &quot;&quot;], correcta:  -1, observaciones: &quot;&quot; },">
            <text:p><text:s/>{ id: 30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7]&amp; CHAR(34) &amp; &quot;, opciones: [&quot;&amp; CHAR(34)&amp;[Hoja1.B307]&amp; CHAR(34)&amp;&quot;, &quot;&amp; CHAR(34)&amp;[Hoja1.C307]&amp; CHAR(34)&amp;&quot;, &quot;&amp; CHAR(34)&amp;[Hoja1.D307]&amp; CHAR(34)&amp;&quot;, &quot;&amp; CHAR(34)&amp;[Hoja1.E307]&amp; CHAR(34)&amp;&quot;], correcta:  &quot;&amp;[Hoja1.F307]-1&amp; &quot;, observaciones: &quot; &amp; CHAR(34)&amp;[Hoja1.G307]&amp; CHAR(34) &amp; &quot; },&quot;" office:value-type="string" office:string-value=" { id: 306, enunciado: &quot;&quot;, opciones: [&quot;&quot;, &quot;&quot;, &quot;&quot;, &quot;&quot;], correcta:  -1, observaciones: &quot;&quot; },">
            <text:p><text:s/>{ id: 30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8]&amp; CHAR(34) &amp; &quot;, opciones: [&quot;&amp; CHAR(34)&amp;[Hoja1.B308]&amp; CHAR(34)&amp;&quot;, &quot;&amp; CHAR(34)&amp;[Hoja1.C308]&amp; CHAR(34)&amp;&quot;, &quot;&amp; CHAR(34)&amp;[Hoja1.D308]&amp; CHAR(34)&amp;&quot;, &quot;&amp; CHAR(34)&amp;[Hoja1.E308]&amp; CHAR(34)&amp;&quot;], correcta:  &quot;&amp;[Hoja1.F308]-1&amp; &quot;, observaciones: &quot; &amp; CHAR(34)&amp;[Hoja1.G308]&amp; CHAR(34) &amp; &quot; },&quot;" office:value-type="string" office:string-value=" { id: 307, enunciado: &quot;&quot;, opciones: [&quot;&quot;, &quot;&quot;, &quot;&quot;, &quot;&quot;], correcta:  -1, observaciones: &quot;&quot; },">
            <text:p><text:s/>{ id: 30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09]&amp; CHAR(34) &amp; &quot;, opciones: [&quot;&amp; CHAR(34)&amp;[Hoja1.B309]&amp; CHAR(34)&amp;&quot;, &quot;&amp; CHAR(34)&amp;[Hoja1.C309]&amp; CHAR(34)&amp;&quot;, &quot;&amp; CHAR(34)&amp;[Hoja1.D309]&amp; CHAR(34)&amp;&quot;, &quot;&amp; CHAR(34)&amp;[Hoja1.E309]&amp; CHAR(34)&amp;&quot;], correcta:  &quot;&amp;[Hoja1.F309]-1&amp; &quot;, observaciones: &quot; &amp; CHAR(34)&amp;[Hoja1.G309]&amp; CHAR(34) &amp; &quot; },&quot;" office:value-type="string" office:string-value=" { id: 308, enunciado: &quot;&quot;, opciones: [&quot;&quot;, &quot;&quot;, &quot;&quot;, &quot;&quot;], correcta:  -1, observaciones: &quot;&quot; },">
            <text:p><text:s/>{ id: 30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0]&amp; CHAR(34) &amp; &quot;, opciones: [&quot;&amp; CHAR(34)&amp;[Hoja1.B310]&amp; CHAR(34)&amp;&quot;, &quot;&amp; CHAR(34)&amp;[Hoja1.C310]&amp; CHAR(34)&amp;&quot;, &quot;&amp; CHAR(34)&amp;[Hoja1.D310]&amp; CHAR(34)&amp;&quot;, &quot;&amp; CHAR(34)&amp;[Hoja1.E310]&amp; CHAR(34)&amp;&quot;], correcta:  &quot;&amp;[Hoja1.F310]-1&amp; &quot;, observaciones: &quot; &amp; CHAR(34)&amp;[Hoja1.G310]&amp; CHAR(34) &amp; &quot; },&quot;" office:value-type="string" office:string-value=" { id: 309, enunciado: &quot;&quot;, opciones: [&quot;&quot;, &quot;&quot;, &quot;&quot;, &quot;&quot;], correcta:  -1, observaciones: &quot;&quot; },">
            <text:p><text:s/>{ id: 30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1]&amp; CHAR(34) &amp; &quot;, opciones: [&quot;&amp; CHAR(34)&amp;[Hoja1.B311]&amp; CHAR(34)&amp;&quot;, &quot;&amp; CHAR(34)&amp;[Hoja1.C311]&amp; CHAR(34)&amp;&quot;, &quot;&amp; CHAR(34)&amp;[Hoja1.D311]&amp; CHAR(34)&amp;&quot;, &quot;&amp; CHAR(34)&amp;[Hoja1.E311]&amp; CHAR(34)&amp;&quot;], correcta:  &quot;&amp;[Hoja1.F311]-1&amp; &quot;, observaciones: &quot; &amp; CHAR(34)&amp;[Hoja1.G311]&amp; CHAR(34) &amp; &quot; },&quot;" office:value-type="string" office:string-value=" { id: 310, enunciado: &quot;&quot;, opciones: [&quot;&quot;, &quot;&quot;, &quot;&quot;, &quot;&quot;], correcta:  -1, observaciones: &quot;&quot; },">
            <text:p><text:s/>{ id: 31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2]&amp; CHAR(34) &amp; &quot;, opciones: [&quot;&amp; CHAR(34)&amp;[Hoja1.B312]&amp; CHAR(34)&amp;&quot;, &quot;&amp; CHAR(34)&amp;[Hoja1.C312]&amp; CHAR(34)&amp;&quot;, &quot;&amp; CHAR(34)&amp;[Hoja1.D312]&amp; CHAR(34)&amp;&quot;, &quot;&amp; CHAR(34)&amp;[Hoja1.E312]&amp; CHAR(34)&amp;&quot;], correcta:  &quot;&amp;[Hoja1.F312]-1&amp; &quot;, observaciones: &quot; &amp; CHAR(34)&amp;[Hoja1.G312]&amp; CHAR(34) &amp; &quot; },&quot;" office:value-type="string" office:string-value=" { id: 311, enunciado: &quot;&quot;, opciones: [&quot;&quot;, &quot;&quot;, &quot;&quot;, &quot;&quot;], correcta:  -1, observaciones: &quot;&quot; },">
            <text:p><text:s/>{ id: 31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3]&amp; CHAR(34) &amp; &quot;, opciones: [&quot;&amp; CHAR(34)&amp;[Hoja1.B313]&amp; CHAR(34)&amp;&quot;, &quot;&amp; CHAR(34)&amp;[Hoja1.C313]&amp; CHAR(34)&amp;&quot;, &quot;&amp; CHAR(34)&amp;[Hoja1.D313]&amp; CHAR(34)&amp;&quot;, &quot;&amp; CHAR(34)&amp;[Hoja1.E313]&amp; CHAR(34)&amp;&quot;], correcta:  &quot;&amp;[Hoja1.F313]-1&amp; &quot;, observaciones: &quot; &amp; CHAR(34)&amp;[Hoja1.G313]&amp; CHAR(34) &amp; &quot; },&quot;" office:value-type="string" office:string-value=" { id: 312, enunciado: &quot;&quot;, opciones: [&quot;&quot;, &quot;&quot;, &quot;&quot;, &quot;&quot;], correcta:  -1, observaciones: &quot;&quot; },">
            <text:p><text:s/>{ id: 31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4]&amp; CHAR(34) &amp; &quot;, opciones: [&quot;&amp; CHAR(34)&amp;[Hoja1.B314]&amp; CHAR(34)&amp;&quot;, &quot;&amp; CHAR(34)&amp;[Hoja1.C314]&amp; CHAR(34)&amp;&quot;, &quot;&amp; CHAR(34)&amp;[Hoja1.D314]&amp; CHAR(34)&amp;&quot;, &quot;&amp; CHAR(34)&amp;[Hoja1.E314]&amp; CHAR(34)&amp;&quot;], correcta:  &quot;&amp;[Hoja1.F314]-1&amp; &quot;, observaciones: &quot; &amp; CHAR(34)&amp;[Hoja1.G314]&amp; CHAR(34) &amp; &quot; },&quot;" office:value-type="string" office:string-value=" { id: 313, enunciado: &quot;&quot;, opciones: [&quot;&quot;, &quot;&quot;, &quot;&quot;, &quot;&quot;], correcta:  -1, observaciones: &quot;&quot; },">
            <text:p><text:s/>{ id: 31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5]&amp; CHAR(34) &amp; &quot;, opciones: [&quot;&amp; CHAR(34)&amp;[Hoja1.B315]&amp; CHAR(34)&amp;&quot;, &quot;&amp; CHAR(34)&amp;[Hoja1.C315]&amp; CHAR(34)&amp;&quot;, &quot;&amp; CHAR(34)&amp;[Hoja1.D315]&amp; CHAR(34)&amp;&quot;, &quot;&amp; CHAR(34)&amp;[Hoja1.E315]&amp; CHAR(34)&amp;&quot;], correcta:  &quot;&amp;[Hoja1.F315]-1&amp; &quot;, observaciones: &quot; &amp; CHAR(34)&amp;[Hoja1.G315]&amp; CHAR(34) &amp; &quot; },&quot;" office:value-type="string" office:string-value=" { id: 314, enunciado: &quot;&quot;, opciones: [&quot;&quot;, &quot;&quot;, &quot;&quot;, &quot;&quot;], correcta:  -1, observaciones: &quot;&quot; },">
            <text:p><text:s/>{ id: 31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6]&amp; CHAR(34) &amp; &quot;, opciones: [&quot;&amp; CHAR(34)&amp;[Hoja1.B316]&amp; CHAR(34)&amp;&quot;, &quot;&amp; CHAR(34)&amp;[Hoja1.C316]&amp; CHAR(34)&amp;&quot;, &quot;&amp; CHAR(34)&amp;[Hoja1.D316]&amp; CHAR(34)&amp;&quot;, &quot;&amp; CHAR(34)&amp;[Hoja1.E316]&amp; CHAR(34)&amp;&quot;], correcta:  &quot;&amp;[Hoja1.F316]-1&amp; &quot;, observaciones: &quot; &amp; CHAR(34)&amp;[Hoja1.G316]&amp; CHAR(34) &amp; &quot; },&quot;" office:value-type="string" office:string-value=" { id: 315, enunciado: &quot;&quot;, opciones: [&quot;&quot;, &quot;&quot;, &quot;&quot;, &quot;&quot;], correcta:  -1, observaciones: &quot;&quot; },">
            <text:p><text:s/>{ id: 31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7]&amp; CHAR(34) &amp; &quot;, opciones: [&quot;&amp; CHAR(34)&amp;[Hoja1.B317]&amp; CHAR(34)&amp;&quot;, &quot;&amp; CHAR(34)&amp;[Hoja1.C317]&amp; CHAR(34)&amp;&quot;, &quot;&amp; CHAR(34)&amp;[Hoja1.D317]&amp; CHAR(34)&amp;&quot;, &quot;&amp; CHAR(34)&amp;[Hoja1.E317]&amp; CHAR(34)&amp;&quot;], correcta:  &quot;&amp;[Hoja1.F317]-1&amp; &quot;, observaciones: &quot; &amp; CHAR(34)&amp;[Hoja1.G317]&amp; CHAR(34) &amp; &quot; },&quot;" office:value-type="string" office:string-value=" { id: 316, enunciado: &quot;&quot;, opciones: [&quot;&quot;, &quot;&quot;, &quot;&quot;, &quot;&quot;], correcta:  -1, observaciones: &quot;&quot; },">
            <text:p><text:s/>{ id: 31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8]&amp; CHAR(34) &amp; &quot;, opciones: [&quot;&amp; CHAR(34)&amp;[Hoja1.B318]&amp; CHAR(34)&amp;&quot;, &quot;&amp; CHAR(34)&amp;[Hoja1.C318]&amp; CHAR(34)&amp;&quot;, &quot;&amp; CHAR(34)&amp;[Hoja1.D318]&amp; CHAR(34)&amp;&quot;, &quot;&amp; CHAR(34)&amp;[Hoja1.E318]&amp; CHAR(34)&amp;&quot;], correcta:  &quot;&amp;[Hoja1.F318]-1&amp; &quot;, observaciones: &quot; &amp; CHAR(34)&amp;[Hoja1.G318]&amp; CHAR(34) &amp; &quot; },&quot;" office:value-type="string" office:string-value=" { id: 317, enunciado: &quot;&quot;, opciones: [&quot;&quot;, &quot;&quot;, &quot;&quot;, &quot;&quot;], correcta:  -1, observaciones: &quot;&quot; },">
            <text:p><text:s/>{ id: 31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19]&amp; CHAR(34) &amp; &quot;, opciones: [&quot;&amp; CHAR(34)&amp;[Hoja1.B319]&amp; CHAR(34)&amp;&quot;, &quot;&amp; CHAR(34)&amp;[Hoja1.C319]&amp; CHAR(34)&amp;&quot;, &quot;&amp; CHAR(34)&amp;[Hoja1.D319]&amp; CHAR(34)&amp;&quot;, &quot;&amp; CHAR(34)&amp;[Hoja1.E319]&amp; CHAR(34)&amp;&quot;], correcta:  &quot;&amp;[Hoja1.F319]-1&amp; &quot;, observaciones: &quot; &amp; CHAR(34)&amp;[Hoja1.G319]&amp; CHAR(34) &amp; &quot; },&quot;" office:value-type="string" office:string-value=" { id: 318, enunciado: &quot;&quot;, opciones: [&quot;&quot;, &quot;&quot;, &quot;&quot;, &quot;&quot;], correcta:  -1, observaciones: &quot;&quot; },">
            <text:p><text:s/>{ id: 31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0]&amp; CHAR(34) &amp; &quot;, opciones: [&quot;&amp; CHAR(34)&amp;[Hoja1.B320]&amp; CHAR(34)&amp;&quot;, &quot;&amp; CHAR(34)&amp;[Hoja1.C320]&amp; CHAR(34)&amp;&quot;, &quot;&amp; CHAR(34)&amp;[Hoja1.D320]&amp; CHAR(34)&amp;&quot;, &quot;&amp; CHAR(34)&amp;[Hoja1.E320]&amp; CHAR(34)&amp;&quot;], correcta:  &quot;&amp;[Hoja1.F320]-1&amp; &quot;, observaciones: &quot; &amp; CHAR(34)&amp;[Hoja1.G320]&amp; CHAR(34) &amp; &quot; },&quot;" office:value-type="string" office:string-value=" { id: 319, enunciado: &quot;&quot;, opciones: [&quot;&quot;, &quot;&quot;, &quot;&quot;, &quot;&quot;], correcta:  -1, observaciones: &quot;&quot; },">
            <text:p><text:s/>{ id: 31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1]&amp; CHAR(34) &amp; &quot;, opciones: [&quot;&amp; CHAR(34)&amp;[Hoja1.B321]&amp; CHAR(34)&amp;&quot;, &quot;&amp; CHAR(34)&amp;[Hoja1.C321]&amp; CHAR(34)&amp;&quot;, &quot;&amp; CHAR(34)&amp;[Hoja1.D321]&amp; CHAR(34)&amp;&quot;, &quot;&amp; CHAR(34)&amp;[Hoja1.E321]&amp; CHAR(34)&amp;&quot;], correcta:  &quot;&amp;[Hoja1.F321]-1&amp; &quot;, observaciones: &quot; &amp; CHAR(34)&amp;[Hoja1.G321]&amp; CHAR(34) &amp; &quot; },&quot;" office:value-type="string" office:string-value=" { id: 320, enunciado: &quot;&quot;, opciones: [&quot;&quot;, &quot;&quot;, &quot;&quot;, &quot;&quot;], correcta:  -1, observaciones: &quot;&quot; },">
            <text:p><text:s/>{ id: 32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2]&amp; CHAR(34) &amp; &quot;, opciones: [&quot;&amp; CHAR(34)&amp;[Hoja1.B322]&amp; CHAR(34)&amp;&quot;, &quot;&amp; CHAR(34)&amp;[Hoja1.C322]&amp; CHAR(34)&amp;&quot;, &quot;&amp; CHAR(34)&amp;[Hoja1.D322]&amp; CHAR(34)&amp;&quot;, &quot;&amp; CHAR(34)&amp;[Hoja1.E322]&amp; CHAR(34)&amp;&quot;], correcta:  &quot;&amp;[Hoja1.F322]-1&amp; &quot;, observaciones: &quot; &amp; CHAR(34)&amp;[Hoja1.G322]&amp; CHAR(34) &amp; &quot; },&quot;" office:value-type="string" office:string-value=" { id: 321, enunciado: &quot;&quot;, opciones: [&quot;&quot;, &quot;&quot;, &quot;&quot;, &quot;&quot;], correcta:  -1, observaciones: &quot;&quot; },">
            <text:p><text:s/>{ id: 32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3]&amp; CHAR(34) &amp; &quot;, opciones: [&quot;&amp; CHAR(34)&amp;[Hoja1.B323]&amp; CHAR(34)&amp;&quot;, &quot;&amp; CHAR(34)&amp;[Hoja1.C323]&amp; CHAR(34)&amp;&quot;, &quot;&amp; CHAR(34)&amp;[Hoja1.D323]&amp; CHAR(34)&amp;&quot;, &quot;&amp; CHAR(34)&amp;[Hoja1.E323]&amp; CHAR(34)&amp;&quot;], correcta:  &quot;&amp;[Hoja1.F323]-1&amp; &quot;, observaciones: &quot; &amp; CHAR(34)&amp;[Hoja1.G323]&amp; CHAR(34) &amp; &quot; },&quot;" office:value-type="string" office:string-value=" { id: 322, enunciado: &quot;&quot;, opciones: [&quot;&quot;, &quot;&quot;, &quot;&quot;, &quot;&quot;], correcta:  -1, observaciones: &quot;&quot; },">
            <text:p><text:s/>{ id: 32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4]&amp; CHAR(34) &amp; &quot;, opciones: [&quot;&amp; CHAR(34)&amp;[Hoja1.B324]&amp; CHAR(34)&amp;&quot;, &quot;&amp; CHAR(34)&amp;[Hoja1.C324]&amp; CHAR(34)&amp;&quot;, &quot;&amp; CHAR(34)&amp;[Hoja1.D324]&amp; CHAR(34)&amp;&quot;, &quot;&amp; CHAR(34)&amp;[Hoja1.E324]&amp; CHAR(34)&amp;&quot;], correcta:  &quot;&amp;[Hoja1.F324]-1&amp; &quot;, observaciones: &quot; &amp; CHAR(34)&amp;[Hoja1.G324]&amp; CHAR(34) &amp; &quot; },&quot;" office:value-type="string" office:string-value=" { id: 323, enunciado: &quot;&quot;, opciones: [&quot;&quot;, &quot;&quot;, &quot;&quot;, &quot;&quot;], correcta:  -1, observaciones: &quot;&quot; },">
            <text:p><text:s/>{ id: 32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5]&amp; CHAR(34) &amp; &quot;, opciones: [&quot;&amp; CHAR(34)&amp;[Hoja1.B325]&amp; CHAR(34)&amp;&quot;, &quot;&amp; CHAR(34)&amp;[Hoja1.C325]&amp; CHAR(34)&amp;&quot;, &quot;&amp; CHAR(34)&amp;[Hoja1.D325]&amp; CHAR(34)&amp;&quot;, &quot;&amp; CHAR(34)&amp;[Hoja1.E325]&amp; CHAR(34)&amp;&quot;], correcta:  &quot;&amp;[Hoja1.F325]-1&amp; &quot;, observaciones: &quot; &amp; CHAR(34)&amp;[Hoja1.G325]&amp; CHAR(34) &amp; &quot; },&quot;" office:value-type="string" office:string-value=" { id: 324, enunciado: &quot;&quot;, opciones: [&quot;&quot;, &quot;&quot;, &quot;&quot;, &quot;&quot;], correcta:  -1, observaciones: &quot;&quot; },">
            <text:p><text:s/>{ id: 32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6]&amp; CHAR(34) &amp; &quot;, opciones: [&quot;&amp; CHAR(34)&amp;[Hoja1.B326]&amp; CHAR(34)&amp;&quot;, &quot;&amp; CHAR(34)&amp;[Hoja1.C326]&amp; CHAR(34)&amp;&quot;, &quot;&amp; CHAR(34)&amp;[Hoja1.D326]&amp; CHAR(34)&amp;&quot;, &quot;&amp; CHAR(34)&amp;[Hoja1.E326]&amp; CHAR(34)&amp;&quot;], correcta:  &quot;&amp;[Hoja1.F326]-1&amp; &quot;, observaciones: &quot; &amp; CHAR(34)&amp;[Hoja1.G326]&amp; CHAR(34) &amp; &quot; },&quot;" office:value-type="string" office:string-value=" { id: 325, enunciado: &quot;&quot;, opciones: [&quot;&quot;, &quot;&quot;, &quot;&quot;, &quot;&quot;], correcta:  -1, observaciones: &quot;&quot; },">
            <text:p><text:s/>{ id: 32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7]&amp; CHAR(34) &amp; &quot;, opciones: [&quot;&amp; CHAR(34)&amp;[Hoja1.B327]&amp; CHAR(34)&amp;&quot;, &quot;&amp; CHAR(34)&amp;[Hoja1.C327]&amp; CHAR(34)&amp;&quot;, &quot;&amp; CHAR(34)&amp;[Hoja1.D327]&amp; CHAR(34)&amp;&quot;, &quot;&amp; CHAR(34)&amp;[Hoja1.E327]&amp; CHAR(34)&amp;&quot;], correcta:  &quot;&amp;[Hoja1.F327]-1&amp; &quot;, observaciones: &quot; &amp; CHAR(34)&amp;[Hoja1.G327]&amp; CHAR(34) &amp; &quot; },&quot;" office:value-type="string" office:string-value=" { id: 326, enunciado: &quot;&quot;, opciones: [&quot;&quot;, &quot;&quot;, &quot;&quot;, &quot;&quot;], correcta:  -1, observaciones: &quot;&quot; },">
            <text:p><text:s/>{ id: 32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8]&amp; CHAR(34) &amp; &quot;, opciones: [&quot;&amp; CHAR(34)&amp;[Hoja1.B328]&amp; CHAR(34)&amp;&quot;, &quot;&amp; CHAR(34)&amp;[Hoja1.C328]&amp; CHAR(34)&amp;&quot;, &quot;&amp; CHAR(34)&amp;[Hoja1.D328]&amp; CHAR(34)&amp;&quot;, &quot;&amp; CHAR(34)&amp;[Hoja1.E328]&amp; CHAR(34)&amp;&quot;], correcta:  &quot;&amp;[Hoja1.F328]-1&amp; &quot;, observaciones: &quot; &amp; CHAR(34)&amp;[Hoja1.G328]&amp; CHAR(34) &amp; &quot; },&quot;" office:value-type="string" office:string-value=" { id: 327, enunciado: &quot;&quot;, opciones: [&quot;&quot;, &quot;&quot;, &quot;&quot;, &quot;&quot;], correcta:  -1, observaciones: &quot;&quot; },">
            <text:p><text:s/>{ id: 32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29]&amp; CHAR(34) &amp; &quot;, opciones: [&quot;&amp; CHAR(34)&amp;[Hoja1.B329]&amp; CHAR(34)&amp;&quot;, &quot;&amp; CHAR(34)&amp;[Hoja1.C329]&amp; CHAR(34)&amp;&quot;, &quot;&amp; CHAR(34)&amp;[Hoja1.D329]&amp; CHAR(34)&amp;&quot;, &quot;&amp; CHAR(34)&amp;[Hoja1.E329]&amp; CHAR(34)&amp;&quot;], correcta:  &quot;&amp;[Hoja1.F329]-1&amp; &quot;, observaciones: &quot; &amp; CHAR(34)&amp;[Hoja1.G329]&amp; CHAR(34) &amp; &quot; },&quot;" office:value-type="string" office:string-value=" { id: 328, enunciado: &quot;&quot;, opciones: [&quot;&quot;, &quot;&quot;, &quot;&quot;, &quot;&quot;], correcta:  -1, observaciones: &quot;&quot; },">
            <text:p><text:s/>{ id: 32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0]&amp; CHAR(34) &amp; &quot;, opciones: [&quot;&amp; CHAR(34)&amp;[Hoja1.B330]&amp; CHAR(34)&amp;&quot;, &quot;&amp; CHAR(34)&amp;[Hoja1.C330]&amp; CHAR(34)&amp;&quot;, &quot;&amp; CHAR(34)&amp;[Hoja1.D330]&amp; CHAR(34)&amp;&quot;, &quot;&amp; CHAR(34)&amp;[Hoja1.E330]&amp; CHAR(34)&amp;&quot;], correcta:  &quot;&amp;[Hoja1.F330]-1&amp; &quot;, observaciones: &quot; &amp; CHAR(34)&amp;[Hoja1.G330]&amp; CHAR(34) &amp; &quot; },&quot;" office:value-type="string" office:string-value=" { id: 329, enunciado: &quot;&quot;, opciones: [&quot;&quot;, &quot;&quot;, &quot;&quot;, &quot;&quot;], correcta:  -1, observaciones: &quot;&quot; },">
            <text:p><text:s/>{ id: 32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1]&amp; CHAR(34) &amp; &quot;, opciones: [&quot;&amp; CHAR(34)&amp;[Hoja1.B331]&amp; CHAR(34)&amp;&quot;, &quot;&amp; CHAR(34)&amp;[Hoja1.C331]&amp; CHAR(34)&amp;&quot;, &quot;&amp; CHAR(34)&amp;[Hoja1.D331]&amp; CHAR(34)&amp;&quot;, &quot;&amp; CHAR(34)&amp;[Hoja1.E331]&amp; CHAR(34)&amp;&quot;], correcta:  &quot;&amp;[Hoja1.F331]-1&amp; &quot;, observaciones: &quot; &amp; CHAR(34)&amp;[Hoja1.G331]&amp; CHAR(34) &amp; &quot; },&quot;" office:value-type="string" office:string-value=" { id: 330, enunciado: &quot;&quot;, opciones: [&quot;&quot;, &quot;&quot;, &quot;&quot;, &quot;&quot;], correcta:  -1, observaciones: &quot;&quot; },">
            <text:p><text:s/>{ id: 33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2]&amp; CHAR(34) &amp; &quot;, opciones: [&quot;&amp; CHAR(34)&amp;[Hoja1.B332]&amp; CHAR(34)&amp;&quot;, &quot;&amp; CHAR(34)&amp;[Hoja1.C332]&amp; CHAR(34)&amp;&quot;, &quot;&amp; CHAR(34)&amp;[Hoja1.D332]&amp; CHAR(34)&amp;&quot;, &quot;&amp; CHAR(34)&amp;[Hoja1.E332]&amp; CHAR(34)&amp;&quot;], correcta:  &quot;&amp;[Hoja1.F332]-1&amp; &quot;, observaciones: &quot; &amp; CHAR(34)&amp;[Hoja1.G332]&amp; CHAR(34) &amp; &quot; },&quot;" office:value-type="string" office:string-value=" { id: 331, enunciado: &quot;&quot;, opciones: [&quot;&quot;, &quot;&quot;, &quot;&quot;, &quot;&quot;], correcta:  -1, observaciones: &quot;&quot; },">
            <text:p><text:s/>{ id: 33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3]&amp; CHAR(34) &amp; &quot;, opciones: [&quot;&amp; CHAR(34)&amp;[Hoja1.B333]&amp; CHAR(34)&amp;&quot;, &quot;&amp; CHAR(34)&amp;[Hoja1.C333]&amp; CHAR(34)&amp;&quot;, &quot;&amp; CHAR(34)&amp;[Hoja1.D333]&amp; CHAR(34)&amp;&quot;, &quot;&amp; CHAR(34)&amp;[Hoja1.E333]&amp; CHAR(34)&amp;&quot;], correcta:  &quot;&amp;[Hoja1.F333]-1&amp; &quot;, observaciones: &quot; &amp; CHAR(34)&amp;[Hoja1.G333]&amp; CHAR(34) &amp; &quot; },&quot;" office:value-type="string" office:string-value=" { id: 332, enunciado: &quot;&quot;, opciones: [&quot;&quot;, &quot;&quot;, &quot;&quot;, &quot;&quot;], correcta:  -1, observaciones: &quot;&quot; },">
            <text:p><text:s/>{ id: 33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4]&amp; CHAR(34) &amp; &quot;, opciones: [&quot;&amp; CHAR(34)&amp;[Hoja1.B334]&amp; CHAR(34)&amp;&quot;, &quot;&amp; CHAR(34)&amp;[Hoja1.C334]&amp; CHAR(34)&amp;&quot;, &quot;&amp; CHAR(34)&amp;[Hoja1.D334]&amp; CHAR(34)&amp;&quot;, &quot;&amp; CHAR(34)&amp;[Hoja1.E334]&amp; CHAR(34)&amp;&quot;], correcta:  &quot;&amp;[Hoja1.F334]-1&amp; &quot;, observaciones: &quot; &amp; CHAR(34)&amp;[Hoja1.G334]&amp; CHAR(34) &amp; &quot; },&quot;" office:value-type="string" office:string-value=" { id: 333, enunciado: &quot;&quot;, opciones: [&quot;&quot;, &quot;&quot;, &quot;&quot;, &quot;&quot;], correcta:  -1, observaciones: &quot;&quot; },">
            <text:p><text:s/>{ id: 33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5]&amp; CHAR(34) &amp; &quot;, opciones: [&quot;&amp; CHAR(34)&amp;[Hoja1.B335]&amp; CHAR(34)&amp;&quot;, &quot;&amp; CHAR(34)&amp;[Hoja1.C335]&amp; CHAR(34)&amp;&quot;, &quot;&amp; CHAR(34)&amp;[Hoja1.D335]&amp; CHAR(34)&amp;&quot;, &quot;&amp; CHAR(34)&amp;[Hoja1.E335]&amp; CHAR(34)&amp;&quot;], correcta:  &quot;&amp;[Hoja1.F335]-1&amp; &quot;, observaciones: &quot; &amp; CHAR(34)&amp;[Hoja1.G335]&amp; CHAR(34) &amp; &quot; },&quot;" office:value-type="string" office:string-value=" { id: 334, enunciado: &quot;&quot;, opciones: [&quot;&quot;, &quot;&quot;, &quot;&quot;, &quot;&quot;], correcta:  -1, observaciones: &quot;&quot; },">
            <text:p><text:s/>{ id: 33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6]&amp; CHAR(34) &amp; &quot;, opciones: [&quot;&amp; CHAR(34)&amp;[Hoja1.B336]&amp; CHAR(34)&amp;&quot;, &quot;&amp; CHAR(34)&amp;[Hoja1.C336]&amp; CHAR(34)&amp;&quot;, &quot;&amp; CHAR(34)&amp;[Hoja1.D336]&amp; CHAR(34)&amp;&quot;, &quot;&amp; CHAR(34)&amp;[Hoja1.E336]&amp; CHAR(34)&amp;&quot;], correcta:  &quot;&amp;[Hoja1.F336]-1&amp; &quot;, observaciones: &quot; &amp; CHAR(34)&amp;[Hoja1.G336]&amp; CHAR(34) &amp; &quot; },&quot;" office:value-type="string" office:string-value=" { id: 335, enunciado: &quot;&quot;, opciones: [&quot;&quot;, &quot;&quot;, &quot;&quot;, &quot;&quot;], correcta:  -1, observaciones: &quot;&quot; },">
            <text:p><text:s/>{ id: 33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7]&amp; CHAR(34) &amp; &quot;, opciones: [&quot;&amp; CHAR(34)&amp;[Hoja1.B337]&amp; CHAR(34)&amp;&quot;, &quot;&amp; CHAR(34)&amp;[Hoja1.C337]&amp; CHAR(34)&amp;&quot;, &quot;&amp; CHAR(34)&amp;[Hoja1.D337]&amp; CHAR(34)&amp;&quot;, &quot;&amp; CHAR(34)&amp;[Hoja1.E337]&amp; CHAR(34)&amp;&quot;], correcta:  &quot;&amp;[Hoja1.F337]-1&amp; &quot;, observaciones: &quot; &amp; CHAR(34)&amp;[Hoja1.G337]&amp; CHAR(34) &amp; &quot; },&quot;" office:value-type="string" office:string-value=" { id: 336, enunciado: &quot;&quot;, opciones: [&quot;&quot;, &quot;&quot;, &quot;&quot;, &quot;&quot;], correcta:  -1, observaciones: &quot;&quot; },">
            <text:p><text:s/>{ id: 33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8]&amp; CHAR(34) &amp; &quot;, opciones: [&quot;&amp; CHAR(34)&amp;[Hoja1.B338]&amp; CHAR(34)&amp;&quot;, &quot;&amp; CHAR(34)&amp;[Hoja1.C338]&amp; CHAR(34)&amp;&quot;, &quot;&amp; CHAR(34)&amp;[Hoja1.D338]&amp; CHAR(34)&amp;&quot;, &quot;&amp; CHAR(34)&amp;[Hoja1.E338]&amp; CHAR(34)&amp;&quot;], correcta:  &quot;&amp;[Hoja1.F338]-1&amp; &quot;, observaciones: &quot; &amp; CHAR(34)&amp;[Hoja1.G338]&amp; CHAR(34) &amp; &quot; },&quot;" office:value-type="string" office:string-value=" { id: 337, enunciado: &quot;&quot;, opciones: [&quot;&quot;, &quot;&quot;, &quot;&quot;, &quot;&quot;], correcta:  -1, observaciones: &quot;&quot; },">
            <text:p><text:s/>{ id: 33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39]&amp; CHAR(34) &amp; &quot;, opciones: [&quot;&amp; CHAR(34)&amp;[Hoja1.B339]&amp; CHAR(34)&amp;&quot;, &quot;&amp; CHAR(34)&amp;[Hoja1.C339]&amp; CHAR(34)&amp;&quot;, &quot;&amp; CHAR(34)&amp;[Hoja1.D339]&amp; CHAR(34)&amp;&quot;, &quot;&amp; CHAR(34)&amp;[Hoja1.E339]&amp; CHAR(34)&amp;&quot;], correcta:  &quot;&amp;[Hoja1.F339]-1&amp; &quot;, observaciones: &quot; &amp; CHAR(34)&amp;[Hoja1.G339]&amp; CHAR(34) &amp; &quot; },&quot;" office:value-type="string" office:string-value=" { id: 338, enunciado: &quot;&quot;, opciones: [&quot;&quot;, &quot;&quot;, &quot;&quot;, &quot;&quot;], correcta:  -1, observaciones: &quot;&quot; },">
            <text:p><text:s/>{ id: 33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0]&amp; CHAR(34) &amp; &quot;, opciones: [&quot;&amp; CHAR(34)&amp;[Hoja1.B340]&amp; CHAR(34)&amp;&quot;, &quot;&amp; CHAR(34)&amp;[Hoja1.C340]&amp; CHAR(34)&amp;&quot;, &quot;&amp; CHAR(34)&amp;[Hoja1.D340]&amp; CHAR(34)&amp;&quot;, &quot;&amp; CHAR(34)&amp;[Hoja1.E340]&amp; CHAR(34)&amp;&quot;], correcta:  &quot;&amp;[Hoja1.F340]-1&amp; &quot;, observaciones: &quot; &amp; CHAR(34)&amp;[Hoja1.G340]&amp; CHAR(34) &amp; &quot; },&quot;" office:value-type="string" office:string-value=" { id: 339, enunciado: &quot;&quot;, opciones: [&quot;&quot;, &quot;&quot;, &quot;&quot;, &quot;&quot;], correcta:  -1, observaciones: &quot;&quot; },">
            <text:p><text:s/>{ id: 33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1]&amp; CHAR(34) &amp; &quot;, opciones: [&quot;&amp; CHAR(34)&amp;[Hoja1.B341]&amp; CHAR(34)&amp;&quot;, &quot;&amp; CHAR(34)&amp;[Hoja1.C341]&amp; CHAR(34)&amp;&quot;, &quot;&amp; CHAR(34)&amp;[Hoja1.D341]&amp; CHAR(34)&amp;&quot;, &quot;&amp; CHAR(34)&amp;[Hoja1.E341]&amp; CHAR(34)&amp;&quot;], correcta:  &quot;&amp;[Hoja1.F341]-1&amp; &quot;, observaciones: &quot; &amp; CHAR(34)&amp;[Hoja1.G341]&amp; CHAR(34) &amp; &quot; },&quot;" office:value-type="string" office:string-value=" { id: 340, enunciado: &quot;&quot;, opciones: [&quot;&quot;, &quot;&quot;, &quot;&quot;, &quot;&quot;], correcta:  -1, observaciones: &quot;&quot; },">
            <text:p><text:s/>{ id: 34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2]&amp; CHAR(34) &amp; &quot;, opciones: [&quot;&amp; CHAR(34)&amp;[Hoja1.B342]&amp; CHAR(34)&amp;&quot;, &quot;&amp; CHAR(34)&amp;[Hoja1.C342]&amp; CHAR(34)&amp;&quot;, &quot;&amp; CHAR(34)&amp;[Hoja1.D342]&amp; CHAR(34)&amp;&quot;, &quot;&amp; CHAR(34)&amp;[Hoja1.E342]&amp; CHAR(34)&amp;&quot;], correcta:  &quot;&amp;[Hoja1.F342]-1&amp; &quot;, observaciones: &quot; &amp; CHAR(34)&amp;[Hoja1.G342]&amp; CHAR(34) &amp; &quot; },&quot;" office:value-type="string" office:string-value=" { id: 341, enunciado: &quot;&quot;, opciones: [&quot;&quot;, &quot;&quot;, &quot;&quot;, &quot;&quot;], correcta:  -1, observaciones: &quot;&quot; },">
            <text:p><text:s/>{ id: 34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3]&amp; CHAR(34) &amp; &quot;, opciones: [&quot;&amp; CHAR(34)&amp;[Hoja1.B343]&amp; CHAR(34)&amp;&quot;, &quot;&amp; CHAR(34)&amp;[Hoja1.C343]&amp; CHAR(34)&amp;&quot;, &quot;&amp; CHAR(34)&amp;[Hoja1.D343]&amp; CHAR(34)&amp;&quot;, &quot;&amp; CHAR(34)&amp;[Hoja1.E343]&amp; CHAR(34)&amp;&quot;], correcta:  &quot;&amp;[Hoja1.F343]-1&amp; &quot;, observaciones: &quot; &amp; CHAR(34)&amp;[Hoja1.G343]&amp; CHAR(34) &amp; &quot; },&quot;" office:value-type="string" office:string-value=" { id: 342, enunciado: &quot;&quot;, opciones: [&quot;&quot;, &quot;&quot;, &quot;&quot;, &quot;&quot;], correcta:  -1, observaciones: &quot;&quot; },">
            <text:p><text:s/>{ id: 34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4]&amp; CHAR(34) &amp; &quot;, opciones: [&quot;&amp; CHAR(34)&amp;[Hoja1.B344]&amp; CHAR(34)&amp;&quot;, &quot;&amp; CHAR(34)&amp;[Hoja1.C344]&amp; CHAR(34)&amp;&quot;, &quot;&amp; CHAR(34)&amp;[Hoja1.D344]&amp; CHAR(34)&amp;&quot;, &quot;&amp; CHAR(34)&amp;[Hoja1.E344]&amp; CHAR(34)&amp;&quot;], correcta:  &quot;&amp;[Hoja1.F344]-1&amp; &quot;, observaciones: &quot; &amp; CHAR(34)&amp;[Hoja1.G344]&amp; CHAR(34) &amp; &quot; },&quot;" office:value-type="string" office:string-value=" { id: 343, enunciado: &quot;&quot;, opciones: [&quot;&quot;, &quot;&quot;, &quot;&quot;, &quot;&quot;], correcta:  -1, observaciones: &quot;&quot; },">
            <text:p><text:s/>{ id: 34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5]&amp; CHAR(34) &amp; &quot;, opciones: [&quot;&amp; CHAR(34)&amp;[Hoja1.B345]&amp; CHAR(34)&amp;&quot;, &quot;&amp; CHAR(34)&amp;[Hoja1.C345]&amp; CHAR(34)&amp;&quot;, &quot;&amp; CHAR(34)&amp;[Hoja1.D345]&amp; CHAR(34)&amp;&quot;, &quot;&amp; CHAR(34)&amp;[Hoja1.E345]&amp; CHAR(34)&amp;&quot;], correcta:  &quot;&amp;[Hoja1.F345]-1&amp; &quot;, observaciones: &quot; &amp; CHAR(34)&amp;[Hoja1.G345]&amp; CHAR(34) &amp; &quot; },&quot;" office:value-type="string" office:string-value=" { id: 344, enunciado: &quot;&quot;, opciones: [&quot;&quot;, &quot;&quot;, &quot;&quot;, &quot;&quot;], correcta:  -1, observaciones: &quot;&quot; },">
            <text:p><text:s/>{ id: 34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6]&amp; CHAR(34) &amp; &quot;, opciones: [&quot;&amp; CHAR(34)&amp;[Hoja1.B346]&amp; CHAR(34)&amp;&quot;, &quot;&amp; CHAR(34)&amp;[Hoja1.C346]&amp; CHAR(34)&amp;&quot;, &quot;&amp; CHAR(34)&amp;[Hoja1.D346]&amp; CHAR(34)&amp;&quot;, &quot;&amp; CHAR(34)&amp;[Hoja1.E346]&amp; CHAR(34)&amp;&quot;], correcta:  &quot;&amp;[Hoja1.F346]-1&amp; &quot;, observaciones: &quot; &amp; CHAR(34)&amp;[Hoja1.G346]&amp; CHAR(34) &amp; &quot; },&quot;" office:value-type="string" office:string-value=" { id: 345, enunciado: &quot;&quot;, opciones: [&quot;&quot;, &quot;&quot;, &quot;&quot;, &quot;&quot;], correcta:  -1, observaciones: &quot;&quot; },">
            <text:p><text:s/>{ id: 34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7]&amp; CHAR(34) &amp; &quot;, opciones: [&quot;&amp; CHAR(34)&amp;[Hoja1.B347]&amp; CHAR(34)&amp;&quot;, &quot;&amp; CHAR(34)&amp;[Hoja1.C347]&amp; CHAR(34)&amp;&quot;, &quot;&amp; CHAR(34)&amp;[Hoja1.D347]&amp; CHAR(34)&amp;&quot;, &quot;&amp; CHAR(34)&amp;[Hoja1.E347]&amp; CHAR(34)&amp;&quot;], correcta:  &quot;&amp;[Hoja1.F347]-1&amp; &quot;, observaciones: &quot; &amp; CHAR(34)&amp;[Hoja1.G347]&amp; CHAR(34) &amp; &quot; },&quot;" office:value-type="string" office:string-value=" { id: 346, enunciado: &quot;&quot;, opciones: [&quot;&quot;, &quot;&quot;, &quot;&quot;, &quot;&quot;], correcta:  -1, observaciones: &quot;&quot; },">
            <text:p><text:s/>{ id: 34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8]&amp; CHAR(34) &amp; &quot;, opciones: [&quot;&amp; CHAR(34)&amp;[Hoja1.B348]&amp; CHAR(34)&amp;&quot;, &quot;&amp; CHAR(34)&amp;[Hoja1.C348]&amp; CHAR(34)&amp;&quot;, &quot;&amp; CHAR(34)&amp;[Hoja1.D348]&amp; CHAR(34)&amp;&quot;, &quot;&amp; CHAR(34)&amp;[Hoja1.E348]&amp; CHAR(34)&amp;&quot;], correcta:  &quot;&amp;[Hoja1.F348]-1&amp; &quot;, observaciones: &quot; &amp; CHAR(34)&amp;[Hoja1.G348]&amp; CHAR(34) &amp; &quot; },&quot;" office:value-type="string" office:string-value=" { id: 347, enunciado: &quot;&quot;, opciones: [&quot;&quot;, &quot;&quot;, &quot;&quot;, &quot;&quot;], correcta:  -1, observaciones: &quot;&quot; },">
            <text:p><text:s/>{ id: 34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49]&amp; CHAR(34) &amp; &quot;, opciones: [&quot;&amp; CHAR(34)&amp;[Hoja1.B349]&amp; CHAR(34)&amp;&quot;, &quot;&amp; CHAR(34)&amp;[Hoja1.C349]&amp; CHAR(34)&amp;&quot;, &quot;&amp; CHAR(34)&amp;[Hoja1.D349]&amp; CHAR(34)&amp;&quot;, &quot;&amp; CHAR(34)&amp;[Hoja1.E349]&amp; CHAR(34)&amp;&quot;], correcta:  &quot;&amp;[Hoja1.F349]-1&amp; &quot;, observaciones: &quot; &amp; CHAR(34)&amp;[Hoja1.G349]&amp; CHAR(34) &amp; &quot; },&quot;" office:value-type="string" office:string-value=" { id: 348, enunciado: &quot;&quot;, opciones: [&quot;&quot;, &quot;&quot;, &quot;&quot;, &quot;&quot;], correcta:  -1, observaciones: &quot;&quot; },">
            <text:p><text:s/>{ id: 34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0]&amp; CHAR(34) &amp; &quot;, opciones: [&quot;&amp; CHAR(34)&amp;[Hoja1.B350]&amp; CHAR(34)&amp;&quot;, &quot;&amp; CHAR(34)&amp;[Hoja1.C350]&amp; CHAR(34)&amp;&quot;, &quot;&amp; CHAR(34)&amp;[Hoja1.D350]&amp; CHAR(34)&amp;&quot;, &quot;&amp; CHAR(34)&amp;[Hoja1.E350]&amp; CHAR(34)&amp;&quot;], correcta:  &quot;&amp;[Hoja1.F350]-1&amp; &quot;, observaciones: &quot; &amp; CHAR(34)&amp;[Hoja1.G350]&amp; CHAR(34) &amp; &quot; },&quot;" office:value-type="string" office:string-value=" { id: 349, enunciado: &quot;&quot;, opciones: [&quot;&quot;, &quot;&quot;, &quot;&quot;, &quot;&quot;], correcta:  -1, observaciones: &quot;&quot; },">
            <text:p><text:s/>{ id: 34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1]&amp; CHAR(34) &amp; &quot;, opciones: [&quot;&amp; CHAR(34)&amp;[Hoja1.B351]&amp; CHAR(34)&amp;&quot;, &quot;&amp; CHAR(34)&amp;[Hoja1.C351]&amp; CHAR(34)&amp;&quot;, &quot;&amp; CHAR(34)&amp;[Hoja1.D351]&amp; CHAR(34)&amp;&quot;, &quot;&amp; CHAR(34)&amp;[Hoja1.E351]&amp; CHAR(34)&amp;&quot;], correcta:  &quot;&amp;[Hoja1.F351]-1&amp; &quot;, observaciones: &quot; &amp; CHAR(34)&amp;[Hoja1.G351]&amp; CHAR(34) &amp; &quot; },&quot;" office:value-type="string" office:string-value=" { id: 350, enunciado: &quot;&quot;, opciones: [&quot;&quot;, &quot;&quot;, &quot;&quot;, &quot;&quot;], correcta:  -1, observaciones: &quot;&quot; },">
            <text:p><text:s/>{ id: 35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2]&amp; CHAR(34) &amp; &quot;, opciones: [&quot;&amp; CHAR(34)&amp;[Hoja1.B352]&amp; CHAR(34)&amp;&quot;, &quot;&amp; CHAR(34)&amp;[Hoja1.C352]&amp; CHAR(34)&amp;&quot;, &quot;&amp; CHAR(34)&amp;[Hoja1.D352]&amp; CHAR(34)&amp;&quot;, &quot;&amp; CHAR(34)&amp;[Hoja1.E352]&amp; CHAR(34)&amp;&quot;], correcta:  &quot;&amp;[Hoja1.F352]-1&amp; &quot;, observaciones: &quot; &amp; CHAR(34)&amp;[Hoja1.G352]&amp; CHAR(34) &amp; &quot; },&quot;" office:value-type="string" office:string-value=" { id: 351, enunciado: &quot;&quot;, opciones: [&quot;&quot;, &quot;&quot;, &quot;&quot;, &quot;&quot;], correcta:  -1, observaciones: &quot;&quot; },">
            <text:p><text:s/>{ id: 35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3]&amp; CHAR(34) &amp; &quot;, opciones: [&quot;&amp; CHAR(34)&amp;[Hoja1.B353]&amp; CHAR(34)&amp;&quot;, &quot;&amp; CHAR(34)&amp;[Hoja1.C353]&amp; CHAR(34)&amp;&quot;, &quot;&amp; CHAR(34)&amp;[Hoja1.D353]&amp; CHAR(34)&amp;&quot;, &quot;&amp; CHAR(34)&amp;[Hoja1.E353]&amp; CHAR(34)&amp;&quot;], correcta:  &quot;&amp;[Hoja1.F353]-1&amp; &quot;, observaciones: &quot; &amp; CHAR(34)&amp;[Hoja1.G353]&amp; CHAR(34) &amp; &quot; },&quot;" office:value-type="string" office:string-value=" { id: 352, enunciado: &quot;&quot;, opciones: [&quot;&quot;, &quot;&quot;, &quot;&quot;, &quot;&quot;], correcta:  -1, observaciones: &quot;&quot; },">
            <text:p><text:s/>{ id: 35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4]&amp; CHAR(34) &amp; &quot;, opciones: [&quot;&amp; CHAR(34)&amp;[Hoja1.B354]&amp; CHAR(34)&amp;&quot;, &quot;&amp; CHAR(34)&amp;[Hoja1.C354]&amp; CHAR(34)&amp;&quot;, &quot;&amp; CHAR(34)&amp;[Hoja1.D354]&amp; CHAR(34)&amp;&quot;, &quot;&amp; CHAR(34)&amp;[Hoja1.E354]&amp; CHAR(34)&amp;&quot;], correcta:  &quot;&amp;[Hoja1.F354]-1&amp; &quot;, observaciones: &quot; &amp; CHAR(34)&amp;[Hoja1.G354]&amp; CHAR(34) &amp; &quot; },&quot;" office:value-type="string" office:string-value=" { id: 353, enunciado: &quot;&quot;, opciones: [&quot;&quot;, &quot;&quot;, &quot;&quot;, &quot;&quot;], correcta:  -1, observaciones: &quot;&quot; },">
            <text:p><text:s/>{ id: 35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5]&amp; CHAR(34) &amp; &quot;, opciones: [&quot;&amp; CHAR(34)&amp;[Hoja1.B355]&amp; CHAR(34)&amp;&quot;, &quot;&amp; CHAR(34)&amp;[Hoja1.C355]&amp; CHAR(34)&amp;&quot;, &quot;&amp; CHAR(34)&amp;[Hoja1.D355]&amp; CHAR(34)&amp;&quot;, &quot;&amp; CHAR(34)&amp;[Hoja1.E355]&amp; CHAR(34)&amp;&quot;], correcta:  &quot;&amp;[Hoja1.F355]-1&amp; &quot;, observaciones: &quot; &amp; CHAR(34)&amp;[Hoja1.G355]&amp; CHAR(34) &amp; &quot; },&quot;" office:value-type="string" office:string-value=" { id: 354, enunciado: &quot;&quot;, opciones: [&quot;&quot;, &quot;&quot;, &quot;&quot;, &quot;&quot;], correcta:  -1, observaciones: &quot;&quot; },">
            <text:p><text:s/>{ id: 35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6]&amp; CHAR(34) &amp; &quot;, opciones: [&quot;&amp; CHAR(34)&amp;[Hoja1.B356]&amp; CHAR(34)&amp;&quot;, &quot;&amp; CHAR(34)&amp;[Hoja1.C356]&amp; CHAR(34)&amp;&quot;, &quot;&amp; CHAR(34)&amp;[Hoja1.D356]&amp; CHAR(34)&amp;&quot;, &quot;&amp; CHAR(34)&amp;[Hoja1.E356]&amp; CHAR(34)&amp;&quot;], correcta:  &quot;&amp;[Hoja1.F356]-1&amp; &quot;, observaciones: &quot; &amp; CHAR(34)&amp;[Hoja1.G356]&amp; CHAR(34) &amp; &quot; },&quot;" office:value-type="string" office:string-value=" { id: 355, enunciado: &quot;&quot;, opciones: [&quot;&quot;, &quot;&quot;, &quot;&quot;, &quot;&quot;], correcta:  -1, observaciones: &quot;&quot; },">
            <text:p><text:s/>{ id: 35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7]&amp; CHAR(34) &amp; &quot;, opciones: [&quot;&amp; CHAR(34)&amp;[Hoja1.B357]&amp; CHAR(34)&amp;&quot;, &quot;&amp; CHAR(34)&amp;[Hoja1.C357]&amp; CHAR(34)&amp;&quot;, &quot;&amp; CHAR(34)&amp;[Hoja1.D357]&amp; CHAR(34)&amp;&quot;, &quot;&amp; CHAR(34)&amp;[Hoja1.E357]&amp; CHAR(34)&amp;&quot;], correcta:  &quot;&amp;[Hoja1.F357]-1&amp; &quot;, observaciones: &quot; &amp; CHAR(34)&amp;[Hoja1.G357]&amp; CHAR(34) &amp; &quot; },&quot;" office:value-type="string" office:string-value=" { id: 356, enunciado: &quot;&quot;, opciones: [&quot;&quot;, &quot;&quot;, &quot;&quot;, &quot;&quot;], correcta:  -1, observaciones: &quot;&quot; },">
            <text:p><text:s/>{ id: 35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8]&amp; CHAR(34) &amp; &quot;, opciones: [&quot;&amp; CHAR(34)&amp;[Hoja1.B358]&amp; CHAR(34)&amp;&quot;, &quot;&amp; CHAR(34)&amp;[Hoja1.C358]&amp; CHAR(34)&amp;&quot;, &quot;&amp; CHAR(34)&amp;[Hoja1.D358]&amp; CHAR(34)&amp;&quot;, &quot;&amp; CHAR(34)&amp;[Hoja1.E358]&amp; CHAR(34)&amp;&quot;], correcta:  &quot;&amp;[Hoja1.F358]-1&amp; &quot;, observaciones: &quot; &amp; CHAR(34)&amp;[Hoja1.G358]&amp; CHAR(34) &amp; &quot; },&quot;" office:value-type="string" office:string-value=" { id: 357, enunciado: &quot;&quot;, opciones: [&quot;&quot;, &quot;&quot;, &quot;&quot;, &quot;&quot;], correcta:  -1, observaciones: &quot;&quot; },">
            <text:p><text:s/>{ id: 35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59]&amp; CHAR(34) &amp; &quot;, opciones: [&quot;&amp; CHAR(34)&amp;[Hoja1.B359]&amp; CHAR(34)&amp;&quot;, &quot;&amp; CHAR(34)&amp;[Hoja1.C359]&amp; CHAR(34)&amp;&quot;, &quot;&amp; CHAR(34)&amp;[Hoja1.D359]&amp; CHAR(34)&amp;&quot;, &quot;&amp; CHAR(34)&amp;[Hoja1.E359]&amp; CHAR(34)&amp;&quot;], correcta:  &quot;&amp;[Hoja1.F359]-1&amp; &quot;, observaciones: &quot; &amp; CHAR(34)&amp;[Hoja1.G359]&amp; CHAR(34) &amp; &quot; },&quot;" office:value-type="string" office:string-value=" { id: 358, enunciado: &quot;&quot;, opciones: [&quot;&quot;, &quot;&quot;, &quot;&quot;, &quot;&quot;], correcta:  -1, observaciones: &quot;&quot; },">
            <text:p><text:s/>{ id: 35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0]&amp; CHAR(34) &amp; &quot;, opciones: [&quot;&amp; CHAR(34)&amp;[Hoja1.B360]&amp; CHAR(34)&amp;&quot;, &quot;&amp; CHAR(34)&amp;[Hoja1.C360]&amp; CHAR(34)&amp;&quot;, &quot;&amp; CHAR(34)&amp;[Hoja1.D360]&amp; CHAR(34)&amp;&quot;, &quot;&amp; CHAR(34)&amp;[Hoja1.E360]&amp; CHAR(34)&amp;&quot;], correcta:  &quot;&amp;[Hoja1.F360]-1&amp; &quot;, observaciones: &quot; &amp; CHAR(34)&amp;[Hoja1.G360]&amp; CHAR(34) &amp; &quot; },&quot;" office:value-type="string" office:string-value=" { id: 359, enunciado: &quot;&quot;, opciones: [&quot;&quot;, &quot;&quot;, &quot;&quot;, &quot;&quot;], correcta:  -1, observaciones: &quot;&quot; },">
            <text:p><text:s/>{ id: 35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1]&amp; CHAR(34) &amp; &quot;, opciones: [&quot;&amp; CHAR(34)&amp;[Hoja1.B361]&amp; CHAR(34)&amp;&quot;, &quot;&amp; CHAR(34)&amp;[Hoja1.C361]&amp; CHAR(34)&amp;&quot;, &quot;&amp; CHAR(34)&amp;[Hoja1.D361]&amp; CHAR(34)&amp;&quot;, &quot;&amp; CHAR(34)&amp;[Hoja1.E361]&amp; CHAR(34)&amp;&quot;], correcta:  &quot;&amp;[Hoja1.F361]-1&amp; &quot;, observaciones: &quot; &amp; CHAR(34)&amp;[Hoja1.G361]&amp; CHAR(34) &amp; &quot; },&quot;" office:value-type="string" office:string-value=" { id: 360, enunciado: &quot;&quot;, opciones: [&quot;&quot;, &quot;&quot;, &quot;&quot;, &quot;&quot;], correcta:  -1, observaciones: &quot;&quot; },">
            <text:p><text:s/>{ id: 36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2]&amp; CHAR(34) &amp; &quot;, opciones: [&quot;&amp; CHAR(34)&amp;[Hoja1.B362]&amp; CHAR(34)&amp;&quot;, &quot;&amp; CHAR(34)&amp;[Hoja1.C362]&amp; CHAR(34)&amp;&quot;, &quot;&amp; CHAR(34)&amp;[Hoja1.D362]&amp; CHAR(34)&amp;&quot;, &quot;&amp; CHAR(34)&amp;[Hoja1.E362]&amp; CHAR(34)&amp;&quot;], correcta:  &quot;&amp;[Hoja1.F362]-1&amp; &quot;, observaciones: &quot; &amp; CHAR(34)&amp;[Hoja1.G362]&amp; CHAR(34) &amp; &quot; },&quot;" office:value-type="string" office:string-value=" { id: 361, enunciado: &quot;&quot;, opciones: [&quot;&quot;, &quot;&quot;, &quot;&quot;, &quot;&quot;], correcta:  -1, observaciones: &quot;&quot; },">
            <text:p><text:s/>{ id: 36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3]&amp; CHAR(34) &amp; &quot;, opciones: [&quot;&amp; CHAR(34)&amp;[Hoja1.B363]&amp; CHAR(34)&amp;&quot;, &quot;&amp; CHAR(34)&amp;[Hoja1.C363]&amp; CHAR(34)&amp;&quot;, &quot;&amp; CHAR(34)&amp;[Hoja1.D363]&amp; CHAR(34)&amp;&quot;, &quot;&amp; CHAR(34)&amp;[Hoja1.E363]&amp; CHAR(34)&amp;&quot;], correcta:  &quot;&amp;[Hoja1.F363]-1&amp; &quot;, observaciones: &quot; &amp; CHAR(34)&amp;[Hoja1.G363]&amp; CHAR(34) &amp; &quot; },&quot;" office:value-type="string" office:string-value=" { id: 362, enunciado: &quot;&quot;, opciones: [&quot;&quot;, &quot;&quot;, &quot;&quot;, &quot;&quot;], correcta:  -1, observaciones: &quot;&quot; },">
            <text:p><text:s/>{ id: 36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4]&amp; CHAR(34) &amp; &quot;, opciones: [&quot;&amp; CHAR(34)&amp;[Hoja1.B364]&amp; CHAR(34)&amp;&quot;, &quot;&amp; CHAR(34)&amp;[Hoja1.C364]&amp; CHAR(34)&amp;&quot;, &quot;&amp; CHAR(34)&amp;[Hoja1.D364]&amp; CHAR(34)&amp;&quot;, &quot;&amp; CHAR(34)&amp;[Hoja1.E364]&amp; CHAR(34)&amp;&quot;], correcta:  &quot;&amp;[Hoja1.F364]-1&amp; &quot;, observaciones: &quot; &amp; CHAR(34)&amp;[Hoja1.G364]&amp; CHAR(34) &amp; &quot; },&quot;" office:value-type="string" office:string-value=" { id: 363, enunciado: &quot;&quot;, opciones: [&quot;&quot;, &quot;&quot;, &quot;&quot;, &quot;&quot;], correcta:  -1, observaciones: &quot;&quot; },">
            <text:p><text:s/>{ id: 36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5]&amp; CHAR(34) &amp; &quot;, opciones: [&quot;&amp; CHAR(34)&amp;[Hoja1.B365]&amp; CHAR(34)&amp;&quot;, &quot;&amp; CHAR(34)&amp;[Hoja1.C365]&amp; CHAR(34)&amp;&quot;, &quot;&amp; CHAR(34)&amp;[Hoja1.D365]&amp; CHAR(34)&amp;&quot;, &quot;&amp; CHAR(34)&amp;[Hoja1.E365]&amp; CHAR(34)&amp;&quot;], correcta:  &quot;&amp;[Hoja1.F365]-1&amp; &quot;, observaciones: &quot; &amp; CHAR(34)&amp;[Hoja1.G365]&amp; CHAR(34) &amp; &quot; },&quot;" office:value-type="string" office:string-value=" { id: 364, enunciado: &quot;&quot;, opciones: [&quot;&quot;, &quot;&quot;, &quot;&quot;, &quot;&quot;], correcta:  -1, observaciones: &quot;&quot; },">
            <text:p><text:s/>{ id: 36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6]&amp; CHAR(34) &amp; &quot;, opciones: [&quot;&amp; CHAR(34)&amp;[Hoja1.B366]&amp; CHAR(34)&amp;&quot;, &quot;&amp; CHAR(34)&amp;[Hoja1.C366]&amp; CHAR(34)&amp;&quot;, &quot;&amp; CHAR(34)&amp;[Hoja1.D366]&amp; CHAR(34)&amp;&quot;, &quot;&amp; CHAR(34)&amp;[Hoja1.E366]&amp; CHAR(34)&amp;&quot;], correcta:  &quot;&amp;[Hoja1.F366]-1&amp; &quot;, observaciones: &quot; &amp; CHAR(34)&amp;[Hoja1.G366]&amp; CHAR(34) &amp; &quot; },&quot;" office:value-type="string" office:string-value=" { id: 365, enunciado: &quot;&quot;, opciones: [&quot;&quot;, &quot;&quot;, &quot;&quot;, &quot;&quot;], correcta:  -1, observaciones: &quot;&quot; },">
            <text:p><text:s/>{ id: 36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7]&amp; CHAR(34) &amp; &quot;, opciones: [&quot;&amp; CHAR(34)&amp;[Hoja1.B367]&amp; CHAR(34)&amp;&quot;, &quot;&amp; CHAR(34)&amp;[Hoja1.C367]&amp; CHAR(34)&amp;&quot;, &quot;&amp; CHAR(34)&amp;[Hoja1.D367]&amp; CHAR(34)&amp;&quot;, &quot;&amp; CHAR(34)&amp;[Hoja1.E367]&amp; CHAR(34)&amp;&quot;], correcta:  &quot;&amp;[Hoja1.F367]-1&amp; &quot;, observaciones: &quot; &amp; CHAR(34)&amp;[Hoja1.G367]&amp; CHAR(34) &amp; &quot; },&quot;" office:value-type="string" office:string-value=" { id: 366, enunciado: &quot;&quot;, opciones: [&quot;&quot;, &quot;&quot;, &quot;&quot;, &quot;&quot;], correcta:  -1, observaciones: &quot;&quot; },">
            <text:p><text:s/>{ id: 36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8]&amp; CHAR(34) &amp; &quot;, opciones: [&quot;&amp; CHAR(34)&amp;[Hoja1.B368]&amp; CHAR(34)&amp;&quot;, &quot;&amp; CHAR(34)&amp;[Hoja1.C368]&amp; CHAR(34)&amp;&quot;, &quot;&amp; CHAR(34)&amp;[Hoja1.D368]&amp; CHAR(34)&amp;&quot;, &quot;&amp; CHAR(34)&amp;[Hoja1.E368]&amp; CHAR(34)&amp;&quot;], correcta:  &quot;&amp;[Hoja1.F368]-1&amp; &quot;, observaciones: &quot; &amp; CHAR(34)&amp;[Hoja1.G368]&amp; CHAR(34) &amp; &quot; },&quot;" office:value-type="string" office:string-value=" { id: 367, enunciado: &quot;&quot;, opciones: [&quot;&quot;, &quot;&quot;, &quot;&quot;, &quot;&quot;], correcta:  -1, observaciones: &quot;&quot; },">
            <text:p><text:s/>{ id: 36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69]&amp; CHAR(34) &amp; &quot;, opciones: [&quot;&amp; CHAR(34)&amp;[Hoja1.B369]&amp; CHAR(34)&amp;&quot;, &quot;&amp; CHAR(34)&amp;[Hoja1.C369]&amp; CHAR(34)&amp;&quot;, &quot;&amp; CHAR(34)&amp;[Hoja1.D369]&amp; CHAR(34)&amp;&quot;, &quot;&amp; CHAR(34)&amp;[Hoja1.E369]&amp; CHAR(34)&amp;&quot;], correcta:  &quot;&amp;[Hoja1.F369]-1&amp; &quot;, observaciones: &quot; &amp; CHAR(34)&amp;[Hoja1.G369]&amp; CHAR(34) &amp; &quot; },&quot;" office:value-type="string" office:string-value=" { id: 368, enunciado: &quot;&quot;, opciones: [&quot;&quot;, &quot;&quot;, &quot;&quot;, &quot;&quot;], correcta:  -1, observaciones: &quot;&quot; },">
            <text:p><text:s/>{ id: 36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0]&amp; CHAR(34) &amp; &quot;, opciones: [&quot;&amp; CHAR(34)&amp;[Hoja1.B370]&amp; CHAR(34)&amp;&quot;, &quot;&amp; CHAR(34)&amp;[Hoja1.C370]&amp; CHAR(34)&amp;&quot;, &quot;&amp; CHAR(34)&amp;[Hoja1.D370]&amp; CHAR(34)&amp;&quot;, &quot;&amp; CHAR(34)&amp;[Hoja1.E370]&amp; CHAR(34)&amp;&quot;], correcta:  &quot;&amp;[Hoja1.F370]-1&amp; &quot;, observaciones: &quot; &amp; CHAR(34)&amp;[Hoja1.G370]&amp; CHAR(34) &amp; &quot; },&quot;" office:value-type="string" office:string-value=" { id: 369, enunciado: &quot;&quot;, opciones: [&quot;&quot;, &quot;&quot;, &quot;&quot;, &quot;&quot;], correcta:  -1, observaciones: &quot;&quot; },">
            <text:p><text:s/>{ id: 36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1]&amp; CHAR(34) &amp; &quot;, opciones: [&quot;&amp; CHAR(34)&amp;[Hoja1.B371]&amp; CHAR(34)&amp;&quot;, &quot;&amp; CHAR(34)&amp;[Hoja1.C371]&amp; CHAR(34)&amp;&quot;, &quot;&amp; CHAR(34)&amp;[Hoja1.D371]&amp; CHAR(34)&amp;&quot;, &quot;&amp; CHAR(34)&amp;[Hoja1.E371]&amp; CHAR(34)&amp;&quot;], correcta:  &quot;&amp;[Hoja1.F371]-1&amp; &quot;, observaciones: &quot; &amp; CHAR(34)&amp;[Hoja1.G371]&amp; CHAR(34) &amp; &quot; },&quot;" office:value-type="string" office:string-value=" { id: 370, enunciado: &quot;&quot;, opciones: [&quot;&quot;, &quot;&quot;, &quot;&quot;, &quot;&quot;], correcta:  -1, observaciones: &quot;&quot; },">
            <text:p><text:s/>{ id: 37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2]&amp; CHAR(34) &amp; &quot;, opciones: [&quot;&amp; CHAR(34)&amp;[Hoja1.B372]&amp; CHAR(34)&amp;&quot;, &quot;&amp; CHAR(34)&amp;[Hoja1.C372]&amp; CHAR(34)&amp;&quot;, &quot;&amp; CHAR(34)&amp;[Hoja1.D372]&amp; CHAR(34)&amp;&quot;, &quot;&amp; CHAR(34)&amp;[Hoja1.E372]&amp; CHAR(34)&amp;&quot;], correcta:  &quot;&amp;[Hoja1.F372]-1&amp; &quot;, observaciones: &quot; &amp; CHAR(34)&amp;[Hoja1.G372]&amp; CHAR(34) &amp; &quot; },&quot;" office:value-type="string" office:string-value=" { id: 371, enunciado: &quot;&quot;, opciones: [&quot;&quot;, &quot;&quot;, &quot;&quot;, &quot;&quot;], correcta:  -1, observaciones: &quot;&quot; },">
            <text:p><text:s/>{ id: 37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3]&amp; CHAR(34) &amp; &quot;, opciones: [&quot;&amp; CHAR(34)&amp;[Hoja1.B373]&amp; CHAR(34)&amp;&quot;, &quot;&amp; CHAR(34)&amp;[Hoja1.C373]&amp; CHAR(34)&amp;&quot;, &quot;&amp; CHAR(34)&amp;[Hoja1.D373]&amp; CHAR(34)&amp;&quot;, &quot;&amp; CHAR(34)&amp;[Hoja1.E373]&amp; CHAR(34)&amp;&quot;], correcta:  &quot;&amp;[Hoja1.F373]-1&amp; &quot;, observaciones: &quot; &amp; CHAR(34)&amp;[Hoja1.G373]&amp; CHAR(34) &amp; &quot; },&quot;" office:value-type="string" office:string-value=" { id: 372, enunciado: &quot;&quot;, opciones: [&quot;&quot;, &quot;&quot;, &quot;&quot;, &quot;&quot;], correcta:  -1, observaciones: &quot;&quot; },">
            <text:p><text:s/>{ id: 37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4]&amp; CHAR(34) &amp; &quot;, opciones: [&quot;&amp; CHAR(34)&amp;[Hoja1.B374]&amp; CHAR(34)&amp;&quot;, &quot;&amp; CHAR(34)&amp;[Hoja1.C374]&amp; CHAR(34)&amp;&quot;, &quot;&amp; CHAR(34)&amp;[Hoja1.D374]&amp; CHAR(34)&amp;&quot;, &quot;&amp; CHAR(34)&amp;[Hoja1.E374]&amp; CHAR(34)&amp;&quot;], correcta:  &quot;&amp;[Hoja1.F374]-1&amp; &quot;, observaciones: &quot; &amp; CHAR(34)&amp;[Hoja1.G374]&amp; CHAR(34) &amp; &quot; },&quot;" office:value-type="string" office:string-value=" { id: 373, enunciado: &quot;&quot;, opciones: [&quot;&quot;, &quot;&quot;, &quot;&quot;, &quot;&quot;], correcta:  -1, observaciones: &quot;&quot; },">
            <text:p><text:s/>{ id: 37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5]&amp; CHAR(34) &amp; &quot;, opciones: [&quot;&amp; CHAR(34)&amp;[Hoja1.B375]&amp; CHAR(34)&amp;&quot;, &quot;&amp; CHAR(34)&amp;[Hoja1.C375]&amp; CHAR(34)&amp;&quot;, &quot;&amp; CHAR(34)&amp;[Hoja1.D375]&amp; CHAR(34)&amp;&quot;, &quot;&amp; CHAR(34)&amp;[Hoja1.E375]&amp; CHAR(34)&amp;&quot;], correcta:  &quot;&amp;[Hoja1.F375]-1&amp; &quot;, observaciones: &quot; &amp; CHAR(34)&amp;[Hoja1.G375]&amp; CHAR(34) &amp; &quot; },&quot;" office:value-type="string" office:string-value=" { id: 374, enunciado: &quot;&quot;, opciones: [&quot;&quot;, &quot;&quot;, &quot;&quot;, &quot;&quot;], correcta:  -1, observaciones: &quot;&quot; },">
            <text:p><text:s/>{ id: 37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6]&amp; CHAR(34) &amp; &quot;, opciones: [&quot;&amp; CHAR(34)&amp;[Hoja1.B376]&amp; CHAR(34)&amp;&quot;, &quot;&amp; CHAR(34)&amp;[Hoja1.C376]&amp; CHAR(34)&amp;&quot;, &quot;&amp; CHAR(34)&amp;[Hoja1.D376]&amp; CHAR(34)&amp;&quot;, &quot;&amp; CHAR(34)&amp;[Hoja1.E376]&amp; CHAR(34)&amp;&quot;], correcta:  &quot;&amp;[Hoja1.F376]-1&amp; &quot;, observaciones: &quot; &amp; CHAR(34)&amp;[Hoja1.G376]&amp; CHAR(34) &amp; &quot; },&quot;" office:value-type="string" office:string-value=" { id: 375, enunciado: &quot;&quot;, opciones: [&quot;&quot;, &quot;&quot;, &quot;&quot;, &quot;&quot;], correcta:  -1, observaciones: &quot;&quot; },">
            <text:p><text:s/>{ id: 37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7]&amp; CHAR(34) &amp; &quot;, opciones: [&quot;&amp; CHAR(34)&amp;[Hoja1.B377]&amp; CHAR(34)&amp;&quot;, &quot;&amp; CHAR(34)&amp;[Hoja1.C377]&amp; CHAR(34)&amp;&quot;, &quot;&amp; CHAR(34)&amp;[Hoja1.D377]&amp; CHAR(34)&amp;&quot;, &quot;&amp; CHAR(34)&amp;[Hoja1.E377]&amp; CHAR(34)&amp;&quot;], correcta:  &quot;&amp;[Hoja1.F377]-1&amp; &quot;, observaciones: &quot; &amp; CHAR(34)&amp;[Hoja1.G377]&amp; CHAR(34) &amp; &quot; },&quot;" office:value-type="string" office:string-value=" { id: 376, enunciado: &quot;&quot;, opciones: [&quot;&quot;, &quot;&quot;, &quot;&quot;, &quot;&quot;], correcta:  -1, observaciones: &quot;&quot; },">
            <text:p><text:s/>{ id: 37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8]&amp; CHAR(34) &amp; &quot;, opciones: [&quot;&amp; CHAR(34)&amp;[Hoja1.B378]&amp; CHAR(34)&amp;&quot;, &quot;&amp; CHAR(34)&amp;[Hoja1.C378]&amp; CHAR(34)&amp;&quot;, &quot;&amp; CHAR(34)&amp;[Hoja1.D378]&amp; CHAR(34)&amp;&quot;, &quot;&amp; CHAR(34)&amp;[Hoja1.E378]&amp; CHAR(34)&amp;&quot;], correcta:  &quot;&amp;[Hoja1.F378]-1&amp; &quot;, observaciones: &quot; &amp; CHAR(34)&amp;[Hoja1.G378]&amp; CHAR(34) &amp; &quot; },&quot;" office:value-type="string" office:string-value=" { id: 377, enunciado: &quot;&quot;, opciones: [&quot;&quot;, &quot;&quot;, &quot;&quot;, &quot;&quot;], correcta:  -1, observaciones: &quot;&quot; },">
            <text:p><text:s/>{ id: 37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79]&amp; CHAR(34) &amp; &quot;, opciones: [&quot;&amp; CHAR(34)&amp;[Hoja1.B379]&amp; CHAR(34)&amp;&quot;, &quot;&amp; CHAR(34)&amp;[Hoja1.C379]&amp; CHAR(34)&amp;&quot;, &quot;&amp; CHAR(34)&amp;[Hoja1.D379]&amp; CHAR(34)&amp;&quot;, &quot;&amp; CHAR(34)&amp;[Hoja1.E379]&amp; CHAR(34)&amp;&quot;], correcta:  &quot;&amp;[Hoja1.F379]-1&amp; &quot;, observaciones: &quot; &amp; CHAR(34)&amp;[Hoja1.G379]&amp; CHAR(34) &amp; &quot; },&quot;" office:value-type="string" office:string-value=" { id: 378, enunciado: &quot;&quot;, opciones: [&quot;&quot;, &quot;&quot;, &quot;&quot;, &quot;&quot;], correcta:  -1, observaciones: &quot;&quot; },">
            <text:p><text:s/>{ id: 37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0]&amp; CHAR(34) &amp; &quot;, opciones: [&quot;&amp; CHAR(34)&amp;[Hoja1.B380]&amp; CHAR(34)&amp;&quot;, &quot;&amp; CHAR(34)&amp;[Hoja1.C380]&amp; CHAR(34)&amp;&quot;, &quot;&amp; CHAR(34)&amp;[Hoja1.D380]&amp; CHAR(34)&amp;&quot;, &quot;&amp; CHAR(34)&amp;[Hoja1.E380]&amp; CHAR(34)&amp;&quot;], correcta:  &quot;&amp;[Hoja1.F380]-1&amp; &quot;, observaciones: &quot; &amp; CHAR(34)&amp;[Hoja1.G380]&amp; CHAR(34) &amp; &quot; },&quot;" office:value-type="string" office:string-value=" { id: 379, enunciado: &quot;&quot;, opciones: [&quot;&quot;, &quot;&quot;, &quot;&quot;, &quot;&quot;], correcta:  -1, observaciones: &quot;&quot; },">
            <text:p><text:s/>{ id: 37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1]&amp; CHAR(34) &amp; &quot;, opciones: [&quot;&amp; CHAR(34)&amp;[Hoja1.B381]&amp; CHAR(34)&amp;&quot;, &quot;&amp; CHAR(34)&amp;[Hoja1.C381]&amp; CHAR(34)&amp;&quot;, &quot;&amp; CHAR(34)&amp;[Hoja1.D381]&amp; CHAR(34)&amp;&quot;, &quot;&amp; CHAR(34)&amp;[Hoja1.E381]&amp; CHAR(34)&amp;&quot;], correcta:  &quot;&amp;[Hoja1.F381]-1&amp; &quot;, observaciones: &quot; &amp; CHAR(34)&amp;[Hoja1.G381]&amp; CHAR(34) &amp; &quot; },&quot;" office:value-type="string" office:string-value=" { id: 380, enunciado: &quot;&quot;, opciones: [&quot;&quot;, &quot;&quot;, &quot;&quot;, &quot;&quot;], correcta:  -1, observaciones: &quot;&quot; },">
            <text:p><text:s/>{ id: 38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2]&amp; CHAR(34) &amp; &quot;, opciones: [&quot;&amp; CHAR(34)&amp;[Hoja1.B382]&amp; CHAR(34)&amp;&quot;, &quot;&amp; CHAR(34)&amp;[Hoja1.C382]&amp; CHAR(34)&amp;&quot;, &quot;&amp; CHAR(34)&amp;[Hoja1.D382]&amp; CHAR(34)&amp;&quot;, &quot;&amp; CHAR(34)&amp;[Hoja1.E382]&amp; CHAR(34)&amp;&quot;], correcta:  &quot;&amp;[Hoja1.F382]-1&amp; &quot;, observaciones: &quot; &amp; CHAR(34)&amp;[Hoja1.G382]&amp; CHAR(34) &amp; &quot; },&quot;" office:value-type="string" office:string-value=" { id: 381, enunciado: &quot;&quot;, opciones: [&quot;&quot;, &quot;&quot;, &quot;&quot;, &quot;&quot;], correcta:  -1, observaciones: &quot;&quot; },">
            <text:p><text:s/>{ id: 38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3]&amp; CHAR(34) &amp; &quot;, opciones: [&quot;&amp; CHAR(34)&amp;[Hoja1.B383]&amp; CHAR(34)&amp;&quot;, &quot;&amp; CHAR(34)&amp;[Hoja1.C383]&amp; CHAR(34)&amp;&quot;, &quot;&amp; CHAR(34)&amp;[Hoja1.D383]&amp; CHAR(34)&amp;&quot;, &quot;&amp; CHAR(34)&amp;[Hoja1.E383]&amp; CHAR(34)&amp;&quot;], correcta:  &quot;&amp;[Hoja1.F383]-1&amp; &quot;, observaciones: &quot; &amp; CHAR(34)&amp;[Hoja1.G383]&amp; CHAR(34) &amp; &quot; },&quot;" office:value-type="string" office:string-value=" { id: 382, enunciado: &quot;&quot;, opciones: [&quot;&quot;, &quot;&quot;, &quot;&quot;, &quot;&quot;], correcta:  -1, observaciones: &quot;&quot; },">
            <text:p><text:s/>{ id: 38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4]&amp; CHAR(34) &amp; &quot;, opciones: [&quot;&amp; CHAR(34)&amp;[Hoja1.B384]&amp; CHAR(34)&amp;&quot;, &quot;&amp; CHAR(34)&amp;[Hoja1.C384]&amp; CHAR(34)&amp;&quot;, &quot;&amp; CHAR(34)&amp;[Hoja1.D384]&amp; CHAR(34)&amp;&quot;, &quot;&amp; CHAR(34)&amp;[Hoja1.E384]&amp; CHAR(34)&amp;&quot;], correcta:  &quot;&amp;[Hoja1.F384]-1&amp; &quot;, observaciones: &quot; &amp; CHAR(34)&amp;[Hoja1.G384]&amp; CHAR(34) &amp; &quot; },&quot;" office:value-type="string" office:string-value=" { id: 383, enunciado: &quot;&quot;, opciones: [&quot;&quot;, &quot;&quot;, &quot;&quot;, &quot;&quot;], correcta:  -1, observaciones: &quot;&quot; },">
            <text:p><text:s/>{ id: 38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5]&amp; CHAR(34) &amp; &quot;, opciones: [&quot;&amp; CHAR(34)&amp;[Hoja1.B385]&amp; CHAR(34)&amp;&quot;, &quot;&amp; CHAR(34)&amp;[Hoja1.C385]&amp; CHAR(34)&amp;&quot;, &quot;&amp; CHAR(34)&amp;[Hoja1.D385]&amp; CHAR(34)&amp;&quot;, &quot;&amp; CHAR(34)&amp;[Hoja1.E385]&amp; CHAR(34)&amp;&quot;], correcta:  &quot;&amp;[Hoja1.F385]-1&amp; &quot;, observaciones: &quot; &amp; CHAR(34)&amp;[Hoja1.G385]&amp; CHAR(34) &amp; &quot; },&quot;" office:value-type="string" office:string-value=" { id: 384, enunciado: &quot;&quot;, opciones: [&quot;&quot;, &quot;&quot;, &quot;&quot;, &quot;&quot;], correcta:  -1, observaciones: &quot;&quot; },">
            <text:p><text:s/>{ id: 38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6]&amp; CHAR(34) &amp; &quot;, opciones: [&quot;&amp; CHAR(34)&amp;[Hoja1.B386]&amp; CHAR(34)&amp;&quot;, &quot;&amp; CHAR(34)&amp;[Hoja1.C386]&amp; CHAR(34)&amp;&quot;, &quot;&amp; CHAR(34)&amp;[Hoja1.D386]&amp; CHAR(34)&amp;&quot;, &quot;&amp; CHAR(34)&amp;[Hoja1.E386]&amp; CHAR(34)&amp;&quot;], correcta:  &quot;&amp;[Hoja1.F386]-1&amp; &quot;, observaciones: &quot; &amp; CHAR(34)&amp;[Hoja1.G386]&amp; CHAR(34) &amp; &quot; },&quot;" office:value-type="string" office:string-value=" { id: 385, enunciado: &quot;&quot;, opciones: [&quot;&quot;, &quot;&quot;, &quot;&quot;, &quot;&quot;], correcta:  -1, observaciones: &quot;&quot; },">
            <text:p><text:s/>{ id: 38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7]&amp; CHAR(34) &amp; &quot;, opciones: [&quot;&amp; CHAR(34)&amp;[Hoja1.B387]&amp; CHAR(34)&amp;&quot;, &quot;&amp; CHAR(34)&amp;[Hoja1.C387]&amp; CHAR(34)&amp;&quot;, &quot;&amp; CHAR(34)&amp;[Hoja1.D387]&amp; CHAR(34)&amp;&quot;, &quot;&amp; CHAR(34)&amp;[Hoja1.E387]&amp; CHAR(34)&amp;&quot;], correcta:  &quot;&amp;[Hoja1.F387]-1&amp; &quot;, observaciones: &quot; &amp; CHAR(34)&amp;[Hoja1.G387]&amp; CHAR(34) &amp; &quot; },&quot;" office:value-type="string" office:string-value=" { id: 386, enunciado: &quot;&quot;, opciones: [&quot;&quot;, &quot;&quot;, &quot;&quot;, &quot;&quot;], correcta:  -1, observaciones: &quot;&quot; },">
            <text:p><text:s/>{ id: 38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8]&amp; CHAR(34) &amp; &quot;, opciones: [&quot;&amp; CHAR(34)&amp;[Hoja1.B388]&amp; CHAR(34)&amp;&quot;, &quot;&amp; CHAR(34)&amp;[Hoja1.C388]&amp; CHAR(34)&amp;&quot;, &quot;&amp; CHAR(34)&amp;[Hoja1.D388]&amp; CHAR(34)&amp;&quot;, &quot;&amp; CHAR(34)&amp;[Hoja1.E388]&amp; CHAR(34)&amp;&quot;], correcta:  &quot;&amp;[Hoja1.F388]-1&amp; &quot;, observaciones: &quot; &amp; CHAR(34)&amp;[Hoja1.G388]&amp; CHAR(34) &amp; &quot; },&quot;" office:value-type="string" office:string-value=" { id: 387, enunciado: &quot;&quot;, opciones: [&quot;&quot;, &quot;&quot;, &quot;&quot;, &quot;&quot;], correcta:  -1, observaciones: &quot;&quot; },">
            <text:p><text:s/>{ id: 38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89]&amp; CHAR(34) &amp; &quot;, opciones: [&quot;&amp; CHAR(34)&amp;[Hoja1.B389]&amp; CHAR(34)&amp;&quot;, &quot;&amp; CHAR(34)&amp;[Hoja1.C389]&amp; CHAR(34)&amp;&quot;, &quot;&amp; CHAR(34)&amp;[Hoja1.D389]&amp; CHAR(34)&amp;&quot;, &quot;&amp; CHAR(34)&amp;[Hoja1.E389]&amp; CHAR(34)&amp;&quot;], correcta:  &quot;&amp;[Hoja1.F389]-1&amp; &quot;, observaciones: &quot; &amp; CHAR(34)&amp;[Hoja1.G389]&amp; CHAR(34) &amp; &quot; },&quot;" office:value-type="string" office:string-value=" { id: 388, enunciado: &quot;&quot;, opciones: [&quot;&quot;, &quot;&quot;, &quot;&quot;, &quot;&quot;], correcta:  -1, observaciones: &quot;&quot; },">
            <text:p><text:s/>{ id: 38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0]&amp; CHAR(34) &amp; &quot;, opciones: [&quot;&amp; CHAR(34)&amp;[Hoja1.B390]&amp; CHAR(34)&amp;&quot;, &quot;&amp; CHAR(34)&amp;[Hoja1.C390]&amp; CHAR(34)&amp;&quot;, &quot;&amp; CHAR(34)&amp;[Hoja1.D390]&amp; CHAR(34)&amp;&quot;, &quot;&amp; CHAR(34)&amp;[Hoja1.E390]&amp; CHAR(34)&amp;&quot;], correcta:  &quot;&amp;[Hoja1.F390]-1&amp; &quot;, observaciones: &quot; &amp; CHAR(34)&amp;[Hoja1.G390]&amp; CHAR(34) &amp; &quot; },&quot;" office:value-type="string" office:string-value=" { id: 389, enunciado: &quot;&quot;, opciones: [&quot;&quot;, &quot;&quot;, &quot;&quot;, &quot;&quot;], correcta:  -1, observaciones: &quot;&quot; },">
            <text:p><text:s/>{ id: 38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1]&amp; CHAR(34) &amp; &quot;, opciones: [&quot;&amp; CHAR(34)&amp;[Hoja1.B391]&amp; CHAR(34)&amp;&quot;, &quot;&amp; CHAR(34)&amp;[Hoja1.C391]&amp; CHAR(34)&amp;&quot;, &quot;&amp; CHAR(34)&amp;[Hoja1.D391]&amp; CHAR(34)&amp;&quot;, &quot;&amp; CHAR(34)&amp;[Hoja1.E391]&amp; CHAR(34)&amp;&quot;], correcta:  &quot;&amp;[Hoja1.F391]-1&amp; &quot;, observaciones: &quot; &amp; CHAR(34)&amp;[Hoja1.G391]&amp; CHAR(34) &amp; &quot; },&quot;" office:value-type="string" office:string-value=" { id: 390, enunciado: &quot;&quot;, opciones: [&quot;&quot;, &quot;&quot;, &quot;&quot;, &quot;&quot;], correcta:  -1, observaciones: &quot;&quot; },">
            <text:p><text:s/>{ id: 39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2]&amp; CHAR(34) &amp; &quot;, opciones: [&quot;&amp; CHAR(34)&amp;[Hoja1.B392]&amp; CHAR(34)&amp;&quot;, &quot;&amp; CHAR(34)&amp;[Hoja1.C392]&amp; CHAR(34)&amp;&quot;, &quot;&amp; CHAR(34)&amp;[Hoja1.D392]&amp; CHAR(34)&amp;&quot;, &quot;&amp; CHAR(34)&amp;[Hoja1.E392]&amp; CHAR(34)&amp;&quot;], correcta:  &quot;&amp;[Hoja1.F392]-1&amp; &quot;, observaciones: &quot; &amp; CHAR(34)&amp;[Hoja1.G392]&amp; CHAR(34) &amp; &quot; },&quot;" office:value-type="string" office:string-value=" { id: 391, enunciado: &quot;&quot;, opciones: [&quot;&quot;, &quot;&quot;, &quot;&quot;, &quot;&quot;], correcta:  -1, observaciones: &quot;&quot; },">
            <text:p><text:s/>{ id: 39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3]&amp; CHAR(34) &amp; &quot;, opciones: [&quot;&amp; CHAR(34)&amp;[Hoja1.B393]&amp; CHAR(34)&amp;&quot;, &quot;&amp; CHAR(34)&amp;[Hoja1.C393]&amp; CHAR(34)&amp;&quot;, &quot;&amp; CHAR(34)&amp;[Hoja1.D393]&amp; CHAR(34)&amp;&quot;, &quot;&amp; CHAR(34)&amp;[Hoja1.E393]&amp; CHAR(34)&amp;&quot;], correcta:  &quot;&amp;[Hoja1.F393]-1&amp; &quot;, observaciones: &quot; &amp; CHAR(34)&amp;[Hoja1.G393]&amp; CHAR(34) &amp; &quot; },&quot;" office:value-type="string" office:string-value=" { id: 392, enunciado: &quot;&quot;, opciones: [&quot;&quot;, &quot;&quot;, &quot;&quot;, &quot;&quot;], correcta:  -1, observaciones: &quot;&quot; },">
            <text:p><text:s/>{ id: 39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4]&amp; CHAR(34) &amp; &quot;, opciones: [&quot;&amp; CHAR(34)&amp;[Hoja1.B394]&amp; CHAR(34)&amp;&quot;, &quot;&amp; CHAR(34)&amp;[Hoja1.C394]&amp; CHAR(34)&amp;&quot;, &quot;&amp; CHAR(34)&amp;[Hoja1.D394]&amp; CHAR(34)&amp;&quot;, &quot;&amp; CHAR(34)&amp;[Hoja1.E394]&amp; CHAR(34)&amp;&quot;], correcta:  &quot;&amp;[Hoja1.F394]-1&amp; &quot;, observaciones: &quot; &amp; CHAR(34)&amp;[Hoja1.G394]&amp; CHAR(34) &amp; &quot; },&quot;" office:value-type="string" office:string-value=" { id: 393, enunciado: &quot;&quot;, opciones: [&quot;&quot;, &quot;&quot;, &quot;&quot;, &quot;&quot;], correcta:  -1, observaciones: &quot;&quot; },">
            <text:p><text:s/>{ id: 39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5]&amp; CHAR(34) &amp; &quot;, opciones: [&quot;&amp; CHAR(34)&amp;[Hoja1.B395]&amp; CHAR(34)&amp;&quot;, &quot;&amp; CHAR(34)&amp;[Hoja1.C395]&amp; CHAR(34)&amp;&quot;, &quot;&amp; CHAR(34)&amp;[Hoja1.D395]&amp; CHAR(34)&amp;&quot;, &quot;&amp; CHAR(34)&amp;[Hoja1.E395]&amp; CHAR(34)&amp;&quot;], correcta:  &quot;&amp;[Hoja1.F395]-1&amp; &quot;, observaciones: &quot; &amp; CHAR(34)&amp;[Hoja1.G395]&amp; CHAR(34) &amp; &quot; },&quot;" office:value-type="string" office:string-value=" { id: 394, enunciado: &quot;&quot;, opciones: [&quot;&quot;, &quot;&quot;, &quot;&quot;, &quot;&quot;], correcta:  -1, observaciones: &quot;&quot; },">
            <text:p><text:s/>{ id: 39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6]&amp; CHAR(34) &amp; &quot;, opciones: [&quot;&amp; CHAR(34)&amp;[Hoja1.B396]&amp; CHAR(34)&amp;&quot;, &quot;&amp; CHAR(34)&amp;[Hoja1.C396]&amp; CHAR(34)&amp;&quot;, &quot;&amp; CHAR(34)&amp;[Hoja1.D396]&amp; CHAR(34)&amp;&quot;, &quot;&amp; CHAR(34)&amp;[Hoja1.E396]&amp; CHAR(34)&amp;&quot;], correcta:  &quot;&amp;[Hoja1.F396]-1&amp; &quot;, observaciones: &quot; &amp; CHAR(34)&amp;[Hoja1.G396]&amp; CHAR(34) &amp; &quot; },&quot;" office:value-type="string" office:string-value=" { id: 395, enunciado: &quot;&quot;, opciones: [&quot;&quot;, &quot;&quot;, &quot;&quot;, &quot;&quot;], correcta:  -1, observaciones: &quot;&quot; },">
            <text:p><text:s/>{ id: 39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7]&amp; CHAR(34) &amp; &quot;, opciones: [&quot;&amp; CHAR(34)&amp;[Hoja1.B397]&amp; CHAR(34)&amp;&quot;, &quot;&amp; CHAR(34)&amp;[Hoja1.C397]&amp; CHAR(34)&amp;&quot;, &quot;&amp; CHAR(34)&amp;[Hoja1.D397]&amp; CHAR(34)&amp;&quot;, &quot;&amp; CHAR(34)&amp;[Hoja1.E397]&amp; CHAR(34)&amp;&quot;], correcta:  &quot;&amp;[Hoja1.F397]-1&amp; &quot;, observaciones: &quot; &amp; CHAR(34)&amp;[Hoja1.G397]&amp; CHAR(34) &amp; &quot; },&quot;" office:value-type="string" office:string-value=" { id: 396, enunciado: &quot;&quot;, opciones: [&quot;&quot;, &quot;&quot;, &quot;&quot;, &quot;&quot;], correcta:  -1, observaciones: &quot;&quot; },">
            <text:p><text:s/>{ id: 39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8]&amp; CHAR(34) &amp; &quot;, opciones: [&quot;&amp; CHAR(34)&amp;[Hoja1.B398]&amp; CHAR(34)&amp;&quot;, &quot;&amp; CHAR(34)&amp;[Hoja1.C398]&amp; CHAR(34)&amp;&quot;, &quot;&amp; CHAR(34)&amp;[Hoja1.D398]&amp; CHAR(34)&amp;&quot;, &quot;&amp; CHAR(34)&amp;[Hoja1.E398]&amp; CHAR(34)&amp;&quot;], correcta:  &quot;&amp;[Hoja1.F398]-1&amp; &quot;, observaciones: &quot; &amp; CHAR(34)&amp;[Hoja1.G398]&amp; CHAR(34) &amp; &quot; },&quot;" office:value-type="string" office:string-value=" { id: 397, enunciado: &quot;&quot;, opciones: [&quot;&quot;, &quot;&quot;, &quot;&quot;, &quot;&quot;], correcta:  -1, observaciones: &quot;&quot; },">
            <text:p><text:s/>{ id: 39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399]&amp; CHAR(34) &amp; &quot;, opciones: [&quot;&amp; CHAR(34)&amp;[Hoja1.B399]&amp; CHAR(34)&amp;&quot;, &quot;&amp; CHAR(34)&amp;[Hoja1.C399]&amp; CHAR(34)&amp;&quot;, &quot;&amp; CHAR(34)&amp;[Hoja1.D399]&amp; CHAR(34)&amp;&quot;, &quot;&amp; CHAR(34)&amp;[Hoja1.E399]&amp; CHAR(34)&amp;&quot;], correcta:  &quot;&amp;[Hoja1.F399]-1&amp; &quot;, observaciones: &quot; &amp; CHAR(34)&amp;[Hoja1.G399]&amp; CHAR(34) &amp; &quot; },&quot;" office:value-type="string" office:string-value=" { id: 398, enunciado: &quot;&quot;, opciones: [&quot;&quot;, &quot;&quot;, &quot;&quot;, &quot;&quot;], correcta:  -1, observaciones: &quot;&quot; },">
            <text:p><text:s/>{ id: 39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0]&amp; CHAR(34) &amp; &quot;, opciones: [&quot;&amp; CHAR(34)&amp;[Hoja1.B400]&amp; CHAR(34)&amp;&quot;, &quot;&amp; CHAR(34)&amp;[Hoja1.C400]&amp; CHAR(34)&amp;&quot;, &quot;&amp; CHAR(34)&amp;[Hoja1.D400]&amp; CHAR(34)&amp;&quot;, &quot;&amp; CHAR(34)&amp;[Hoja1.E400]&amp; CHAR(34)&amp;&quot;], correcta:  &quot;&amp;[Hoja1.F400]-1&amp; &quot;, observaciones: &quot; &amp; CHAR(34)&amp;[Hoja1.G400]&amp; CHAR(34) &amp; &quot; },&quot;" office:value-type="string" office:string-value=" { id: 399, enunciado: &quot;&quot;, opciones: [&quot;&quot;, &quot;&quot;, &quot;&quot;, &quot;&quot;], correcta:  -1, observaciones: &quot;&quot; },">
            <text:p><text:s/>{ id: 39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1]&amp; CHAR(34) &amp; &quot;, opciones: [&quot;&amp; CHAR(34)&amp;[Hoja1.B401]&amp; CHAR(34)&amp;&quot;, &quot;&amp; CHAR(34)&amp;[Hoja1.C401]&amp; CHAR(34)&amp;&quot;, &quot;&amp; CHAR(34)&amp;[Hoja1.D401]&amp; CHAR(34)&amp;&quot;, &quot;&amp; CHAR(34)&amp;[Hoja1.E401]&amp; CHAR(34)&amp;&quot;], correcta:  &quot;&amp;[Hoja1.F401]-1&amp; &quot;, observaciones: &quot; &amp; CHAR(34)&amp;[Hoja1.G401]&amp; CHAR(34) &amp; &quot; },&quot;" office:value-type="string" office:string-value=" { id: 400, enunciado: &quot;&quot;, opciones: [&quot;&quot;, &quot;&quot;, &quot;&quot;, &quot;&quot;], correcta:  -1, observaciones: &quot;&quot; },">
            <text:p><text:s/>{ id: 40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2]&amp; CHAR(34) &amp; &quot;, opciones: [&quot;&amp; CHAR(34)&amp;[Hoja1.B402]&amp; CHAR(34)&amp;&quot;, &quot;&amp; CHAR(34)&amp;[Hoja1.C402]&amp; CHAR(34)&amp;&quot;, &quot;&amp; CHAR(34)&amp;[Hoja1.D402]&amp; CHAR(34)&amp;&quot;, &quot;&amp; CHAR(34)&amp;[Hoja1.E402]&amp; CHAR(34)&amp;&quot;], correcta:  &quot;&amp;[Hoja1.F402]-1&amp; &quot;, observaciones: &quot; &amp; CHAR(34)&amp;[Hoja1.G402]&amp; CHAR(34) &amp; &quot; },&quot;" office:value-type="string" office:string-value=" { id: 401, enunciado: &quot;&quot;, opciones: [&quot;&quot;, &quot;&quot;, &quot;&quot;, &quot;&quot;], correcta:  -1, observaciones: &quot;&quot; },">
            <text:p><text:s/>{ id: 40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3]&amp; CHAR(34) &amp; &quot;, opciones: [&quot;&amp; CHAR(34)&amp;[Hoja1.B403]&amp; CHAR(34)&amp;&quot;, &quot;&amp; CHAR(34)&amp;[Hoja1.C403]&amp; CHAR(34)&amp;&quot;, &quot;&amp; CHAR(34)&amp;[Hoja1.D403]&amp; CHAR(34)&amp;&quot;, &quot;&amp; CHAR(34)&amp;[Hoja1.E403]&amp; CHAR(34)&amp;&quot;], correcta:  &quot;&amp;[Hoja1.F403]-1&amp; &quot;, observaciones: &quot; &amp; CHAR(34)&amp;[Hoja1.G403]&amp; CHAR(34) &amp; &quot; },&quot;" office:value-type="string" office:string-value=" { id: 402, enunciado: &quot;&quot;, opciones: [&quot;&quot;, &quot;&quot;, &quot;&quot;, &quot;&quot;], correcta:  -1, observaciones: &quot;&quot; },">
            <text:p><text:s/>{ id: 40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4]&amp; CHAR(34) &amp; &quot;, opciones: [&quot;&amp; CHAR(34)&amp;[Hoja1.B404]&amp; CHAR(34)&amp;&quot;, &quot;&amp; CHAR(34)&amp;[Hoja1.C404]&amp; CHAR(34)&amp;&quot;, &quot;&amp; CHAR(34)&amp;[Hoja1.D404]&amp; CHAR(34)&amp;&quot;, &quot;&amp; CHAR(34)&amp;[Hoja1.E404]&amp; CHAR(34)&amp;&quot;], correcta:  &quot;&amp;[Hoja1.F404]-1&amp; &quot;, observaciones: &quot; &amp; CHAR(34)&amp;[Hoja1.G404]&amp; CHAR(34) &amp; &quot; },&quot;" office:value-type="string" office:string-value=" { id: 403, enunciado: &quot;&quot;, opciones: [&quot;&quot;, &quot;&quot;, &quot;&quot;, &quot;&quot;], correcta:  -1, observaciones: &quot;&quot; },">
            <text:p><text:s/>{ id: 40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5]&amp; CHAR(34) &amp; &quot;, opciones: [&quot;&amp; CHAR(34)&amp;[Hoja1.B405]&amp; CHAR(34)&amp;&quot;, &quot;&amp; CHAR(34)&amp;[Hoja1.C405]&amp; CHAR(34)&amp;&quot;, &quot;&amp; CHAR(34)&amp;[Hoja1.D405]&amp; CHAR(34)&amp;&quot;, &quot;&amp; CHAR(34)&amp;[Hoja1.E405]&amp; CHAR(34)&amp;&quot;], correcta:  &quot;&amp;[Hoja1.F405]-1&amp; &quot;, observaciones: &quot; &amp; CHAR(34)&amp;[Hoja1.G405]&amp; CHAR(34) &amp; &quot; },&quot;" office:value-type="string" office:string-value=" { id: 404, enunciado: &quot;&quot;, opciones: [&quot;&quot;, &quot;&quot;, &quot;&quot;, &quot;&quot;], correcta:  -1, observaciones: &quot;&quot; },">
            <text:p><text:s/>{ id: 40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6]&amp; CHAR(34) &amp; &quot;, opciones: [&quot;&amp; CHAR(34)&amp;[Hoja1.B406]&amp; CHAR(34)&amp;&quot;, &quot;&amp; CHAR(34)&amp;[Hoja1.C406]&amp; CHAR(34)&amp;&quot;, &quot;&amp; CHAR(34)&amp;[Hoja1.D406]&amp; CHAR(34)&amp;&quot;, &quot;&amp; CHAR(34)&amp;[Hoja1.E406]&amp; CHAR(34)&amp;&quot;], correcta:  &quot;&amp;[Hoja1.F406]-1&amp; &quot;, observaciones: &quot; &amp; CHAR(34)&amp;[Hoja1.G406]&amp; CHAR(34) &amp; &quot; },&quot;" office:value-type="string" office:string-value=" { id: 405, enunciado: &quot;&quot;, opciones: [&quot;&quot;, &quot;&quot;, &quot;&quot;, &quot;&quot;], correcta:  -1, observaciones: &quot;&quot; },">
            <text:p><text:s/>{ id: 40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7]&amp; CHAR(34) &amp; &quot;, opciones: [&quot;&amp; CHAR(34)&amp;[Hoja1.B407]&amp; CHAR(34)&amp;&quot;, &quot;&amp; CHAR(34)&amp;[Hoja1.C407]&amp; CHAR(34)&amp;&quot;, &quot;&amp; CHAR(34)&amp;[Hoja1.D407]&amp; CHAR(34)&amp;&quot;, &quot;&amp; CHAR(34)&amp;[Hoja1.E407]&amp; CHAR(34)&amp;&quot;], correcta:  &quot;&amp;[Hoja1.F407]-1&amp; &quot;, observaciones: &quot; &amp; CHAR(34)&amp;[Hoja1.G407]&amp; CHAR(34) &amp; &quot; },&quot;" office:value-type="string" office:string-value=" { id: 406, enunciado: &quot;&quot;, opciones: [&quot;&quot;, &quot;&quot;, &quot;&quot;, &quot;&quot;], correcta:  -1, observaciones: &quot;&quot; },">
            <text:p><text:s/>{ id: 40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8]&amp; CHAR(34) &amp; &quot;, opciones: [&quot;&amp; CHAR(34)&amp;[Hoja1.B408]&amp; CHAR(34)&amp;&quot;, &quot;&amp; CHAR(34)&amp;[Hoja1.C408]&amp; CHAR(34)&amp;&quot;, &quot;&amp; CHAR(34)&amp;[Hoja1.D408]&amp; CHAR(34)&amp;&quot;, &quot;&amp; CHAR(34)&amp;[Hoja1.E408]&amp; CHAR(34)&amp;&quot;], correcta:  &quot;&amp;[Hoja1.F408]-1&amp; &quot;, observaciones: &quot; &amp; CHAR(34)&amp;[Hoja1.G408]&amp; CHAR(34) &amp; &quot; },&quot;" office:value-type="string" office:string-value=" { id: 407, enunciado: &quot;&quot;, opciones: [&quot;&quot;, &quot;&quot;, &quot;&quot;, &quot;&quot;], correcta:  -1, observaciones: &quot;&quot; },">
            <text:p><text:s/>{ id: 40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09]&amp; CHAR(34) &amp; &quot;, opciones: [&quot;&amp; CHAR(34)&amp;[Hoja1.B409]&amp; CHAR(34)&amp;&quot;, &quot;&amp; CHAR(34)&amp;[Hoja1.C409]&amp; CHAR(34)&amp;&quot;, &quot;&amp; CHAR(34)&amp;[Hoja1.D409]&amp; CHAR(34)&amp;&quot;, &quot;&amp; CHAR(34)&amp;[Hoja1.E409]&amp; CHAR(34)&amp;&quot;], correcta:  &quot;&amp;[Hoja1.F409]-1&amp; &quot;, observaciones: &quot; &amp; CHAR(34)&amp;[Hoja1.G409]&amp; CHAR(34) &amp; &quot; },&quot;" office:value-type="string" office:string-value=" { id: 408, enunciado: &quot;&quot;, opciones: [&quot;&quot;, &quot;&quot;, &quot;&quot;, &quot;&quot;], correcta:  -1, observaciones: &quot;&quot; },">
            <text:p><text:s/>{ id: 40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0]&amp; CHAR(34) &amp; &quot;, opciones: [&quot;&amp; CHAR(34)&amp;[Hoja1.B410]&amp; CHAR(34)&amp;&quot;, &quot;&amp; CHAR(34)&amp;[Hoja1.C410]&amp; CHAR(34)&amp;&quot;, &quot;&amp; CHAR(34)&amp;[Hoja1.D410]&amp; CHAR(34)&amp;&quot;, &quot;&amp; CHAR(34)&amp;[Hoja1.E410]&amp; CHAR(34)&amp;&quot;], correcta:  &quot;&amp;[Hoja1.F410]-1&amp; &quot;, observaciones: &quot; &amp; CHAR(34)&amp;[Hoja1.G410]&amp; CHAR(34) &amp; &quot; },&quot;" office:value-type="string" office:string-value=" { id: 409, enunciado: &quot;&quot;, opciones: [&quot;&quot;, &quot;&quot;, &quot;&quot;, &quot;&quot;], correcta:  -1, observaciones: &quot;&quot; },">
            <text:p><text:s/>{ id: 40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1]&amp; CHAR(34) &amp; &quot;, opciones: [&quot;&amp; CHAR(34)&amp;[Hoja1.B411]&amp; CHAR(34)&amp;&quot;, &quot;&amp; CHAR(34)&amp;[Hoja1.C411]&amp; CHAR(34)&amp;&quot;, &quot;&amp; CHAR(34)&amp;[Hoja1.D411]&amp; CHAR(34)&amp;&quot;, &quot;&amp; CHAR(34)&amp;[Hoja1.E411]&amp; CHAR(34)&amp;&quot;], correcta:  &quot;&amp;[Hoja1.F411]-1&amp; &quot;, observaciones: &quot; &amp; CHAR(34)&amp;[Hoja1.G411]&amp; CHAR(34) &amp; &quot; },&quot;" office:value-type="string" office:string-value=" { id: 410, enunciado: &quot;&quot;, opciones: [&quot;&quot;, &quot;&quot;, &quot;&quot;, &quot;&quot;], correcta:  -1, observaciones: &quot;&quot; },">
            <text:p><text:s/>{ id: 41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2]&amp; CHAR(34) &amp; &quot;, opciones: [&quot;&amp; CHAR(34)&amp;[Hoja1.B412]&amp; CHAR(34)&amp;&quot;, &quot;&amp; CHAR(34)&amp;[Hoja1.C412]&amp; CHAR(34)&amp;&quot;, &quot;&amp; CHAR(34)&amp;[Hoja1.D412]&amp; CHAR(34)&amp;&quot;, &quot;&amp; CHAR(34)&amp;[Hoja1.E412]&amp; CHAR(34)&amp;&quot;], correcta:  &quot;&amp;[Hoja1.F412]-1&amp; &quot;, observaciones: &quot; &amp; CHAR(34)&amp;[Hoja1.G412]&amp; CHAR(34) &amp; &quot; },&quot;" office:value-type="string" office:string-value=" { id: 411, enunciado: &quot;&quot;, opciones: [&quot;&quot;, &quot;&quot;, &quot;&quot;, &quot;&quot;], correcta:  -1, observaciones: &quot;&quot; },">
            <text:p><text:s/>{ id: 41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3]&amp; CHAR(34) &amp; &quot;, opciones: [&quot;&amp; CHAR(34)&amp;[Hoja1.B413]&amp; CHAR(34)&amp;&quot;, &quot;&amp; CHAR(34)&amp;[Hoja1.C413]&amp; CHAR(34)&amp;&quot;, &quot;&amp; CHAR(34)&amp;[Hoja1.D413]&amp; CHAR(34)&amp;&quot;, &quot;&amp; CHAR(34)&amp;[Hoja1.E413]&amp; CHAR(34)&amp;&quot;], correcta:  &quot;&amp;[Hoja1.F413]-1&amp; &quot;, observaciones: &quot; &amp; CHAR(34)&amp;[Hoja1.G413]&amp; CHAR(34) &amp; &quot; },&quot;" office:value-type="string" office:string-value=" { id: 412, enunciado: &quot;&quot;, opciones: [&quot;&quot;, &quot;&quot;, &quot;&quot;, &quot;&quot;], correcta:  -1, observaciones: &quot;&quot; },">
            <text:p><text:s/>{ id: 41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4]&amp; CHAR(34) &amp; &quot;, opciones: [&quot;&amp; CHAR(34)&amp;[Hoja1.B414]&amp; CHAR(34)&amp;&quot;, &quot;&amp; CHAR(34)&amp;[Hoja1.C414]&amp; CHAR(34)&amp;&quot;, &quot;&amp; CHAR(34)&amp;[Hoja1.D414]&amp; CHAR(34)&amp;&quot;, &quot;&amp; CHAR(34)&amp;[Hoja1.E414]&amp; CHAR(34)&amp;&quot;], correcta:  &quot;&amp;[Hoja1.F414]-1&amp; &quot;, observaciones: &quot; &amp; CHAR(34)&amp;[Hoja1.G414]&amp; CHAR(34) &amp; &quot; },&quot;" office:value-type="string" office:string-value=" { id: 413, enunciado: &quot;&quot;, opciones: [&quot;&quot;, &quot;&quot;, &quot;&quot;, &quot;&quot;], correcta:  -1, observaciones: &quot;&quot; },">
            <text:p><text:s/>{ id: 41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5]&amp; CHAR(34) &amp; &quot;, opciones: [&quot;&amp; CHAR(34)&amp;[Hoja1.B415]&amp; CHAR(34)&amp;&quot;, &quot;&amp; CHAR(34)&amp;[Hoja1.C415]&amp; CHAR(34)&amp;&quot;, &quot;&amp; CHAR(34)&amp;[Hoja1.D415]&amp; CHAR(34)&amp;&quot;, &quot;&amp; CHAR(34)&amp;[Hoja1.E415]&amp; CHAR(34)&amp;&quot;], correcta:  &quot;&amp;[Hoja1.F415]-1&amp; &quot;, observaciones: &quot; &amp; CHAR(34)&amp;[Hoja1.G415]&amp; CHAR(34) &amp; &quot; },&quot;" office:value-type="string" office:string-value=" { id: 414, enunciado: &quot;&quot;, opciones: [&quot;&quot;, &quot;&quot;, &quot;&quot;, &quot;&quot;], correcta:  -1, observaciones: &quot;&quot; },">
            <text:p><text:s/>{ id: 41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6]&amp; CHAR(34) &amp; &quot;, opciones: [&quot;&amp; CHAR(34)&amp;[Hoja1.B416]&amp; CHAR(34)&amp;&quot;, &quot;&amp; CHAR(34)&amp;[Hoja1.C416]&amp; CHAR(34)&amp;&quot;, &quot;&amp; CHAR(34)&amp;[Hoja1.D416]&amp; CHAR(34)&amp;&quot;, &quot;&amp; CHAR(34)&amp;[Hoja1.E416]&amp; CHAR(34)&amp;&quot;], correcta:  &quot;&amp;[Hoja1.F416]-1&amp; &quot;, observaciones: &quot; &amp; CHAR(34)&amp;[Hoja1.G416]&amp; CHAR(34) &amp; &quot; },&quot;" office:value-type="string" office:string-value=" { id: 415, enunciado: &quot;&quot;, opciones: [&quot;&quot;, &quot;&quot;, &quot;&quot;, &quot;&quot;], correcta:  -1, observaciones: &quot;&quot; },">
            <text:p><text:s/>{ id: 41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7]&amp; CHAR(34) &amp; &quot;, opciones: [&quot;&amp; CHAR(34)&amp;[Hoja1.B417]&amp; CHAR(34)&amp;&quot;, &quot;&amp; CHAR(34)&amp;[Hoja1.C417]&amp; CHAR(34)&amp;&quot;, &quot;&amp; CHAR(34)&amp;[Hoja1.D417]&amp; CHAR(34)&amp;&quot;, &quot;&amp; CHAR(34)&amp;[Hoja1.E417]&amp; CHAR(34)&amp;&quot;], correcta:  &quot;&amp;[Hoja1.F417]-1&amp; &quot;, observaciones: &quot; &amp; CHAR(34)&amp;[Hoja1.G417]&amp; CHAR(34) &amp; &quot; },&quot;" office:value-type="string" office:string-value=" { id: 416, enunciado: &quot;&quot;, opciones: [&quot;&quot;, &quot;&quot;, &quot;&quot;, &quot;&quot;], correcta:  -1, observaciones: &quot;&quot; },">
            <text:p><text:s/>{ id: 41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8]&amp; CHAR(34) &amp; &quot;, opciones: [&quot;&amp; CHAR(34)&amp;[Hoja1.B418]&amp; CHAR(34)&amp;&quot;, &quot;&amp; CHAR(34)&amp;[Hoja1.C418]&amp; CHAR(34)&amp;&quot;, &quot;&amp; CHAR(34)&amp;[Hoja1.D418]&amp; CHAR(34)&amp;&quot;, &quot;&amp; CHAR(34)&amp;[Hoja1.E418]&amp; CHAR(34)&amp;&quot;], correcta:  &quot;&amp;[Hoja1.F418]-1&amp; &quot;, observaciones: &quot; &amp; CHAR(34)&amp;[Hoja1.G418]&amp; CHAR(34) &amp; &quot; },&quot;" office:value-type="string" office:string-value=" { id: 417, enunciado: &quot;&quot;, opciones: [&quot;&quot;, &quot;&quot;, &quot;&quot;, &quot;&quot;], correcta:  -1, observaciones: &quot;&quot; },">
            <text:p><text:s/>{ id: 41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19]&amp; CHAR(34) &amp; &quot;, opciones: [&quot;&amp; CHAR(34)&amp;[Hoja1.B419]&amp; CHAR(34)&amp;&quot;, &quot;&amp; CHAR(34)&amp;[Hoja1.C419]&amp; CHAR(34)&amp;&quot;, &quot;&amp; CHAR(34)&amp;[Hoja1.D419]&amp; CHAR(34)&amp;&quot;, &quot;&amp; CHAR(34)&amp;[Hoja1.E419]&amp; CHAR(34)&amp;&quot;], correcta:  &quot;&amp;[Hoja1.F419]-1&amp; &quot;, observaciones: &quot; &amp; CHAR(34)&amp;[Hoja1.G419]&amp; CHAR(34) &amp; &quot; },&quot;" office:value-type="string" office:string-value=" { id: 418, enunciado: &quot;&quot;, opciones: [&quot;&quot;, &quot;&quot;, &quot;&quot;, &quot;&quot;], correcta:  -1, observaciones: &quot;&quot; },">
            <text:p><text:s/>{ id: 41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0]&amp; CHAR(34) &amp; &quot;, opciones: [&quot;&amp; CHAR(34)&amp;[Hoja1.B420]&amp; CHAR(34)&amp;&quot;, &quot;&amp; CHAR(34)&amp;[Hoja1.C420]&amp; CHAR(34)&amp;&quot;, &quot;&amp; CHAR(34)&amp;[Hoja1.D420]&amp; CHAR(34)&amp;&quot;, &quot;&amp; CHAR(34)&amp;[Hoja1.E420]&amp; CHAR(34)&amp;&quot;], correcta:  &quot;&amp;[Hoja1.F420]-1&amp; &quot;, observaciones: &quot; &amp; CHAR(34)&amp;[Hoja1.G420]&amp; CHAR(34) &amp; &quot; },&quot;" office:value-type="string" office:string-value=" { id: 419, enunciado: &quot;&quot;, opciones: [&quot;&quot;, &quot;&quot;, &quot;&quot;, &quot;&quot;], correcta:  -1, observaciones: &quot;&quot; },">
            <text:p><text:s/>{ id: 41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1]&amp; CHAR(34) &amp; &quot;, opciones: [&quot;&amp; CHAR(34)&amp;[Hoja1.B421]&amp; CHAR(34)&amp;&quot;, &quot;&amp; CHAR(34)&amp;[Hoja1.C421]&amp; CHAR(34)&amp;&quot;, &quot;&amp; CHAR(34)&amp;[Hoja1.D421]&amp; CHAR(34)&amp;&quot;, &quot;&amp; CHAR(34)&amp;[Hoja1.E421]&amp; CHAR(34)&amp;&quot;], correcta:  &quot;&amp;[Hoja1.F421]-1&amp; &quot;, observaciones: &quot; &amp; CHAR(34)&amp;[Hoja1.G421]&amp; CHAR(34) &amp; &quot; },&quot;" office:value-type="string" office:string-value=" { id: 420, enunciado: &quot;&quot;, opciones: [&quot;&quot;, &quot;&quot;, &quot;&quot;, &quot;&quot;], correcta:  -1, observaciones: &quot;&quot; },">
            <text:p><text:s/>{ id: 42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2]&amp; CHAR(34) &amp; &quot;, opciones: [&quot;&amp; CHAR(34)&amp;[Hoja1.B422]&amp; CHAR(34)&amp;&quot;, &quot;&amp; CHAR(34)&amp;[Hoja1.C422]&amp; CHAR(34)&amp;&quot;, &quot;&amp; CHAR(34)&amp;[Hoja1.D422]&amp; CHAR(34)&amp;&quot;, &quot;&amp; CHAR(34)&amp;[Hoja1.E422]&amp; CHAR(34)&amp;&quot;], correcta:  &quot;&amp;[Hoja1.F422]-1&amp; &quot;, observaciones: &quot; &amp; CHAR(34)&amp;[Hoja1.G422]&amp; CHAR(34) &amp; &quot; },&quot;" office:value-type="string" office:string-value=" { id: 421, enunciado: &quot;&quot;, opciones: [&quot;&quot;, &quot;&quot;, &quot;&quot;, &quot;&quot;], correcta:  -1, observaciones: &quot;&quot; },">
            <text:p><text:s/>{ id: 42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3]&amp; CHAR(34) &amp; &quot;, opciones: [&quot;&amp; CHAR(34)&amp;[Hoja1.B423]&amp; CHAR(34)&amp;&quot;, &quot;&amp; CHAR(34)&amp;[Hoja1.C423]&amp; CHAR(34)&amp;&quot;, &quot;&amp; CHAR(34)&amp;[Hoja1.D423]&amp; CHAR(34)&amp;&quot;, &quot;&amp; CHAR(34)&amp;[Hoja1.E423]&amp; CHAR(34)&amp;&quot;], correcta:  &quot;&amp;[Hoja1.F423]-1&amp; &quot;, observaciones: &quot; &amp; CHAR(34)&amp;[Hoja1.G423]&amp; CHAR(34) &amp; &quot; },&quot;" office:value-type="string" office:string-value=" { id: 422, enunciado: &quot;&quot;, opciones: [&quot;&quot;, &quot;&quot;, &quot;&quot;, &quot;&quot;], correcta:  -1, observaciones: &quot;&quot; },">
            <text:p><text:s/>{ id: 42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4]&amp; CHAR(34) &amp; &quot;, opciones: [&quot;&amp; CHAR(34)&amp;[Hoja1.B424]&amp; CHAR(34)&amp;&quot;, &quot;&amp; CHAR(34)&amp;[Hoja1.C424]&amp; CHAR(34)&amp;&quot;, &quot;&amp; CHAR(34)&amp;[Hoja1.D424]&amp; CHAR(34)&amp;&quot;, &quot;&amp; CHAR(34)&amp;[Hoja1.E424]&amp; CHAR(34)&amp;&quot;], correcta:  &quot;&amp;[Hoja1.F424]-1&amp; &quot;, observaciones: &quot; &amp; CHAR(34)&amp;[Hoja1.G424]&amp; CHAR(34) &amp; &quot; },&quot;" office:value-type="string" office:string-value=" { id: 423, enunciado: &quot;&quot;, opciones: [&quot;&quot;, &quot;&quot;, &quot;&quot;, &quot;&quot;], correcta:  -1, observaciones: &quot;&quot; },">
            <text:p><text:s/>{ id: 42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5]&amp; CHAR(34) &amp; &quot;, opciones: [&quot;&amp; CHAR(34)&amp;[Hoja1.B425]&amp; CHAR(34)&amp;&quot;, &quot;&amp; CHAR(34)&amp;[Hoja1.C425]&amp; CHAR(34)&amp;&quot;, &quot;&amp; CHAR(34)&amp;[Hoja1.D425]&amp; CHAR(34)&amp;&quot;, &quot;&amp; CHAR(34)&amp;[Hoja1.E425]&amp; CHAR(34)&amp;&quot;], correcta:  &quot;&amp;[Hoja1.F425]-1&amp; &quot;, observaciones: &quot; &amp; CHAR(34)&amp;[Hoja1.G425]&amp; CHAR(34) &amp; &quot; },&quot;" office:value-type="string" office:string-value=" { id: 424, enunciado: &quot;&quot;, opciones: [&quot;&quot;, &quot;&quot;, &quot;&quot;, &quot;&quot;], correcta:  -1, observaciones: &quot;&quot; },">
            <text:p><text:s/>{ id: 42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6]&amp; CHAR(34) &amp; &quot;, opciones: [&quot;&amp; CHAR(34)&amp;[Hoja1.B426]&amp; CHAR(34)&amp;&quot;, &quot;&amp; CHAR(34)&amp;[Hoja1.C426]&amp; CHAR(34)&amp;&quot;, &quot;&amp; CHAR(34)&amp;[Hoja1.D426]&amp; CHAR(34)&amp;&quot;, &quot;&amp; CHAR(34)&amp;[Hoja1.E426]&amp; CHAR(34)&amp;&quot;], correcta:  &quot;&amp;[Hoja1.F426]-1&amp; &quot;, observaciones: &quot; &amp; CHAR(34)&amp;[Hoja1.G426]&amp; CHAR(34) &amp; &quot; },&quot;" office:value-type="string" office:string-value=" { id: 425, enunciado: &quot;&quot;, opciones: [&quot;&quot;, &quot;&quot;, &quot;&quot;, &quot;&quot;], correcta:  -1, observaciones: &quot;&quot; },">
            <text:p><text:s/>{ id: 42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7]&amp; CHAR(34) &amp; &quot;, opciones: [&quot;&amp; CHAR(34)&amp;[Hoja1.B427]&amp; CHAR(34)&amp;&quot;, &quot;&amp; CHAR(34)&amp;[Hoja1.C427]&amp; CHAR(34)&amp;&quot;, &quot;&amp; CHAR(34)&amp;[Hoja1.D427]&amp; CHAR(34)&amp;&quot;, &quot;&amp; CHAR(34)&amp;[Hoja1.E427]&amp; CHAR(34)&amp;&quot;], correcta:  &quot;&amp;[Hoja1.F427]-1&amp; &quot;, observaciones: &quot; &amp; CHAR(34)&amp;[Hoja1.G427]&amp; CHAR(34) &amp; &quot; },&quot;" office:value-type="string" office:string-value=" { id: 426, enunciado: &quot;&quot;, opciones: [&quot;&quot;, &quot;&quot;, &quot;&quot;, &quot;&quot;], correcta:  -1, observaciones: &quot;&quot; },">
            <text:p><text:s/>{ id: 42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8]&amp; CHAR(34) &amp; &quot;, opciones: [&quot;&amp; CHAR(34)&amp;[Hoja1.B428]&amp; CHAR(34)&amp;&quot;, &quot;&amp; CHAR(34)&amp;[Hoja1.C428]&amp; CHAR(34)&amp;&quot;, &quot;&amp; CHAR(34)&amp;[Hoja1.D428]&amp; CHAR(34)&amp;&quot;, &quot;&amp; CHAR(34)&amp;[Hoja1.E428]&amp; CHAR(34)&amp;&quot;], correcta:  &quot;&amp;[Hoja1.F428]-1&amp; &quot;, observaciones: &quot; &amp; CHAR(34)&amp;[Hoja1.G428]&amp; CHAR(34) &amp; &quot; },&quot;" office:value-type="string" office:string-value=" { id: 427, enunciado: &quot;&quot;, opciones: [&quot;&quot;, &quot;&quot;, &quot;&quot;, &quot;&quot;], correcta:  -1, observaciones: &quot;&quot; },">
            <text:p><text:s/>{ id: 42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29]&amp; CHAR(34) &amp; &quot;, opciones: [&quot;&amp; CHAR(34)&amp;[Hoja1.B429]&amp; CHAR(34)&amp;&quot;, &quot;&amp; CHAR(34)&amp;[Hoja1.C429]&amp; CHAR(34)&amp;&quot;, &quot;&amp; CHAR(34)&amp;[Hoja1.D429]&amp; CHAR(34)&amp;&quot;, &quot;&amp; CHAR(34)&amp;[Hoja1.E429]&amp; CHAR(34)&amp;&quot;], correcta:  &quot;&amp;[Hoja1.F429]-1&amp; &quot;, observaciones: &quot; &amp; CHAR(34)&amp;[Hoja1.G429]&amp; CHAR(34) &amp; &quot; },&quot;" office:value-type="string" office:string-value=" { id: 428, enunciado: &quot;&quot;, opciones: [&quot;&quot;, &quot;&quot;, &quot;&quot;, &quot;&quot;], correcta:  -1, observaciones: &quot;&quot; },">
            <text:p><text:s/>{ id: 42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0]&amp; CHAR(34) &amp; &quot;, opciones: [&quot;&amp; CHAR(34)&amp;[Hoja1.B430]&amp; CHAR(34)&amp;&quot;, &quot;&amp; CHAR(34)&amp;[Hoja1.C430]&amp; CHAR(34)&amp;&quot;, &quot;&amp; CHAR(34)&amp;[Hoja1.D430]&amp; CHAR(34)&amp;&quot;, &quot;&amp; CHAR(34)&amp;[Hoja1.E430]&amp; CHAR(34)&amp;&quot;], correcta:  &quot;&amp;[Hoja1.F430]-1&amp; &quot;, observaciones: &quot; &amp; CHAR(34)&amp;[Hoja1.G430]&amp; CHAR(34) &amp; &quot; },&quot;" office:value-type="string" office:string-value=" { id: 429, enunciado: &quot;&quot;, opciones: [&quot;&quot;, &quot;&quot;, &quot;&quot;, &quot;&quot;], correcta:  -1, observaciones: &quot;&quot; },">
            <text:p><text:s/>{ id: 42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1]&amp; CHAR(34) &amp; &quot;, opciones: [&quot;&amp; CHAR(34)&amp;[Hoja1.B431]&amp; CHAR(34)&amp;&quot;, &quot;&amp; CHAR(34)&amp;[Hoja1.C431]&amp; CHAR(34)&amp;&quot;, &quot;&amp; CHAR(34)&amp;[Hoja1.D431]&amp; CHAR(34)&amp;&quot;, &quot;&amp; CHAR(34)&amp;[Hoja1.E431]&amp; CHAR(34)&amp;&quot;], correcta:  &quot;&amp;[Hoja1.F431]-1&amp; &quot;, observaciones: &quot; &amp; CHAR(34)&amp;[Hoja1.G431]&amp; CHAR(34) &amp; &quot; },&quot;" office:value-type="string" office:string-value=" { id: 430, enunciado: &quot;&quot;, opciones: [&quot;&quot;, &quot;&quot;, &quot;&quot;, &quot;&quot;], correcta:  -1, observaciones: &quot;&quot; },">
            <text:p><text:s/>{ id: 43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2]&amp; CHAR(34) &amp; &quot;, opciones: [&quot;&amp; CHAR(34)&amp;[Hoja1.B432]&amp; CHAR(34)&amp;&quot;, &quot;&amp; CHAR(34)&amp;[Hoja1.C432]&amp; CHAR(34)&amp;&quot;, &quot;&amp; CHAR(34)&amp;[Hoja1.D432]&amp; CHAR(34)&amp;&quot;, &quot;&amp; CHAR(34)&amp;[Hoja1.E432]&amp; CHAR(34)&amp;&quot;], correcta:  &quot;&amp;[Hoja1.F432]-1&amp; &quot;, observaciones: &quot; &amp; CHAR(34)&amp;[Hoja1.G432]&amp; CHAR(34) &amp; &quot; },&quot;" office:value-type="string" office:string-value=" { id: 431, enunciado: &quot;&quot;, opciones: [&quot;&quot;, &quot;&quot;, &quot;&quot;, &quot;&quot;], correcta:  -1, observaciones: &quot;&quot; },">
            <text:p><text:s/>{ id: 43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3]&amp; CHAR(34) &amp; &quot;, opciones: [&quot;&amp; CHAR(34)&amp;[Hoja1.B433]&amp; CHAR(34)&amp;&quot;, &quot;&amp; CHAR(34)&amp;[Hoja1.C433]&amp; CHAR(34)&amp;&quot;, &quot;&amp; CHAR(34)&amp;[Hoja1.D433]&amp; CHAR(34)&amp;&quot;, &quot;&amp; CHAR(34)&amp;[Hoja1.E433]&amp; CHAR(34)&amp;&quot;], correcta:  &quot;&amp;[Hoja1.F433]-1&amp; &quot;, observaciones: &quot; &amp; CHAR(34)&amp;[Hoja1.G433]&amp; CHAR(34) &amp; &quot; },&quot;" office:value-type="string" office:string-value=" { id: 432, enunciado: &quot;&quot;, opciones: [&quot;&quot;, &quot;&quot;, &quot;&quot;, &quot;&quot;], correcta:  -1, observaciones: &quot;&quot; },">
            <text:p><text:s/>{ id: 43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4]&amp; CHAR(34) &amp; &quot;, opciones: [&quot;&amp; CHAR(34)&amp;[Hoja1.B434]&amp; CHAR(34)&amp;&quot;, &quot;&amp; CHAR(34)&amp;[Hoja1.C434]&amp; CHAR(34)&amp;&quot;, &quot;&amp; CHAR(34)&amp;[Hoja1.D434]&amp; CHAR(34)&amp;&quot;, &quot;&amp; CHAR(34)&amp;[Hoja1.E434]&amp; CHAR(34)&amp;&quot;], correcta:  &quot;&amp;[Hoja1.F434]-1&amp; &quot;, observaciones: &quot; &amp; CHAR(34)&amp;[Hoja1.G434]&amp; CHAR(34) &amp; &quot; },&quot;" office:value-type="string" office:string-value=" { id: 433, enunciado: &quot;&quot;, opciones: [&quot;&quot;, &quot;&quot;, &quot;&quot;, &quot;&quot;], correcta:  -1, observaciones: &quot;&quot; },">
            <text:p><text:s/>{ id: 43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5]&amp; CHAR(34) &amp; &quot;, opciones: [&quot;&amp; CHAR(34)&amp;[Hoja1.B435]&amp; CHAR(34)&amp;&quot;, &quot;&amp; CHAR(34)&amp;[Hoja1.C435]&amp; CHAR(34)&amp;&quot;, &quot;&amp; CHAR(34)&amp;[Hoja1.D435]&amp; CHAR(34)&amp;&quot;, &quot;&amp; CHAR(34)&amp;[Hoja1.E435]&amp; CHAR(34)&amp;&quot;], correcta:  &quot;&amp;[Hoja1.F435]-1&amp; &quot;, observaciones: &quot; &amp; CHAR(34)&amp;[Hoja1.G435]&amp; CHAR(34) &amp; &quot; },&quot;" office:value-type="string" office:string-value=" { id: 434, enunciado: &quot;&quot;, opciones: [&quot;&quot;, &quot;&quot;, &quot;&quot;, &quot;&quot;], correcta:  -1, observaciones: &quot;&quot; },">
            <text:p><text:s/>{ id: 43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6]&amp; CHAR(34) &amp; &quot;, opciones: [&quot;&amp; CHAR(34)&amp;[Hoja1.B436]&amp; CHAR(34)&amp;&quot;, &quot;&amp; CHAR(34)&amp;[Hoja1.C436]&amp; CHAR(34)&amp;&quot;, &quot;&amp; CHAR(34)&amp;[Hoja1.D436]&amp; CHAR(34)&amp;&quot;, &quot;&amp; CHAR(34)&amp;[Hoja1.E436]&amp; CHAR(34)&amp;&quot;], correcta:  &quot;&amp;[Hoja1.F436]-1&amp; &quot;, observaciones: &quot; &amp; CHAR(34)&amp;[Hoja1.G436]&amp; CHAR(34) &amp; &quot; },&quot;" office:value-type="string" office:string-value=" { id: 435, enunciado: &quot;&quot;, opciones: [&quot;&quot;, &quot;&quot;, &quot;&quot;, &quot;&quot;], correcta:  -1, observaciones: &quot;&quot; },">
            <text:p><text:s/>{ id: 43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7]&amp; CHAR(34) &amp; &quot;, opciones: [&quot;&amp; CHAR(34)&amp;[Hoja1.B437]&amp; CHAR(34)&amp;&quot;, &quot;&amp; CHAR(34)&amp;[Hoja1.C437]&amp; CHAR(34)&amp;&quot;, &quot;&amp; CHAR(34)&amp;[Hoja1.D437]&amp; CHAR(34)&amp;&quot;, &quot;&amp; CHAR(34)&amp;[Hoja1.E437]&amp; CHAR(34)&amp;&quot;], correcta:  &quot;&amp;[Hoja1.F437]-1&amp; &quot;, observaciones: &quot; &amp; CHAR(34)&amp;[Hoja1.G437]&amp; CHAR(34) &amp; &quot; },&quot;" office:value-type="string" office:string-value=" { id: 436, enunciado: &quot;&quot;, opciones: [&quot;&quot;, &quot;&quot;, &quot;&quot;, &quot;&quot;], correcta:  -1, observaciones: &quot;&quot; },">
            <text:p><text:s/>{ id: 43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8]&amp; CHAR(34) &amp; &quot;, opciones: [&quot;&amp; CHAR(34)&amp;[Hoja1.B438]&amp; CHAR(34)&amp;&quot;, &quot;&amp; CHAR(34)&amp;[Hoja1.C438]&amp; CHAR(34)&amp;&quot;, &quot;&amp; CHAR(34)&amp;[Hoja1.D438]&amp; CHAR(34)&amp;&quot;, &quot;&amp; CHAR(34)&amp;[Hoja1.E438]&amp; CHAR(34)&amp;&quot;], correcta:  &quot;&amp;[Hoja1.F438]-1&amp; &quot;, observaciones: &quot; &amp; CHAR(34)&amp;[Hoja1.G438]&amp; CHAR(34) &amp; &quot; },&quot;" office:value-type="string" office:string-value=" { id: 437, enunciado: &quot;&quot;, opciones: [&quot;&quot;, &quot;&quot;, &quot;&quot;, &quot;&quot;], correcta:  -1, observaciones: &quot;&quot; },">
            <text:p><text:s/>{ id: 43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39]&amp; CHAR(34) &amp; &quot;, opciones: [&quot;&amp; CHAR(34)&amp;[Hoja1.B439]&amp; CHAR(34)&amp;&quot;, &quot;&amp; CHAR(34)&amp;[Hoja1.C439]&amp; CHAR(34)&amp;&quot;, &quot;&amp; CHAR(34)&amp;[Hoja1.D439]&amp; CHAR(34)&amp;&quot;, &quot;&amp; CHAR(34)&amp;[Hoja1.E439]&amp; CHAR(34)&amp;&quot;], correcta:  &quot;&amp;[Hoja1.F439]-1&amp; &quot;, observaciones: &quot; &amp; CHAR(34)&amp;[Hoja1.G439]&amp; CHAR(34) &amp; &quot; },&quot;" office:value-type="string" office:string-value=" { id: 438, enunciado: &quot;&quot;, opciones: [&quot;&quot;, &quot;&quot;, &quot;&quot;, &quot;&quot;], correcta:  -1, observaciones: &quot;&quot; },">
            <text:p><text:s/>{ id: 43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0]&amp; CHAR(34) &amp; &quot;, opciones: [&quot;&amp; CHAR(34)&amp;[Hoja1.B440]&amp; CHAR(34)&amp;&quot;, &quot;&amp; CHAR(34)&amp;[Hoja1.C440]&amp; CHAR(34)&amp;&quot;, &quot;&amp; CHAR(34)&amp;[Hoja1.D440]&amp; CHAR(34)&amp;&quot;, &quot;&amp; CHAR(34)&amp;[Hoja1.E440]&amp; CHAR(34)&amp;&quot;], correcta:  &quot;&amp;[Hoja1.F440]-1&amp; &quot;, observaciones: &quot; &amp; CHAR(34)&amp;[Hoja1.G440]&amp; CHAR(34) &amp; &quot; },&quot;" office:value-type="string" office:string-value=" { id: 439, enunciado: &quot;&quot;, opciones: [&quot;&quot;, &quot;&quot;, &quot;&quot;, &quot;&quot;], correcta:  -1, observaciones: &quot;&quot; },">
            <text:p><text:s/>{ id: 43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1]&amp; CHAR(34) &amp; &quot;, opciones: [&quot;&amp; CHAR(34)&amp;[Hoja1.B441]&amp; CHAR(34)&amp;&quot;, &quot;&amp; CHAR(34)&amp;[Hoja1.C441]&amp; CHAR(34)&amp;&quot;, &quot;&amp; CHAR(34)&amp;[Hoja1.D441]&amp; CHAR(34)&amp;&quot;, &quot;&amp; CHAR(34)&amp;[Hoja1.E441]&amp; CHAR(34)&amp;&quot;], correcta:  &quot;&amp;[Hoja1.F441]-1&amp; &quot;, observaciones: &quot; &amp; CHAR(34)&amp;[Hoja1.G441]&amp; CHAR(34) &amp; &quot; },&quot;" office:value-type="string" office:string-value=" { id: 440, enunciado: &quot;&quot;, opciones: [&quot;&quot;, &quot;&quot;, &quot;&quot;, &quot;&quot;], correcta:  -1, observaciones: &quot;&quot; },">
            <text:p><text:s/>{ id: 44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2]&amp; CHAR(34) &amp; &quot;, opciones: [&quot;&amp; CHAR(34)&amp;[Hoja1.B442]&amp; CHAR(34)&amp;&quot;, &quot;&amp; CHAR(34)&amp;[Hoja1.C442]&amp; CHAR(34)&amp;&quot;, &quot;&amp; CHAR(34)&amp;[Hoja1.D442]&amp; CHAR(34)&amp;&quot;, &quot;&amp; CHAR(34)&amp;[Hoja1.E442]&amp; CHAR(34)&amp;&quot;], correcta:  &quot;&amp;[Hoja1.F442]-1&amp; &quot;, observaciones: &quot; &amp; CHAR(34)&amp;[Hoja1.G442]&amp; CHAR(34) &amp; &quot; },&quot;" office:value-type="string" office:string-value=" { id: 441, enunciado: &quot;&quot;, opciones: [&quot;&quot;, &quot;&quot;, &quot;&quot;, &quot;&quot;], correcta:  -1, observaciones: &quot;&quot; },">
            <text:p><text:s/>{ id: 44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3]&amp; CHAR(34) &amp; &quot;, opciones: [&quot;&amp; CHAR(34)&amp;[Hoja1.B443]&amp; CHAR(34)&amp;&quot;, &quot;&amp; CHAR(34)&amp;[Hoja1.C443]&amp; CHAR(34)&amp;&quot;, &quot;&amp; CHAR(34)&amp;[Hoja1.D443]&amp; CHAR(34)&amp;&quot;, &quot;&amp; CHAR(34)&amp;[Hoja1.E443]&amp; CHAR(34)&amp;&quot;], correcta:  &quot;&amp;[Hoja1.F443]-1&amp; &quot;, observaciones: &quot; &amp; CHAR(34)&amp;[Hoja1.G443]&amp; CHAR(34) &amp; &quot; },&quot;" office:value-type="string" office:string-value=" { id: 442, enunciado: &quot;&quot;, opciones: [&quot;&quot;, &quot;&quot;, &quot;&quot;, &quot;&quot;], correcta:  -1, observaciones: &quot;&quot; },">
            <text:p><text:s/>{ id: 44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4]&amp; CHAR(34) &amp; &quot;, opciones: [&quot;&amp; CHAR(34)&amp;[Hoja1.B444]&amp; CHAR(34)&amp;&quot;, &quot;&amp; CHAR(34)&amp;[Hoja1.C444]&amp; CHAR(34)&amp;&quot;, &quot;&amp; CHAR(34)&amp;[Hoja1.D444]&amp; CHAR(34)&amp;&quot;, &quot;&amp; CHAR(34)&amp;[Hoja1.E444]&amp; CHAR(34)&amp;&quot;], correcta:  &quot;&amp;[Hoja1.F444]-1&amp; &quot;, observaciones: &quot; &amp; CHAR(34)&amp;[Hoja1.G444]&amp; CHAR(34) &amp; &quot; },&quot;" office:value-type="string" office:string-value=" { id: 443, enunciado: &quot;&quot;, opciones: [&quot;&quot;, &quot;&quot;, &quot;&quot;, &quot;&quot;], correcta:  -1, observaciones: &quot;&quot; },">
            <text:p><text:s/>{ id: 44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5]&amp; CHAR(34) &amp; &quot;, opciones: [&quot;&amp; CHAR(34)&amp;[Hoja1.B445]&amp; CHAR(34)&amp;&quot;, &quot;&amp; CHAR(34)&amp;[Hoja1.C445]&amp; CHAR(34)&amp;&quot;, &quot;&amp; CHAR(34)&amp;[Hoja1.D445]&amp; CHAR(34)&amp;&quot;, &quot;&amp; CHAR(34)&amp;[Hoja1.E445]&amp; CHAR(34)&amp;&quot;], correcta:  &quot;&amp;[Hoja1.F445]-1&amp; &quot;, observaciones: &quot; &amp; CHAR(34)&amp;[Hoja1.G445]&amp; CHAR(34) &amp; &quot; },&quot;" office:value-type="string" office:string-value=" { id: 444, enunciado: &quot;&quot;, opciones: [&quot;&quot;, &quot;&quot;, &quot;&quot;, &quot;&quot;], correcta:  -1, observaciones: &quot;&quot; },">
            <text:p><text:s/>{ id: 44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6]&amp; CHAR(34) &amp; &quot;, opciones: [&quot;&amp; CHAR(34)&amp;[Hoja1.B446]&amp; CHAR(34)&amp;&quot;, &quot;&amp; CHAR(34)&amp;[Hoja1.C446]&amp; CHAR(34)&amp;&quot;, &quot;&amp; CHAR(34)&amp;[Hoja1.D446]&amp; CHAR(34)&amp;&quot;, &quot;&amp; CHAR(34)&amp;[Hoja1.E446]&amp; CHAR(34)&amp;&quot;], correcta:  &quot;&amp;[Hoja1.F446]-1&amp; &quot;, observaciones: &quot; &amp; CHAR(34)&amp;[Hoja1.G446]&amp; CHAR(34) &amp; &quot; },&quot;" office:value-type="string" office:string-value=" { id: 445, enunciado: &quot;&quot;, opciones: [&quot;&quot;, &quot;&quot;, &quot;&quot;, &quot;&quot;], correcta:  -1, observaciones: &quot;&quot; },">
            <text:p><text:s/>{ id: 44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7]&amp; CHAR(34) &amp; &quot;, opciones: [&quot;&amp; CHAR(34)&amp;[Hoja1.B447]&amp; CHAR(34)&amp;&quot;, &quot;&amp; CHAR(34)&amp;[Hoja1.C447]&amp; CHAR(34)&amp;&quot;, &quot;&amp; CHAR(34)&amp;[Hoja1.D447]&amp; CHAR(34)&amp;&quot;, &quot;&amp; CHAR(34)&amp;[Hoja1.E447]&amp; CHAR(34)&amp;&quot;], correcta:  &quot;&amp;[Hoja1.F447]-1&amp; &quot;, observaciones: &quot; &amp; CHAR(34)&amp;[Hoja1.G447]&amp; CHAR(34) &amp; &quot; },&quot;" office:value-type="string" office:string-value=" { id: 446, enunciado: &quot;&quot;, opciones: [&quot;&quot;, &quot;&quot;, &quot;&quot;, &quot;&quot;], correcta:  -1, observaciones: &quot;&quot; },">
            <text:p><text:s/>{ id: 44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8]&amp; CHAR(34) &amp; &quot;, opciones: [&quot;&amp; CHAR(34)&amp;[Hoja1.B448]&amp; CHAR(34)&amp;&quot;, &quot;&amp; CHAR(34)&amp;[Hoja1.C448]&amp; CHAR(34)&amp;&quot;, &quot;&amp; CHAR(34)&amp;[Hoja1.D448]&amp; CHAR(34)&amp;&quot;, &quot;&amp; CHAR(34)&amp;[Hoja1.E448]&amp; CHAR(34)&amp;&quot;], correcta:  &quot;&amp;[Hoja1.F448]-1&amp; &quot;, observaciones: &quot; &amp; CHAR(34)&amp;[Hoja1.G448]&amp; CHAR(34) &amp; &quot; },&quot;" office:value-type="string" office:string-value=" { id: 447, enunciado: &quot;&quot;, opciones: [&quot;&quot;, &quot;&quot;, &quot;&quot;, &quot;&quot;], correcta:  -1, observaciones: &quot;&quot; },">
            <text:p><text:s/>{ id: 44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49]&amp; CHAR(34) &amp; &quot;, opciones: [&quot;&amp; CHAR(34)&amp;[Hoja1.B449]&amp; CHAR(34)&amp;&quot;, &quot;&amp; CHAR(34)&amp;[Hoja1.C449]&amp; CHAR(34)&amp;&quot;, &quot;&amp; CHAR(34)&amp;[Hoja1.D449]&amp; CHAR(34)&amp;&quot;, &quot;&amp; CHAR(34)&amp;[Hoja1.E449]&amp; CHAR(34)&amp;&quot;], correcta:  &quot;&amp;[Hoja1.F449]-1&amp; &quot;, observaciones: &quot; &amp; CHAR(34)&amp;[Hoja1.G449]&amp; CHAR(34) &amp; &quot; },&quot;" office:value-type="string" office:string-value=" { id: 448, enunciado: &quot;&quot;, opciones: [&quot;&quot;, &quot;&quot;, &quot;&quot;, &quot;&quot;], correcta:  -1, observaciones: &quot;&quot; },">
            <text:p><text:s/>{ id: 44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0]&amp; CHAR(34) &amp; &quot;, opciones: [&quot;&amp; CHAR(34)&amp;[Hoja1.B450]&amp; CHAR(34)&amp;&quot;, &quot;&amp; CHAR(34)&amp;[Hoja1.C450]&amp; CHAR(34)&amp;&quot;, &quot;&amp; CHAR(34)&amp;[Hoja1.D450]&amp; CHAR(34)&amp;&quot;, &quot;&amp; CHAR(34)&amp;[Hoja1.E450]&amp; CHAR(34)&amp;&quot;], correcta:  &quot;&amp;[Hoja1.F450]-1&amp; &quot;, observaciones: &quot; &amp; CHAR(34)&amp;[Hoja1.G450]&amp; CHAR(34) &amp; &quot; },&quot;" office:value-type="string" office:string-value=" { id: 449, enunciado: &quot;&quot;, opciones: [&quot;&quot;, &quot;&quot;, &quot;&quot;, &quot;&quot;], correcta:  -1, observaciones: &quot;&quot; },">
            <text:p><text:s/>{ id: 44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1]&amp; CHAR(34) &amp; &quot;, opciones: [&quot;&amp; CHAR(34)&amp;[Hoja1.B451]&amp; CHAR(34)&amp;&quot;, &quot;&amp; CHAR(34)&amp;[Hoja1.C451]&amp; CHAR(34)&amp;&quot;, &quot;&amp; CHAR(34)&amp;[Hoja1.D451]&amp; CHAR(34)&amp;&quot;, &quot;&amp; CHAR(34)&amp;[Hoja1.E451]&amp; CHAR(34)&amp;&quot;], correcta:  &quot;&amp;[Hoja1.F451]-1&amp; &quot;, observaciones: &quot; &amp; CHAR(34)&amp;[Hoja1.G451]&amp; CHAR(34) &amp; &quot; },&quot;" office:value-type="string" office:string-value=" { id: 450, enunciado: &quot;&quot;, opciones: [&quot;&quot;, &quot;&quot;, &quot;&quot;, &quot;&quot;], correcta:  -1, observaciones: &quot;&quot; },">
            <text:p><text:s/>{ id: 45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2]&amp; CHAR(34) &amp; &quot;, opciones: [&quot;&amp; CHAR(34)&amp;[Hoja1.B452]&amp; CHAR(34)&amp;&quot;, &quot;&amp; CHAR(34)&amp;[Hoja1.C452]&amp; CHAR(34)&amp;&quot;, &quot;&amp; CHAR(34)&amp;[Hoja1.D452]&amp; CHAR(34)&amp;&quot;, &quot;&amp; CHAR(34)&amp;[Hoja1.E452]&amp; CHAR(34)&amp;&quot;], correcta:  &quot;&amp;[Hoja1.F452]-1&amp; &quot;, observaciones: &quot; &amp; CHAR(34)&amp;[Hoja1.G452]&amp; CHAR(34) &amp; &quot; },&quot;" office:value-type="string" office:string-value=" { id: 451, enunciado: &quot;&quot;, opciones: [&quot;&quot;, &quot;&quot;, &quot;&quot;, &quot;&quot;], correcta:  -1, observaciones: &quot;&quot; },">
            <text:p><text:s/>{ id: 45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3]&amp; CHAR(34) &amp; &quot;, opciones: [&quot;&amp; CHAR(34)&amp;[Hoja1.B453]&amp; CHAR(34)&amp;&quot;, &quot;&amp; CHAR(34)&amp;[Hoja1.C453]&amp; CHAR(34)&amp;&quot;, &quot;&amp; CHAR(34)&amp;[Hoja1.D453]&amp; CHAR(34)&amp;&quot;, &quot;&amp; CHAR(34)&amp;[Hoja1.E453]&amp; CHAR(34)&amp;&quot;], correcta:  &quot;&amp;[Hoja1.F453]-1&amp; &quot;, observaciones: &quot; &amp; CHAR(34)&amp;[Hoja1.G453]&amp; CHAR(34) &amp; &quot; },&quot;" office:value-type="string" office:string-value=" { id: 452, enunciado: &quot;&quot;, opciones: [&quot;&quot;, &quot;&quot;, &quot;&quot;, &quot;&quot;], correcta:  -1, observaciones: &quot;&quot; },">
            <text:p><text:s/>{ id: 45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4]&amp; CHAR(34) &amp; &quot;, opciones: [&quot;&amp; CHAR(34)&amp;[Hoja1.B454]&amp; CHAR(34)&amp;&quot;, &quot;&amp; CHAR(34)&amp;[Hoja1.C454]&amp; CHAR(34)&amp;&quot;, &quot;&amp; CHAR(34)&amp;[Hoja1.D454]&amp; CHAR(34)&amp;&quot;, &quot;&amp; CHAR(34)&amp;[Hoja1.E454]&amp; CHAR(34)&amp;&quot;], correcta:  &quot;&amp;[Hoja1.F454]-1&amp; &quot;, observaciones: &quot; &amp; CHAR(34)&amp;[Hoja1.G454]&amp; CHAR(34) &amp; &quot; },&quot;" office:value-type="string" office:string-value=" { id: 453, enunciado: &quot;&quot;, opciones: [&quot;&quot;, &quot;&quot;, &quot;&quot;, &quot;&quot;], correcta:  -1, observaciones: &quot;&quot; },">
            <text:p><text:s/>{ id: 45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5]&amp; CHAR(34) &amp; &quot;, opciones: [&quot;&amp; CHAR(34)&amp;[Hoja1.B455]&amp; CHAR(34)&amp;&quot;, &quot;&amp; CHAR(34)&amp;[Hoja1.C455]&amp; CHAR(34)&amp;&quot;, &quot;&amp; CHAR(34)&amp;[Hoja1.D455]&amp; CHAR(34)&amp;&quot;, &quot;&amp; CHAR(34)&amp;[Hoja1.E455]&amp; CHAR(34)&amp;&quot;], correcta:  &quot;&amp;[Hoja1.F455]-1&amp; &quot;, observaciones: &quot; &amp; CHAR(34)&amp;[Hoja1.G455]&amp; CHAR(34) &amp; &quot; },&quot;" office:value-type="string" office:string-value=" { id: 454, enunciado: &quot;&quot;, opciones: [&quot;&quot;, &quot;&quot;, &quot;&quot;, &quot;&quot;], correcta:  -1, observaciones: &quot;&quot; },">
            <text:p><text:s/>{ id: 45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6]&amp; CHAR(34) &amp; &quot;, opciones: [&quot;&amp; CHAR(34)&amp;[Hoja1.B456]&amp; CHAR(34)&amp;&quot;, &quot;&amp; CHAR(34)&amp;[Hoja1.C456]&amp; CHAR(34)&amp;&quot;, &quot;&amp; CHAR(34)&amp;[Hoja1.D456]&amp; CHAR(34)&amp;&quot;, &quot;&amp; CHAR(34)&amp;[Hoja1.E456]&amp; CHAR(34)&amp;&quot;], correcta:  &quot;&amp;[Hoja1.F456]-1&amp; &quot;, observaciones: &quot; &amp; CHAR(34)&amp;[Hoja1.G456]&amp; CHAR(34) &amp; &quot; },&quot;" office:value-type="string" office:string-value=" { id: 455, enunciado: &quot;&quot;, opciones: [&quot;&quot;, &quot;&quot;, &quot;&quot;, &quot;&quot;], correcta:  -1, observaciones: &quot;&quot; },">
            <text:p><text:s/>{ id: 45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7]&amp; CHAR(34) &amp; &quot;, opciones: [&quot;&amp; CHAR(34)&amp;[Hoja1.B457]&amp; CHAR(34)&amp;&quot;, &quot;&amp; CHAR(34)&amp;[Hoja1.C457]&amp; CHAR(34)&amp;&quot;, &quot;&amp; CHAR(34)&amp;[Hoja1.D457]&amp; CHAR(34)&amp;&quot;, &quot;&amp; CHAR(34)&amp;[Hoja1.E457]&amp; CHAR(34)&amp;&quot;], correcta:  &quot;&amp;[Hoja1.F457]-1&amp; &quot;, observaciones: &quot; &amp; CHAR(34)&amp;[Hoja1.G457]&amp; CHAR(34) &amp; &quot; },&quot;" office:value-type="string" office:string-value=" { id: 456, enunciado: &quot;&quot;, opciones: [&quot;&quot;, &quot;&quot;, &quot;&quot;, &quot;&quot;], correcta:  -1, observaciones: &quot;&quot; },">
            <text:p><text:s/>{ id: 45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8]&amp; CHAR(34) &amp; &quot;, opciones: [&quot;&amp; CHAR(34)&amp;[Hoja1.B458]&amp; CHAR(34)&amp;&quot;, &quot;&amp; CHAR(34)&amp;[Hoja1.C458]&amp; CHAR(34)&amp;&quot;, &quot;&amp; CHAR(34)&amp;[Hoja1.D458]&amp; CHAR(34)&amp;&quot;, &quot;&amp; CHAR(34)&amp;[Hoja1.E458]&amp; CHAR(34)&amp;&quot;], correcta:  &quot;&amp;[Hoja1.F458]-1&amp; &quot;, observaciones: &quot; &amp; CHAR(34)&amp;[Hoja1.G458]&amp; CHAR(34) &amp; &quot; },&quot;" office:value-type="string" office:string-value=" { id: 457, enunciado: &quot;&quot;, opciones: [&quot;&quot;, &quot;&quot;, &quot;&quot;, &quot;&quot;], correcta:  -1, observaciones: &quot;&quot; },">
            <text:p><text:s/>{ id: 45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59]&amp; CHAR(34) &amp; &quot;, opciones: [&quot;&amp; CHAR(34)&amp;[Hoja1.B459]&amp; CHAR(34)&amp;&quot;, &quot;&amp; CHAR(34)&amp;[Hoja1.C459]&amp; CHAR(34)&amp;&quot;, &quot;&amp; CHAR(34)&amp;[Hoja1.D459]&amp; CHAR(34)&amp;&quot;, &quot;&amp; CHAR(34)&amp;[Hoja1.E459]&amp; CHAR(34)&amp;&quot;], correcta:  &quot;&amp;[Hoja1.F459]-1&amp; &quot;, observaciones: &quot; &amp; CHAR(34)&amp;[Hoja1.G459]&amp; CHAR(34) &amp; &quot; },&quot;" office:value-type="string" office:string-value=" { id: 458, enunciado: &quot;&quot;, opciones: [&quot;&quot;, &quot;&quot;, &quot;&quot;, &quot;&quot;], correcta:  -1, observaciones: &quot;&quot; },">
            <text:p><text:s/>{ id: 45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0]&amp; CHAR(34) &amp; &quot;, opciones: [&quot;&amp; CHAR(34)&amp;[Hoja1.B460]&amp; CHAR(34)&amp;&quot;, &quot;&amp; CHAR(34)&amp;[Hoja1.C460]&amp; CHAR(34)&amp;&quot;, &quot;&amp; CHAR(34)&amp;[Hoja1.D460]&amp; CHAR(34)&amp;&quot;, &quot;&amp; CHAR(34)&amp;[Hoja1.E460]&amp; CHAR(34)&amp;&quot;], correcta:  &quot;&amp;[Hoja1.F460]-1&amp; &quot;, observaciones: &quot; &amp; CHAR(34)&amp;[Hoja1.G460]&amp; CHAR(34) &amp; &quot; },&quot;" office:value-type="string" office:string-value=" { id: 459, enunciado: &quot;&quot;, opciones: [&quot;&quot;, &quot;&quot;, &quot;&quot;, &quot;&quot;], correcta:  -1, observaciones: &quot;&quot; },">
            <text:p><text:s/>{ id: 45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1]&amp; CHAR(34) &amp; &quot;, opciones: [&quot;&amp; CHAR(34)&amp;[Hoja1.B461]&amp; CHAR(34)&amp;&quot;, &quot;&amp; CHAR(34)&amp;[Hoja1.C461]&amp; CHAR(34)&amp;&quot;, &quot;&amp; CHAR(34)&amp;[Hoja1.D461]&amp; CHAR(34)&amp;&quot;, &quot;&amp; CHAR(34)&amp;[Hoja1.E461]&amp; CHAR(34)&amp;&quot;], correcta:  &quot;&amp;[Hoja1.F461]-1&amp; &quot;, observaciones: &quot; &amp; CHAR(34)&amp;[Hoja1.G461]&amp; CHAR(34) &amp; &quot; },&quot;" office:value-type="string" office:string-value=" { id: 460, enunciado: &quot;&quot;, opciones: [&quot;&quot;, &quot;&quot;, &quot;&quot;, &quot;&quot;], correcta:  -1, observaciones: &quot;&quot; },">
            <text:p><text:s/>{ id: 46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2]&amp; CHAR(34) &amp; &quot;, opciones: [&quot;&amp; CHAR(34)&amp;[Hoja1.B462]&amp; CHAR(34)&amp;&quot;, &quot;&amp; CHAR(34)&amp;[Hoja1.C462]&amp; CHAR(34)&amp;&quot;, &quot;&amp; CHAR(34)&amp;[Hoja1.D462]&amp; CHAR(34)&amp;&quot;, &quot;&amp; CHAR(34)&amp;[Hoja1.E462]&amp; CHAR(34)&amp;&quot;], correcta:  &quot;&amp;[Hoja1.F462]-1&amp; &quot;, observaciones: &quot; &amp; CHAR(34)&amp;[Hoja1.G462]&amp; CHAR(34) &amp; &quot; },&quot;" office:value-type="string" office:string-value=" { id: 461, enunciado: &quot;&quot;, opciones: [&quot;&quot;, &quot;&quot;, &quot;&quot;, &quot;&quot;], correcta:  -1, observaciones: &quot;&quot; },">
            <text:p><text:s/>{ id: 46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3]&amp; CHAR(34) &amp; &quot;, opciones: [&quot;&amp; CHAR(34)&amp;[Hoja1.B463]&amp; CHAR(34)&amp;&quot;, &quot;&amp; CHAR(34)&amp;[Hoja1.C463]&amp; CHAR(34)&amp;&quot;, &quot;&amp; CHAR(34)&amp;[Hoja1.D463]&amp; CHAR(34)&amp;&quot;, &quot;&amp; CHAR(34)&amp;[Hoja1.E463]&amp; CHAR(34)&amp;&quot;], correcta:  &quot;&amp;[Hoja1.F463]-1&amp; &quot;, observaciones: &quot; &amp; CHAR(34)&amp;[Hoja1.G463]&amp; CHAR(34) &amp; &quot; },&quot;" office:value-type="string" office:string-value=" { id: 462, enunciado: &quot;&quot;, opciones: [&quot;&quot;, &quot;&quot;, &quot;&quot;, &quot;&quot;], correcta:  -1, observaciones: &quot;&quot; },">
            <text:p><text:s/>{ id: 46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4]&amp; CHAR(34) &amp; &quot;, opciones: [&quot;&amp; CHAR(34)&amp;[Hoja1.B464]&amp; CHAR(34)&amp;&quot;, &quot;&amp; CHAR(34)&amp;[Hoja1.C464]&amp; CHAR(34)&amp;&quot;, &quot;&amp; CHAR(34)&amp;[Hoja1.D464]&amp; CHAR(34)&amp;&quot;, &quot;&amp; CHAR(34)&amp;[Hoja1.E464]&amp; CHAR(34)&amp;&quot;], correcta:  &quot;&amp;[Hoja1.F464]-1&amp; &quot;, observaciones: &quot; &amp; CHAR(34)&amp;[Hoja1.G464]&amp; CHAR(34) &amp; &quot; },&quot;" office:value-type="string" office:string-value=" { id: 463, enunciado: &quot;&quot;, opciones: [&quot;&quot;, &quot;&quot;, &quot;&quot;, &quot;&quot;], correcta:  -1, observaciones: &quot;&quot; },">
            <text:p><text:s/>{ id: 46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5]&amp; CHAR(34) &amp; &quot;, opciones: [&quot;&amp; CHAR(34)&amp;[Hoja1.B465]&amp; CHAR(34)&amp;&quot;, &quot;&amp; CHAR(34)&amp;[Hoja1.C465]&amp; CHAR(34)&amp;&quot;, &quot;&amp; CHAR(34)&amp;[Hoja1.D465]&amp; CHAR(34)&amp;&quot;, &quot;&amp; CHAR(34)&amp;[Hoja1.E465]&amp; CHAR(34)&amp;&quot;], correcta:  &quot;&amp;[Hoja1.F465]-1&amp; &quot;, observaciones: &quot; &amp; CHAR(34)&amp;[Hoja1.G465]&amp; CHAR(34) &amp; &quot; },&quot;" office:value-type="string" office:string-value=" { id: 464, enunciado: &quot;&quot;, opciones: [&quot;&quot;, &quot;&quot;, &quot;&quot;, &quot;&quot;], correcta:  -1, observaciones: &quot;&quot; },">
            <text:p><text:s/>{ id: 46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6]&amp; CHAR(34) &amp; &quot;, opciones: [&quot;&amp; CHAR(34)&amp;[Hoja1.B466]&amp; CHAR(34)&amp;&quot;, &quot;&amp; CHAR(34)&amp;[Hoja1.C466]&amp; CHAR(34)&amp;&quot;, &quot;&amp; CHAR(34)&amp;[Hoja1.D466]&amp; CHAR(34)&amp;&quot;, &quot;&amp; CHAR(34)&amp;[Hoja1.E466]&amp; CHAR(34)&amp;&quot;], correcta:  &quot;&amp;[Hoja1.F466]-1&amp; &quot;, observaciones: &quot; &amp; CHAR(34)&amp;[Hoja1.G466]&amp; CHAR(34) &amp; &quot; },&quot;" office:value-type="string" office:string-value=" { id: 465, enunciado: &quot;&quot;, opciones: [&quot;&quot;, &quot;&quot;, &quot;&quot;, &quot;&quot;], correcta:  -1, observaciones: &quot;&quot; },">
            <text:p><text:s/>{ id: 46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7]&amp; CHAR(34) &amp; &quot;, opciones: [&quot;&amp; CHAR(34)&amp;[Hoja1.B467]&amp; CHAR(34)&amp;&quot;, &quot;&amp; CHAR(34)&amp;[Hoja1.C467]&amp; CHAR(34)&amp;&quot;, &quot;&amp; CHAR(34)&amp;[Hoja1.D467]&amp; CHAR(34)&amp;&quot;, &quot;&amp; CHAR(34)&amp;[Hoja1.E467]&amp; CHAR(34)&amp;&quot;], correcta:  &quot;&amp;[Hoja1.F467]-1&amp; &quot;, observaciones: &quot; &amp; CHAR(34)&amp;[Hoja1.G467]&amp; CHAR(34) &amp; &quot; },&quot;" office:value-type="string" office:string-value=" { id: 466, enunciado: &quot;&quot;, opciones: [&quot;&quot;, &quot;&quot;, &quot;&quot;, &quot;&quot;], correcta:  -1, observaciones: &quot;&quot; },">
            <text:p><text:s/>{ id: 46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8]&amp; CHAR(34) &amp; &quot;, opciones: [&quot;&amp; CHAR(34)&amp;[Hoja1.B468]&amp; CHAR(34)&amp;&quot;, &quot;&amp; CHAR(34)&amp;[Hoja1.C468]&amp; CHAR(34)&amp;&quot;, &quot;&amp; CHAR(34)&amp;[Hoja1.D468]&amp; CHAR(34)&amp;&quot;, &quot;&amp; CHAR(34)&amp;[Hoja1.E468]&amp; CHAR(34)&amp;&quot;], correcta:  &quot;&amp;[Hoja1.F468]-1&amp; &quot;, observaciones: &quot; &amp; CHAR(34)&amp;[Hoja1.G468]&amp; CHAR(34) &amp; &quot; },&quot;" office:value-type="string" office:string-value=" { id: 467, enunciado: &quot;&quot;, opciones: [&quot;&quot;, &quot;&quot;, &quot;&quot;, &quot;&quot;], correcta:  -1, observaciones: &quot;&quot; },">
            <text:p><text:s/>{ id: 46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69]&amp; CHAR(34) &amp; &quot;, opciones: [&quot;&amp; CHAR(34)&amp;[Hoja1.B469]&amp; CHAR(34)&amp;&quot;, &quot;&amp; CHAR(34)&amp;[Hoja1.C469]&amp; CHAR(34)&amp;&quot;, &quot;&amp; CHAR(34)&amp;[Hoja1.D469]&amp; CHAR(34)&amp;&quot;, &quot;&amp; CHAR(34)&amp;[Hoja1.E469]&amp; CHAR(34)&amp;&quot;], correcta:  &quot;&amp;[Hoja1.F469]-1&amp; &quot;, observaciones: &quot; &amp; CHAR(34)&amp;[Hoja1.G469]&amp; CHAR(34) &amp; &quot; },&quot;" office:value-type="string" office:string-value=" { id: 468, enunciado: &quot;&quot;, opciones: [&quot;&quot;, &quot;&quot;, &quot;&quot;, &quot;&quot;], correcta:  -1, observaciones: &quot;&quot; },">
            <text:p><text:s/>{ id: 46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0]&amp; CHAR(34) &amp; &quot;, opciones: [&quot;&amp; CHAR(34)&amp;[Hoja1.B470]&amp; CHAR(34)&amp;&quot;, &quot;&amp; CHAR(34)&amp;[Hoja1.C470]&amp; CHAR(34)&amp;&quot;, &quot;&amp; CHAR(34)&amp;[Hoja1.D470]&amp; CHAR(34)&amp;&quot;, &quot;&amp; CHAR(34)&amp;[Hoja1.E470]&amp; CHAR(34)&amp;&quot;], correcta:  &quot;&amp;[Hoja1.F470]-1&amp; &quot;, observaciones: &quot; &amp; CHAR(34)&amp;[Hoja1.G470]&amp; CHAR(34) &amp; &quot; },&quot;" office:value-type="string" office:string-value=" { id: 469, enunciado: &quot;&quot;, opciones: [&quot;&quot;, &quot;&quot;, &quot;&quot;, &quot;&quot;], correcta:  -1, observaciones: &quot;&quot; },">
            <text:p><text:s/>{ id: 46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1]&amp; CHAR(34) &amp; &quot;, opciones: [&quot;&amp; CHAR(34)&amp;[Hoja1.B471]&amp; CHAR(34)&amp;&quot;, &quot;&amp; CHAR(34)&amp;[Hoja1.C471]&amp; CHAR(34)&amp;&quot;, &quot;&amp; CHAR(34)&amp;[Hoja1.D471]&amp; CHAR(34)&amp;&quot;, &quot;&amp; CHAR(34)&amp;[Hoja1.E471]&amp; CHAR(34)&amp;&quot;], correcta:  &quot;&amp;[Hoja1.F471]-1&amp; &quot;, observaciones: &quot; &amp; CHAR(34)&amp;[Hoja1.G471]&amp; CHAR(34) &amp; &quot; },&quot;" office:value-type="string" office:string-value=" { id: 470, enunciado: &quot;&quot;, opciones: [&quot;&quot;, &quot;&quot;, &quot;&quot;, &quot;&quot;], correcta:  -1, observaciones: &quot;&quot; },">
            <text:p><text:s/>{ id: 47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2]&amp; CHAR(34) &amp; &quot;, opciones: [&quot;&amp; CHAR(34)&amp;[Hoja1.B472]&amp; CHAR(34)&amp;&quot;, &quot;&amp; CHAR(34)&amp;[Hoja1.C472]&amp; CHAR(34)&amp;&quot;, &quot;&amp; CHAR(34)&amp;[Hoja1.D472]&amp; CHAR(34)&amp;&quot;, &quot;&amp; CHAR(34)&amp;[Hoja1.E472]&amp; CHAR(34)&amp;&quot;], correcta:  &quot;&amp;[Hoja1.F472]-1&amp; &quot;, observaciones: &quot; &amp; CHAR(34)&amp;[Hoja1.G472]&amp; CHAR(34) &amp; &quot; },&quot;" office:value-type="string" office:string-value=" { id: 471, enunciado: &quot;&quot;, opciones: [&quot;&quot;, &quot;&quot;, &quot;&quot;, &quot;&quot;], correcta:  -1, observaciones: &quot;&quot; },">
            <text:p><text:s/>{ id: 47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3]&amp; CHAR(34) &amp; &quot;, opciones: [&quot;&amp; CHAR(34)&amp;[Hoja1.B473]&amp; CHAR(34)&amp;&quot;, &quot;&amp; CHAR(34)&amp;[Hoja1.C473]&amp; CHAR(34)&amp;&quot;, &quot;&amp; CHAR(34)&amp;[Hoja1.D473]&amp; CHAR(34)&amp;&quot;, &quot;&amp; CHAR(34)&amp;[Hoja1.E473]&amp; CHAR(34)&amp;&quot;], correcta:  &quot;&amp;[Hoja1.F473]-1&amp; &quot;, observaciones: &quot; &amp; CHAR(34)&amp;[Hoja1.G473]&amp; CHAR(34) &amp; &quot; },&quot;" office:value-type="string" office:string-value=" { id: 472, enunciado: &quot;&quot;, opciones: [&quot;&quot;, &quot;&quot;, &quot;&quot;, &quot;&quot;], correcta:  -1, observaciones: &quot;&quot; },">
            <text:p><text:s/>{ id: 47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4]&amp; CHAR(34) &amp; &quot;, opciones: [&quot;&amp; CHAR(34)&amp;[Hoja1.B474]&amp; CHAR(34)&amp;&quot;, &quot;&amp; CHAR(34)&amp;[Hoja1.C474]&amp; CHAR(34)&amp;&quot;, &quot;&amp; CHAR(34)&amp;[Hoja1.D474]&amp; CHAR(34)&amp;&quot;, &quot;&amp; CHAR(34)&amp;[Hoja1.E474]&amp; CHAR(34)&amp;&quot;], correcta:  &quot;&amp;[Hoja1.F474]-1&amp; &quot;, observaciones: &quot; &amp; CHAR(34)&amp;[Hoja1.G474]&amp; CHAR(34) &amp; &quot; },&quot;" office:value-type="string" office:string-value=" { id: 473, enunciado: &quot;&quot;, opciones: [&quot;&quot;, &quot;&quot;, &quot;&quot;, &quot;&quot;], correcta:  -1, observaciones: &quot;&quot; },">
            <text:p><text:s/>{ id: 47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5]&amp; CHAR(34) &amp; &quot;, opciones: [&quot;&amp; CHAR(34)&amp;[Hoja1.B475]&amp; CHAR(34)&amp;&quot;, &quot;&amp; CHAR(34)&amp;[Hoja1.C475]&amp; CHAR(34)&amp;&quot;, &quot;&amp; CHAR(34)&amp;[Hoja1.D475]&amp; CHAR(34)&amp;&quot;, &quot;&amp; CHAR(34)&amp;[Hoja1.E475]&amp; CHAR(34)&amp;&quot;], correcta:  &quot;&amp;[Hoja1.F475]-1&amp; &quot;, observaciones: &quot; &amp; CHAR(34)&amp;[Hoja1.G475]&amp; CHAR(34) &amp; &quot; },&quot;" office:value-type="string" office:string-value=" { id: 474, enunciado: &quot;&quot;, opciones: [&quot;&quot;, &quot;&quot;, &quot;&quot;, &quot;&quot;], correcta:  -1, observaciones: &quot;&quot; },">
            <text:p><text:s/>{ id: 47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6]&amp; CHAR(34) &amp; &quot;, opciones: [&quot;&amp; CHAR(34)&amp;[Hoja1.B476]&amp; CHAR(34)&amp;&quot;, &quot;&amp; CHAR(34)&amp;[Hoja1.C476]&amp; CHAR(34)&amp;&quot;, &quot;&amp; CHAR(34)&amp;[Hoja1.D476]&amp; CHAR(34)&amp;&quot;, &quot;&amp; CHAR(34)&amp;[Hoja1.E476]&amp; CHAR(34)&amp;&quot;], correcta:  &quot;&amp;[Hoja1.F476]-1&amp; &quot;, observaciones: &quot; &amp; CHAR(34)&amp;[Hoja1.G476]&amp; CHAR(34) &amp; &quot; },&quot;" office:value-type="string" office:string-value=" { id: 475, enunciado: &quot;&quot;, opciones: [&quot;&quot;, &quot;&quot;, &quot;&quot;, &quot;&quot;], correcta:  -1, observaciones: &quot;&quot; },">
            <text:p><text:s/>{ id: 47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7]&amp; CHAR(34) &amp; &quot;, opciones: [&quot;&amp; CHAR(34)&amp;[Hoja1.B477]&amp; CHAR(34)&amp;&quot;, &quot;&amp; CHAR(34)&amp;[Hoja1.C477]&amp; CHAR(34)&amp;&quot;, &quot;&amp; CHAR(34)&amp;[Hoja1.D477]&amp; CHAR(34)&amp;&quot;, &quot;&amp; CHAR(34)&amp;[Hoja1.E477]&amp; CHAR(34)&amp;&quot;], correcta:  &quot;&amp;[Hoja1.F477]-1&amp; &quot;, observaciones: &quot; &amp; CHAR(34)&amp;[Hoja1.G477]&amp; CHAR(34) &amp; &quot; },&quot;" office:value-type="string" office:string-value=" { id: 476, enunciado: &quot;&quot;, opciones: [&quot;&quot;, &quot;&quot;, &quot;&quot;, &quot;&quot;], correcta:  -1, observaciones: &quot;&quot; },">
            <text:p><text:s/>{ id: 47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8]&amp; CHAR(34) &amp; &quot;, opciones: [&quot;&amp; CHAR(34)&amp;[Hoja1.B478]&amp; CHAR(34)&amp;&quot;, &quot;&amp; CHAR(34)&amp;[Hoja1.C478]&amp; CHAR(34)&amp;&quot;, &quot;&amp; CHAR(34)&amp;[Hoja1.D478]&amp; CHAR(34)&amp;&quot;, &quot;&amp; CHAR(34)&amp;[Hoja1.E478]&amp; CHAR(34)&amp;&quot;], correcta:  &quot;&amp;[Hoja1.F478]-1&amp; &quot;, observaciones: &quot; &amp; CHAR(34)&amp;[Hoja1.G478]&amp; CHAR(34) &amp; &quot; },&quot;" office:value-type="string" office:string-value=" { id: 477, enunciado: &quot;&quot;, opciones: [&quot;&quot;, &quot;&quot;, &quot;&quot;, &quot;&quot;], correcta:  -1, observaciones: &quot;&quot; },">
            <text:p><text:s/>{ id: 47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79]&amp; CHAR(34) &amp; &quot;, opciones: [&quot;&amp; CHAR(34)&amp;[Hoja1.B479]&amp; CHAR(34)&amp;&quot;, &quot;&amp; CHAR(34)&amp;[Hoja1.C479]&amp; CHAR(34)&amp;&quot;, &quot;&amp; CHAR(34)&amp;[Hoja1.D479]&amp; CHAR(34)&amp;&quot;, &quot;&amp; CHAR(34)&amp;[Hoja1.E479]&amp; CHAR(34)&amp;&quot;], correcta:  &quot;&amp;[Hoja1.F479]-1&amp; &quot;, observaciones: &quot; &amp; CHAR(34)&amp;[Hoja1.G479]&amp; CHAR(34) &amp; &quot; },&quot;" office:value-type="string" office:string-value=" { id: 478, enunciado: &quot;&quot;, opciones: [&quot;&quot;, &quot;&quot;, &quot;&quot;, &quot;&quot;], correcta:  -1, observaciones: &quot;&quot; },">
            <text:p><text:s/>{ id: 47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0]&amp; CHAR(34) &amp; &quot;, opciones: [&quot;&amp; CHAR(34)&amp;[Hoja1.B480]&amp; CHAR(34)&amp;&quot;, &quot;&amp; CHAR(34)&amp;[Hoja1.C480]&amp; CHAR(34)&amp;&quot;, &quot;&amp; CHAR(34)&amp;[Hoja1.D480]&amp; CHAR(34)&amp;&quot;, &quot;&amp; CHAR(34)&amp;[Hoja1.E480]&amp; CHAR(34)&amp;&quot;], correcta:  &quot;&amp;[Hoja1.F480]-1&amp; &quot;, observaciones: &quot; &amp; CHAR(34)&amp;[Hoja1.G480]&amp; CHAR(34) &amp; &quot; },&quot;" office:value-type="string" office:string-value=" { id: 479, enunciado: &quot;&quot;, opciones: [&quot;&quot;, &quot;&quot;, &quot;&quot;, &quot;&quot;], correcta:  -1, observaciones: &quot;&quot; },">
            <text:p><text:s/>{ id: 47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1]&amp; CHAR(34) &amp; &quot;, opciones: [&quot;&amp; CHAR(34)&amp;[Hoja1.B481]&amp; CHAR(34)&amp;&quot;, &quot;&amp; CHAR(34)&amp;[Hoja1.C481]&amp; CHAR(34)&amp;&quot;, &quot;&amp; CHAR(34)&amp;[Hoja1.D481]&amp; CHAR(34)&amp;&quot;, &quot;&amp; CHAR(34)&amp;[Hoja1.E481]&amp; CHAR(34)&amp;&quot;], correcta:  &quot;&amp;[Hoja1.F481]-1&amp; &quot;, observaciones: &quot; &amp; CHAR(34)&amp;[Hoja1.G481]&amp; CHAR(34) &amp; &quot; },&quot;" office:value-type="string" office:string-value=" { id: 480, enunciado: &quot;&quot;, opciones: [&quot;&quot;, &quot;&quot;, &quot;&quot;, &quot;&quot;], correcta:  -1, observaciones: &quot;&quot; },">
            <text:p><text:s/>{ id: 48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2]&amp; CHAR(34) &amp; &quot;, opciones: [&quot;&amp; CHAR(34)&amp;[Hoja1.B482]&amp; CHAR(34)&amp;&quot;, &quot;&amp; CHAR(34)&amp;[Hoja1.C482]&amp; CHAR(34)&amp;&quot;, &quot;&amp; CHAR(34)&amp;[Hoja1.D482]&amp; CHAR(34)&amp;&quot;, &quot;&amp; CHAR(34)&amp;[Hoja1.E482]&amp; CHAR(34)&amp;&quot;], correcta:  &quot;&amp;[Hoja1.F482]-1&amp; &quot;, observaciones: &quot; &amp; CHAR(34)&amp;[Hoja1.G482]&amp; CHAR(34) &amp; &quot; },&quot;" office:value-type="string" office:string-value=" { id: 481, enunciado: &quot;&quot;, opciones: [&quot;&quot;, &quot;&quot;, &quot;&quot;, &quot;&quot;], correcta:  -1, observaciones: &quot;&quot; },">
            <text:p><text:s/>{ id: 48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3]&amp; CHAR(34) &amp; &quot;, opciones: [&quot;&amp; CHAR(34)&amp;[Hoja1.B483]&amp; CHAR(34)&amp;&quot;, &quot;&amp; CHAR(34)&amp;[Hoja1.C483]&amp; CHAR(34)&amp;&quot;, &quot;&amp; CHAR(34)&amp;[Hoja1.D483]&amp; CHAR(34)&amp;&quot;, &quot;&amp; CHAR(34)&amp;[Hoja1.E483]&amp; CHAR(34)&amp;&quot;], correcta:  &quot;&amp;[Hoja1.F483]-1&amp; &quot;, observaciones: &quot; &amp; CHAR(34)&amp;[Hoja1.G483]&amp; CHAR(34) &amp; &quot; },&quot;" office:value-type="string" office:string-value=" { id: 482, enunciado: &quot;&quot;, opciones: [&quot;&quot;, &quot;&quot;, &quot;&quot;, &quot;&quot;], correcta:  -1, observaciones: &quot;&quot; },">
            <text:p><text:s/>{ id: 48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4]&amp; CHAR(34) &amp; &quot;, opciones: [&quot;&amp; CHAR(34)&amp;[Hoja1.B484]&amp; CHAR(34)&amp;&quot;, &quot;&amp; CHAR(34)&amp;[Hoja1.C484]&amp; CHAR(34)&amp;&quot;, &quot;&amp; CHAR(34)&amp;[Hoja1.D484]&amp; CHAR(34)&amp;&quot;, &quot;&amp; CHAR(34)&amp;[Hoja1.E484]&amp; CHAR(34)&amp;&quot;], correcta:  &quot;&amp;[Hoja1.F484]-1&amp; &quot;, observaciones: &quot; &amp; CHAR(34)&amp;[Hoja1.G484]&amp; CHAR(34) &amp; &quot; },&quot;" office:value-type="string" office:string-value=" { id: 483, enunciado: &quot;&quot;, opciones: [&quot;&quot;, &quot;&quot;, &quot;&quot;, &quot;&quot;], correcta:  -1, observaciones: &quot;&quot; },">
            <text:p><text:s/>{ id: 48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5]&amp; CHAR(34) &amp; &quot;, opciones: [&quot;&amp; CHAR(34)&amp;[Hoja1.B485]&amp; CHAR(34)&amp;&quot;, &quot;&amp; CHAR(34)&amp;[Hoja1.C485]&amp; CHAR(34)&amp;&quot;, &quot;&amp; CHAR(34)&amp;[Hoja1.D485]&amp; CHAR(34)&amp;&quot;, &quot;&amp; CHAR(34)&amp;[Hoja1.E485]&amp; CHAR(34)&amp;&quot;], correcta:  &quot;&amp;[Hoja1.F485]-1&amp; &quot;, observaciones: &quot; &amp; CHAR(34)&amp;[Hoja1.G485]&amp; CHAR(34) &amp; &quot; },&quot;" office:value-type="string" office:string-value=" { id: 484, enunciado: &quot;&quot;, opciones: [&quot;&quot;, &quot;&quot;, &quot;&quot;, &quot;&quot;], correcta:  -1, observaciones: &quot;&quot; },">
            <text:p><text:s/>{ id: 48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6]&amp; CHAR(34) &amp; &quot;, opciones: [&quot;&amp; CHAR(34)&amp;[Hoja1.B486]&amp; CHAR(34)&amp;&quot;, &quot;&amp; CHAR(34)&amp;[Hoja1.C486]&amp; CHAR(34)&amp;&quot;, &quot;&amp; CHAR(34)&amp;[Hoja1.D486]&amp; CHAR(34)&amp;&quot;, &quot;&amp; CHAR(34)&amp;[Hoja1.E486]&amp; CHAR(34)&amp;&quot;], correcta:  &quot;&amp;[Hoja1.F486]-1&amp; &quot;, observaciones: &quot; &amp; CHAR(34)&amp;[Hoja1.G486]&amp; CHAR(34) &amp; &quot; },&quot;" office:value-type="string" office:string-value=" { id: 485, enunciado: &quot;&quot;, opciones: [&quot;&quot;, &quot;&quot;, &quot;&quot;, &quot;&quot;], correcta:  -1, observaciones: &quot;&quot; },">
            <text:p><text:s/>{ id: 48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7]&amp; CHAR(34) &amp; &quot;, opciones: [&quot;&amp; CHAR(34)&amp;[Hoja1.B487]&amp; CHAR(34)&amp;&quot;, &quot;&amp; CHAR(34)&amp;[Hoja1.C487]&amp; CHAR(34)&amp;&quot;, &quot;&amp; CHAR(34)&amp;[Hoja1.D487]&amp; CHAR(34)&amp;&quot;, &quot;&amp; CHAR(34)&amp;[Hoja1.E487]&amp; CHAR(34)&amp;&quot;], correcta:  &quot;&amp;[Hoja1.F487]-1&amp; &quot;, observaciones: &quot; &amp; CHAR(34)&amp;[Hoja1.G487]&amp; CHAR(34) &amp; &quot; },&quot;" office:value-type="string" office:string-value=" { id: 486, enunciado: &quot;&quot;, opciones: [&quot;&quot;, &quot;&quot;, &quot;&quot;, &quot;&quot;], correcta:  -1, observaciones: &quot;&quot; },">
            <text:p><text:s/>{ id: 48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8]&amp; CHAR(34) &amp; &quot;, opciones: [&quot;&amp; CHAR(34)&amp;[Hoja1.B488]&amp; CHAR(34)&amp;&quot;, &quot;&amp; CHAR(34)&amp;[Hoja1.C488]&amp; CHAR(34)&amp;&quot;, &quot;&amp; CHAR(34)&amp;[Hoja1.D488]&amp; CHAR(34)&amp;&quot;, &quot;&amp; CHAR(34)&amp;[Hoja1.E488]&amp; CHAR(34)&amp;&quot;], correcta:  &quot;&amp;[Hoja1.F488]-1&amp; &quot;, observaciones: &quot; &amp; CHAR(34)&amp;[Hoja1.G488]&amp; CHAR(34) &amp; &quot; },&quot;" office:value-type="string" office:string-value=" { id: 487, enunciado: &quot;&quot;, opciones: [&quot;&quot;, &quot;&quot;, &quot;&quot;, &quot;&quot;], correcta:  -1, observaciones: &quot;&quot; },">
            <text:p><text:s/>{ id: 48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89]&amp; CHAR(34) &amp; &quot;, opciones: [&quot;&amp; CHAR(34)&amp;[Hoja1.B489]&amp; CHAR(34)&amp;&quot;, &quot;&amp; CHAR(34)&amp;[Hoja1.C489]&amp; CHAR(34)&amp;&quot;, &quot;&amp; CHAR(34)&amp;[Hoja1.D489]&amp; CHAR(34)&amp;&quot;, &quot;&amp; CHAR(34)&amp;[Hoja1.E489]&amp; CHAR(34)&amp;&quot;], correcta:  &quot;&amp;[Hoja1.F489]-1&amp; &quot;, observaciones: &quot; &amp; CHAR(34)&amp;[Hoja1.G489]&amp; CHAR(34) &amp; &quot; },&quot;" office:value-type="string" office:string-value=" { id: 488, enunciado: &quot;&quot;, opciones: [&quot;&quot;, &quot;&quot;, &quot;&quot;, &quot;&quot;], correcta:  -1, observaciones: &quot;&quot; },">
            <text:p><text:s/>{ id: 48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0]&amp; CHAR(34) &amp; &quot;, opciones: [&quot;&amp; CHAR(34)&amp;[Hoja1.B490]&amp; CHAR(34)&amp;&quot;, &quot;&amp; CHAR(34)&amp;[Hoja1.C490]&amp; CHAR(34)&amp;&quot;, &quot;&amp; CHAR(34)&amp;[Hoja1.D490]&amp; CHAR(34)&amp;&quot;, &quot;&amp; CHAR(34)&amp;[Hoja1.E490]&amp; CHAR(34)&amp;&quot;], correcta:  &quot;&amp;[Hoja1.F490]-1&amp; &quot;, observaciones: &quot; &amp; CHAR(34)&amp;[Hoja1.G490]&amp; CHAR(34) &amp; &quot; },&quot;" office:value-type="string" office:string-value=" { id: 489, enunciado: &quot;&quot;, opciones: [&quot;&quot;, &quot;&quot;, &quot;&quot;, &quot;&quot;], correcta:  -1, observaciones: &quot;&quot; },">
            <text:p><text:s/>{ id: 48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1]&amp; CHAR(34) &amp; &quot;, opciones: [&quot;&amp; CHAR(34)&amp;[Hoja1.B491]&amp; CHAR(34)&amp;&quot;, &quot;&amp; CHAR(34)&amp;[Hoja1.C491]&amp; CHAR(34)&amp;&quot;, &quot;&amp; CHAR(34)&amp;[Hoja1.D491]&amp; CHAR(34)&amp;&quot;, &quot;&amp; CHAR(34)&amp;[Hoja1.E491]&amp; CHAR(34)&amp;&quot;], correcta:  &quot;&amp;[Hoja1.F491]-1&amp; &quot;, observaciones: &quot; &amp; CHAR(34)&amp;[Hoja1.G491]&amp; CHAR(34) &amp; &quot; },&quot;" office:value-type="string" office:string-value=" { id: 490, enunciado: &quot;&quot;, opciones: [&quot;&quot;, &quot;&quot;, &quot;&quot;, &quot;&quot;], correcta:  -1, observaciones: &quot;&quot; },">
            <text:p><text:s/>{ id: 49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2]&amp; CHAR(34) &amp; &quot;, opciones: [&quot;&amp; CHAR(34)&amp;[Hoja1.B492]&amp; CHAR(34)&amp;&quot;, &quot;&amp; CHAR(34)&amp;[Hoja1.C492]&amp; CHAR(34)&amp;&quot;, &quot;&amp; CHAR(34)&amp;[Hoja1.D492]&amp; CHAR(34)&amp;&quot;, &quot;&amp; CHAR(34)&amp;[Hoja1.E492]&amp; CHAR(34)&amp;&quot;], correcta:  &quot;&amp;[Hoja1.F492]-1&amp; &quot;, observaciones: &quot; &amp; CHAR(34)&amp;[Hoja1.G492]&amp; CHAR(34) &amp; &quot; },&quot;" office:value-type="string" office:string-value=" { id: 491, enunciado: &quot;&quot;, opciones: [&quot;&quot;, &quot;&quot;, &quot;&quot;, &quot;&quot;], correcta:  -1, observaciones: &quot;&quot; },">
            <text:p><text:s/>{ id: 49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3]&amp; CHAR(34) &amp; &quot;, opciones: [&quot;&amp; CHAR(34)&amp;[Hoja1.B493]&amp; CHAR(34)&amp;&quot;, &quot;&amp; CHAR(34)&amp;[Hoja1.C493]&amp; CHAR(34)&amp;&quot;, &quot;&amp; CHAR(34)&amp;[Hoja1.D493]&amp; CHAR(34)&amp;&quot;, &quot;&amp; CHAR(34)&amp;[Hoja1.E493]&amp; CHAR(34)&amp;&quot;], correcta:  &quot;&amp;[Hoja1.F493]-1&amp; &quot;, observaciones: &quot; &amp; CHAR(34)&amp;[Hoja1.G493]&amp; CHAR(34) &amp; &quot; },&quot;" office:value-type="string" office:string-value=" { id: 492, enunciado: &quot;&quot;, opciones: [&quot;&quot;, &quot;&quot;, &quot;&quot;, &quot;&quot;], correcta:  -1, observaciones: &quot;&quot; },">
            <text:p><text:s/>{ id: 49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4]&amp; CHAR(34) &amp; &quot;, opciones: [&quot;&amp; CHAR(34)&amp;[Hoja1.B494]&amp; CHAR(34)&amp;&quot;, &quot;&amp; CHAR(34)&amp;[Hoja1.C494]&amp; CHAR(34)&amp;&quot;, &quot;&amp; CHAR(34)&amp;[Hoja1.D494]&amp; CHAR(34)&amp;&quot;, &quot;&amp; CHAR(34)&amp;[Hoja1.E494]&amp; CHAR(34)&amp;&quot;], correcta:  &quot;&amp;[Hoja1.F494]-1&amp; &quot;, observaciones: &quot; &amp; CHAR(34)&amp;[Hoja1.G494]&amp; CHAR(34) &amp; &quot; },&quot;" office:value-type="string" office:string-value=" { id: 493, enunciado: &quot;&quot;, opciones: [&quot;&quot;, &quot;&quot;, &quot;&quot;, &quot;&quot;], correcta:  -1, observaciones: &quot;&quot; },">
            <text:p><text:s/>{ id: 49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5]&amp; CHAR(34) &amp; &quot;, opciones: [&quot;&amp; CHAR(34)&amp;[Hoja1.B495]&amp; CHAR(34)&amp;&quot;, &quot;&amp; CHAR(34)&amp;[Hoja1.C495]&amp; CHAR(34)&amp;&quot;, &quot;&amp; CHAR(34)&amp;[Hoja1.D495]&amp; CHAR(34)&amp;&quot;, &quot;&amp; CHAR(34)&amp;[Hoja1.E495]&amp; CHAR(34)&amp;&quot;], correcta:  &quot;&amp;[Hoja1.F495]-1&amp; &quot;, observaciones: &quot; &amp; CHAR(34)&amp;[Hoja1.G495]&amp; CHAR(34) &amp; &quot; },&quot;" office:value-type="string" office:string-value=" { id: 494, enunciado: &quot;&quot;, opciones: [&quot;&quot;, &quot;&quot;, &quot;&quot;, &quot;&quot;], correcta:  -1, observaciones: &quot;&quot; },">
            <text:p><text:s/>{ id: 49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6]&amp; CHAR(34) &amp; &quot;, opciones: [&quot;&amp; CHAR(34)&amp;[Hoja1.B496]&amp; CHAR(34)&amp;&quot;, &quot;&amp; CHAR(34)&amp;[Hoja1.C496]&amp; CHAR(34)&amp;&quot;, &quot;&amp; CHAR(34)&amp;[Hoja1.D496]&amp; CHAR(34)&amp;&quot;, &quot;&amp; CHAR(34)&amp;[Hoja1.E496]&amp; CHAR(34)&amp;&quot;], correcta:  &quot;&amp;[Hoja1.F496]-1&amp; &quot;, observaciones: &quot; &amp; CHAR(34)&amp;[Hoja1.G496]&amp; CHAR(34) &amp; &quot; },&quot;" office:value-type="string" office:string-value=" { id: 495, enunciado: &quot;&quot;, opciones: [&quot;&quot;, &quot;&quot;, &quot;&quot;, &quot;&quot;], correcta:  -1, observaciones: &quot;&quot; },">
            <text:p><text:s/>{ id: 49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7]&amp; CHAR(34) &amp; &quot;, opciones: [&quot;&amp; CHAR(34)&amp;[Hoja1.B497]&amp; CHAR(34)&amp;&quot;, &quot;&amp; CHAR(34)&amp;[Hoja1.C497]&amp; CHAR(34)&amp;&quot;, &quot;&amp; CHAR(34)&amp;[Hoja1.D497]&amp; CHAR(34)&amp;&quot;, &quot;&amp; CHAR(34)&amp;[Hoja1.E497]&amp; CHAR(34)&amp;&quot;], correcta:  &quot;&amp;[Hoja1.F497]-1&amp; &quot;, observaciones: &quot; &amp; CHAR(34)&amp;[Hoja1.G497]&amp; CHAR(34) &amp; &quot; },&quot;" office:value-type="string" office:string-value=" { id: 496, enunciado: &quot;&quot;, opciones: [&quot;&quot;, &quot;&quot;, &quot;&quot;, &quot;&quot;], correcta:  -1, observaciones: &quot;&quot; },">
            <text:p><text:s/>{ id: 49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8]&amp; CHAR(34) &amp; &quot;, opciones: [&quot;&amp; CHAR(34)&amp;[Hoja1.B498]&amp; CHAR(34)&amp;&quot;, &quot;&amp; CHAR(34)&amp;[Hoja1.C498]&amp; CHAR(34)&amp;&quot;, &quot;&amp; CHAR(34)&amp;[Hoja1.D498]&amp; CHAR(34)&amp;&quot;, &quot;&amp; CHAR(34)&amp;[Hoja1.E498]&amp; CHAR(34)&amp;&quot;], correcta:  &quot;&amp;[Hoja1.F498]-1&amp; &quot;, observaciones: &quot; &amp; CHAR(34)&amp;[Hoja1.G498]&amp; CHAR(34) &amp; &quot; },&quot;" office:value-type="string" office:string-value=" { id: 497, enunciado: &quot;&quot;, opciones: [&quot;&quot;, &quot;&quot;, &quot;&quot;, &quot;&quot;], correcta:  -1, observaciones: &quot;&quot; },">
            <text:p><text:s/>{ id: 49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499]&amp; CHAR(34) &amp; &quot;, opciones: [&quot;&amp; CHAR(34)&amp;[Hoja1.B499]&amp; CHAR(34)&amp;&quot;, &quot;&amp; CHAR(34)&amp;[Hoja1.C499]&amp; CHAR(34)&amp;&quot;, &quot;&amp; CHAR(34)&amp;[Hoja1.D499]&amp; CHAR(34)&amp;&quot;, &quot;&amp; CHAR(34)&amp;[Hoja1.E499]&amp; CHAR(34)&amp;&quot;], correcta:  &quot;&amp;[Hoja1.F499]-1&amp; &quot;, observaciones: &quot; &amp; CHAR(34)&amp;[Hoja1.G499]&amp; CHAR(34) &amp; &quot; },&quot;" office:value-type="string" office:string-value=" { id: 498, enunciado: &quot;&quot;, opciones: [&quot;&quot;, &quot;&quot;, &quot;&quot;, &quot;&quot;], correcta:  -1, observaciones: &quot;&quot; },">
            <text:p><text:s/>{ id: 49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0]&amp; CHAR(34) &amp; &quot;, opciones: [&quot;&amp; CHAR(34)&amp;[Hoja1.B500]&amp; CHAR(34)&amp;&quot;, &quot;&amp; CHAR(34)&amp;[Hoja1.C500]&amp; CHAR(34)&amp;&quot;, &quot;&amp; CHAR(34)&amp;[Hoja1.D500]&amp; CHAR(34)&amp;&quot;, &quot;&amp; CHAR(34)&amp;[Hoja1.E500]&amp; CHAR(34)&amp;&quot;], correcta:  &quot;&amp;[Hoja1.F500]-1&amp; &quot;, observaciones: &quot; &amp; CHAR(34)&amp;[Hoja1.G500]&amp; CHAR(34) &amp; &quot; },&quot;" office:value-type="string" office:string-value=" { id: 499, enunciado: &quot;&quot;, opciones: [&quot;&quot;, &quot;&quot;, &quot;&quot;, &quot;&quot;], correcta:  -1, observaciones: &quot;&quot; },">
            <text:p><text:s/>{ id: 49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1]&amp; CHAR(34) &amp; &quot;, opciones: [&quot;&amp; CHAR(34)&amp;[Hoja1.B501]&amp; CHAR(34)&amp;&quot;, &quot;&amp; CHAR(34)&amp;[Hoja1.C501]&amp; CHAR(34)&amp;&quot;, &quot;&amp; CHAR(34)&amp;[Hoja1.D501]&amp; CHAR(34)&amp;&quot;, &quot;&amp; CHAR(34)&amp;[Hoja1.E501]&amp; CHAR(34)&amp;&quot;], correcta:  &quot;&amp;[Hoja1.F501]-1&amp; &quot;, observaciones: &quot; &amp; CHAR(34)&amp;[Hoja1.G501]&amp; CHAR(34) &amp; &quot; },&quot;" office:value-type="string" office:string-value=" { id: 500, enunciado: &quot;&quot;, opciones: [&quot;&quot;, &quot;&quot;, &quot;&quot;, &quot;&quot;], correcta:  -1, observaciones: &quot;&quot; },">
            <text:p><text:s/>{ id: 50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2]&amp; CHAR(34) &amp; &quot;, opciones: [&quot;&amp; CHAR(34)&amp;[Hoja1.B502]&amp; CHAR(34)&amp;&quot;, &quot;&amp; CHAR(34)&amp;[Hoja1.C502]&amp; CHAR(34)&amp;&quot;, &quot;&amp; CHAR(34)&amp;[Hoja1.D502]&amp; CHAR(34)&amp;&quot;, &quot;&amp; CHAR(34)&amp;[Hoja1.E502]&amp; CHAR(34)&amp;&quot;], correcta:  &quot;&amp;[Hoja1.F502]-1&amp; &quot;, observaciones: &quot; &amp; CHAR(34)&amp;[Hoja1.G502]&amp; CHAR(34) &amp; &quot; },&quot;" office:value-type="string" office:string-value=" { id: 501, enunciado: &quot;&quot;, opciones: [&quot;&quot;, &quot;&quot;, &quot;&quot;, &quot;&quot;], correcta:  -1, observaciones: &quot;&quot; },">
            <text:p><text:s/>{ id: 50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3]&amp; CHAR(34) &amp; &quot;, opciones: [&quot;&amp; CHAR(34)&amp;[Hoja1.B503]&amp; CHAR(34)&amp;&quot;, &quot;&amp; CHAR(34)&amp;[Hoja1.C503]&amp; CHAR(34)&amp;&quot;, &quot;&amp; CHAR(34)&amp;[Hoja1.D503]&amp; CHAR(34)&amp;&quot;, &quot;&amp; CHAR(34)&amp;[Hoja1.E503]&amp; CHAR(34)&amp;&quot;], correcta:  &quot;&amp;[Hoja1.F503]-1&amp; &quot;, observaciones: &quot; &amp; CHAR(34)&amp;[Hoja1.G503]&amp; CHAR(34) &amp; &quot; },&quot;" office:value-type="string" office:string-value=" { id: 502, enunciado: &quot;&quot;, opciones: [&quot;&quot;, &quot;&quot;, &quot;&quot;, &quot;&quot;], correcta:  -1, observaciones: &quot;&quot; },">
            <text:p><text:s/>{ id: 50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4]&amp; CHAR(34) &amp; &quot;, opciones: [&quot;&amp; CHAR(34)&amp;[Hoja1.B504]&amp; CHAR(34)&amp;&quot;, &quot;&amp; CHAR(34)&amp;[Hoja1.C504]&amp; CHAR(34)&amp;&quot;, &quot;&amp; CHAR(34)&amp;[Hoja1.D504]&amp; CHAR(34)&amp;&quot;, &quot;&amp; CHAR(34)&amp;[Hoja1.E504]&amp; CHAR(34)&amp;&quot;], correcta:  &quot;&amp;[Hoja1.F504]-1&amp; &quot;, observaciones: &quot; &amp; CHAR(34)&amp;[Hoja1.G504]&amp; CHAR(34) &amp; &quot; },&quot;" office:value-type="string" office:string-value=" { id: 503, enunciado: &quot;&quot;, opciones: [&quot;&quot;, &quot;&quot;, &quot;&quot;, &quot;&quot;], correcta:  -1, observaciones: &quot;&quot; },">
            <text:p><text:s/>{ id: 50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5]&amp; CHAR(34) &amp; &quot;, opciones: [&quot;&amp; CHAR(34)&amp;[Hoja1.B505]&amp; CHAR(34)&amp;&quot;, &quot;&amp; CHAR(34)&amp;[Hoja1.C505]&amp; CHAR(34)&amp;&quot;, &quot;&amp; CHAR(34)&amp;[Hoja1.D505]&amp; CHAR(34)&amp;&quot;, &quot;&amp; CHAR(34)&amp;[Hoja1.E505]&amp; CHAR(34)&amp;&quot;], correcta:  &quot;&amp;[Hoja1.F505]-1&amp; &quot;, observaciones: &quot; &amp; CHAR(34)&amp;[Hoja1.G505]&amp; CHAR(34) &amp; &quot; },&quot;" office:value-type="string" office:string-value=" { id: 504, enunciado: &quot;&quot;, opciones: [&quot;&quot;, &quot;&quot;, &quot;&quot;, &quot;&quot;], correcta:  -1, observaciones: &quot;&quot; },">
            <text:p><text:s/>{ id: 50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6]&amp; CHAR(34) &amp; &quot;, opciones: [&quot;&amp; CHAR(34)&amp;[Hoja1.B506]&amp; CHAR(34)&amp;&quot;, &quot;&amp; CHAR(34)&amp;[Hoja1.C506]&amp; CHAR(34)&amp;&quot;, &quot;&amp; CHAR(34)&amp;[Hoja1.D506]&amp; CHAR(34)&amp;&quot;, &quot;&amp; CHAR(34)&amp;[Hoja1.E506]&amp; CHAR(34)&amp;&quot;], correcta:  &quot;&amp;[Hoja1.F506]-1&amp; &quot;, observaciones: &quot; &amp; CHAR(34)&amp;[Hoja1.G506]&amp; CHAR(34) &amp; &quot; },&quot;" office:value-type="string" office:string-value=" { id: 505, enunciado: &quot;&quot;, opciones: [&quot;&quot;, &quot;&quot;, &quot;&quot;, &quot;&quot;], correcta:  -1, observaciones: &quot;&quot; },">
            <text:p><text:s/>{ id: 50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7]&amp; CHAR(34) &amp; &quot;, opciones: [&quot;&amp; CHAR(34)&amp;[Hoja1.B507]&amp; CHAR(34)&amp;&quot;, &quot;&amp; CHAR(34)&amp;[Hoja1.C507]&amp; CHAR(34)&amp;&quot;, &quot;&amp; CHAR(34)&amp;[Hoja1.D507]&amp; CHAR(34)&amp;&quot;, &quot;&amp; CHAR(34)&amp;[Hoja1.E507]&amp; CHAR(34)&amp;&quot;], correcta:  &quot;&amp;[Hoja1.F507]-1&amp; &quot;, observaciones: &quot; &amp; CHAR(34)&amp;[Hoja1.G507]&amp; CHAR(34) &amp; &quot; },&quot;" office:value-type="string" office:string-value=" { id: 506, enunciado: &quot;&quot;, opciones: [&quot;&quot;, &quot;&quot;, &quot;&quot;, &quot;&quot;], correcta:  -1, observaciones: &quot;&quot; },">
            <text:p><text:s/>{ id: 50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8]&amp; CHAR(34) &amp; &quot;, opciones: [&quot;&amp; CHAR(34)&amp;[Hoja1.B508]&amp; CHAR(34)&amp;&quot;, &quot;&amp; CHAR(34)&amp;[Hoja1.C508]&amp; CHAR(34)&amp;&quot;, &quot;&amp; CHAR(34)&amp;[Hoja1.D508]&amp; CHAR(34)&amp;&quot;, &quot;&amp; CHAR(34)&amp;[Hoja1.E508]&amp; CHAR(34)&amp;&quot;], correcta:  &quot;&amp;[Hoja1.F508]-1&amp; &quot;, observaciones: &quot; &amp; CHAR(34)&amp;[Hoja1.G508]&amp; CHAR(34) &amp; &quot; },&quot;" office:value-type="string" office:string-value=" { id: 507, enunciado: &quot;&quot;, opciones: [&quot;&quot;, &quot;&quot;, &quot;&quot;, &quot;&quot;], correcta:  -1, observaciones: &quot;&quot; },">
            <text:p><text:s/>{ id: 50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09]&amp; CHAR(34) &amp; &quot;, opciones: [&quot;&amp; CHAR(34)&amp;[Hoja1.B509]&amp; CHAR(34)&amp;&quot;, &quot;&amp; CHAR(34)&amp;[Hoja1.C509]&amp; CHAR(34)&amp;&quot;, &quot;&amp; CHAR(34)&amp;[Hoja1.D509]&amp; CHAR(34)&amp;&quot;, &quot;&amp; CHAR(34)&amp;[Hoja1.E509]&amp; CHAR(34)&amp;&quot;], correcta:  &quot;&amp;[Hoja1.F509]-1&amp; &quot;, observaciones: &quot; &amp; CHAR(34)&amp;[Hoja1.G509]&amp; CHAR(34) &amp; &quot; },&quot;" office:value-type="string" office:string-value=" { id: 508, enunciado: &quot;&quot;, opciones: [&quot;&quot;, &quot;&quot;, &quot;&quot;, &quot;&quot;], correcta:  -1, observaciones: &quot;&quot; },">
            <text:p><text:s/>{ id: 50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0]&amp; CHAR(34) &amp; &quot;, opciones: [&quot;&amp; CHAR(34)&amp;[Hoja1.B510]&amp; CHAR(34)&amp;&quot;, &quot;&amp; CHAR(34)&amp;[Hoja1.C510]&amp; CHAR(34)&amp;&quot;, &quot;&amp; CHAR(34)&amp;[Hoja1.D510]&amp; CHAR(34)&amp;&quot;, &quot;&amp; CHAR(34)&amp;[Hoja1.E510]&amp; CHAR(34)&amp;&quot;], correcta:  &quot;&amp;[Hoja1.F510]-1&amp; &quot;, observaciones: &quot; &amp; CHAR(34)&amp;[Hoja1.G510]&amp; CHAR(34) &amp; &quot; },&quot;" office:value-type="string" office:string-value=" { id: 509, enunciado: &quot;&quot;, opciones: [&quot;&quot;, &quot;&quot;, &quot;&quot;, &quot;&quot;], correcta:  -1, observaciones: &quot;&quot; },">
            <text:p><text:s/>{ id: 50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1]&amp; CHAR(34) &amp; &quot;, opciones: [&quot;&amp; CHAR(34)&amp;[Hoja1.B511]&amp; CHAR(34)&amp;&quot;, &quot;&amp; CHAR(34)&amp;[Hoja1.C511]&amp; CHAR(34)&amp;&quot;, &quot;&amp; CHAR(34)&amp;[Hoja1.D511]&amp; CHAR(34)&amp;&quot;, &quot;&amp; CHAR(34)&amp;[Hoja1.E511]&amp; CHAR(34)&amp;&quot;], correcta:  &quot;&amp;[Hoja1.F511]-1&amp; &quot;, observaciones: &quot; &amp; CHAR(34)&amp;[Hoja1.G511]&amp; CHAR(34) &amp; &quot; },&quot;" office:value-type="string" office:string-value=" { id: 510, enunciado: &quot;&quot;, opciones: [&quot;&quot;, &quot;&quot;, &quot;&quot;, &quot;&quot;], correcta:  -1, observaciones: &quot;&quot; },">
            <text:p><text:s/>{ id: 51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2]&amp; CHAR(34) &amp; &quot;, opciones: [&quot;&amp; CHAR(34)&amp;[Hoja1.B512]&amp; CHAR(34)&amp;&quot;, &quot;&amp; CHAR(34)&amp;[Hoja1.C512]&amp; CHAR(34)&amp;&quot;, &quot;&amp; CHAR(34)&amp;[Hoja1.D512]&amp; CHAR(34)&amp;&quot;, &quot;&amp; CHAR(34)&amp;[Hoja1.E512]&amp; CHAR(34)&amp;&quot;], correcta:  &quot;&amp;[Hoja1.F512]-1&amp; &quot;, observaciones: &quot; &amp; CHAR(34)&amp;[Hoja1.G512]&amp; CHAR(34) &amp; &quot; },&quot;" office:value-type="string" office:string-value=" { id: 511, enunciado: &quot;&quot;, opciones: [&quot;&quot;, &quot;&quot;, &quot;&quot;, &quot;&quot;], correcta:  -1, observaciones: &quot;&quot; },">
            <text:p><text:s/>{ id: 51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3]&amp; CHAR(34) &amp; &quot;, opciones: [&quot;&amp; CHAR(34)&amp;[Hoja1.B513]&amp; CHAR(34)&amp;&quot;, &quot;&amp; CHAR(34)&amp;[Hoja1.C513]&amp; CHAR(34)&amp;&quot;, &quot;&amp; CHAR(34)&amp;[Hoja1.D513]&amp; CHAR(34)&amp;&quot;, &quot;&amp; CHAR(34)&amp;[Hoja1.E513]&amp; CHAR(34)&amp;&quot;], correcta:  &quot;&amp;[Hoja1.F513]-1&amp; &quot;, observaciones: &quot; &amp; CHAR(34)&amp;[Hoja1.G513]&amp; CHAR(34) &amp; &quot; },&quot;" office:value-type="string" office:string-value=" { id: 512, enunciado: &quot;&quot;, opciones: [&quot;&quot;, &quot;&quot;, &quot;&quot;, &quot;&quot;], correcta:  -1, observaciones: &quot;&quot; },">
            <text:p><text:s/>{ id: 51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4]&amp; CHAR(34) &amp; &quot;, opciones: [&quot;&amp; CHAR(34)&amp;[Hoja1.B514]&amp; CHAR(34)&amp;&quot;, &quot;&amp; CHAR(34)&amp;[Hoja1.C514]&amp; CHAR(34)&amp;&quot;, &quot;&amp; CHAR(34)&amp;[Hoja1.D514]&amp; CHAR(34)&amp;&quot;, &quot;&amp; CHAR(34)&amp;[Hoja1.E514]&amp; CHAR(34)&amp;&quot;], correcta:  &quot;&amp;[Hoja1.F514]-1&amp; &quot;, observaciones: &quot; &amp; CHAR(34)&amp;[Hoja1.G514]&amp; CHAR(34) &amp; &quot; },&quot;" office:value-type="string" office:string-value=" { id: 513, enunciado: &quot;&quot;, opciones: [&quot;&quot;, &quot;&quot;, &quot;&quot;, &quot;&quot;], correcta:  -1, observaciones: &quot;&quot; },">
            <text:p><text:s/>{ id: 513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5]&amp; CHAR(34) &amp; &quot;, opciones: [&quot;&amp; CHAR(34)&amp;[Hoja1.B515]&amp; CHAR(34)&amp;&quot;, &quot;&amp; CHAR(34)&amp;[Hoja1.C515]&amp; CHAR(34)&amp;&quot;, &quot;&amp; CHAR(34)&amp;[Hoja1.D515]&amp; CHAR(34)&amp;&quot;, &quot;&amp; CHAR(34)&amp;[Hoja1.E515]&amp; CHAR(34)&amp;&quot;], correcta:  &quot;&amp;[Hoja1.F515]-1&amp; &quot;, observaciones: &quot; &amp; CHAR(34)&amp;[Hoja1.G515]&amp; CHAR(34) &amp; &quot; },&quot;" office:value-type="string" office:string-value=" { id: 514, enunciado: &quot;&quot;, opciones: [&quot;&quot;, &quot;&quot;, &quot;&quot;, &quot;&quot;], correcta:  -1, observaciones: &quot;&quot; },">
            <text:p><text:s/>{ id: 514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6]&amp; CHAR(34) &amp; &quot;, opciones: [&quot;&amp; CHAR(34)&amp;[Hoja1.B516]&amp; CHAR(34)&amp;&quot;, &quot;&amp; CHAR(34)&amp;[Hoja1.C516]&amp; CHAR(34)&amp;&quot;, &quot;&amp; CHAR(34)&amp;[Hoja1.D516]&amp; CHAR(34)&amp;&quot;, &quot;&amp; CHAR(34)&amp;[Hoja1.E516]&amp; CHAR(34)&amp;&quot;], correcta:  &quot;&amp;[Hoja1.F516]-1&amp; &quot;, observaciones: &quot; &amp; CHAR(34)&amp;[Hoja1.G516]&amp; CHAR(34) &amp; &quot; },&quot;" office:value-type="string" office:string-value=" { id: 515, enunciado: &quot;&quot;, opciones: [&quot;&quot;, &quot;&quot;, &quot;&quot;, &quot;&quot;], correcta:  -1, observaciones: &quot;&quot; },">
            <text:p><text:s/>{ id: 515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7]&amp; CHAR(34) &amp; &quot;, opciones: [&quot;&amp; CHAR(34)&amp;[Hoja1.B517]&amp; CHAR(34)&amp;&quot;, &quot;&amp; CHAR(34)&amp;[Hoja1.C517]&amp; CHAR(34)&amp;&quot;, &quot;&amp; CHAR(34)&amp;[Hoja1.D517]&amp; CHAR(34)&amp;&quot;, &quot;&amp; CHAR(34)&amp;[Hoja1.E517]&amp; CHAR(34)&amp;&quot;], correcta:  &quot;&amp;[Hoja1.F517]-1&amp; &quot;, observaciones: &quot; &amp; CHAR(34)&amp;[Hoja1.G517]&amp; CHAR(34) &amp; &quot; },&quot;" office:value-type="string" office:string-value=" { id: 516, enunciado: &quot;&quot;, opciones: [&quot;&quot;, &quot;&quot;, &quot;&quot;, &quot;&quot;], correcta:  -1, observaciones: &quot;&quot; },">
            <text:p><text:s/>{ id: 516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8]&amp; CHAR(34) &amp; &quot;, opciones: [&quot;&amp; CHAR(34)&amp;[Hoja1.B518]&amp; CHAR(34)&amp;&quot;, &quot;&amp; CHAR(34)&amp;[Hoja1.C518]&amp; CHAR(34)&amp;&quot;, &quot;&amp; CHAR(34)&amp;[Hoja1.D518]&amp; CHAR(34)&amp;&quot;, &quot;&amp; CHAR(34)&amp;[Hoja1.E518]&amp; CHAR(34)&amp;&quot;], correcta:  &quot;&amp;[Hoja1.F518]-1&amp; &quot;, observaciones: &quot; &amp; CHAR(34)&amp;[Hoja1.G518]&amp; CHAR(34) &amp; &quot; },&quot;" office:value-type="string" office:string-value=" { id: 517, enunciado: &quot;&quot;, opciones: [&quot;&quot;, &quot;&quot;, &quot;&quot;, &quot;&quot;], correcta:  -1, observaciones: &quot;&quot; },">
            <text:p><text:s/>{ id: 517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19]&amp; CHAR(34) &amp; &quot;, opciones: [&quot;&amp; CHAR(34)&amp;[Hoja1.B519]&amp; CHAR(34)&amp;&quot;, &quot;&amp; CHAR(34)&amp;[Hoja1.C519]&amp; CHAR(34)&amp;&quot;, &quot;&amp; CHAR(34)&amp;[Hoja1.D519]&amp; CHAR(34)&amp;&quot;, &quot;&amp; CHAR(34)&amp;[Hoja1.E519]&amp; CHAR(34)&amp;&quot;], correcta:  &quot;&amp;[Hoja1.F519]-1&amp; &quot;, observaciones: &quot; &amp; CHAR(34)&amp;[Hoja1.G519]&amp; CHAR(34) &amp; &quot; },&quot;" office:value-type="string" office:string-value=" { id: 518, enunciado: &quot;&quot;, opciones: [&quot;&quot;, &quot;&quot;, &quot;&quot;, &quot;&quot;], correcta:  -1, observaciones: &quot;&quot; },">
            <text:p><text:s/>{ id: 518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20]&amp; CHAR(34) &amp; &quot;, opciones: [&quot;&amp; CHAR(34)&amp;[Hoja1.B520]&amp; CHAR(34)&amp;&quot;, &quot;&amp; CHAR(34)&amp;[Hoja1.C520]&amp; CHAR(34)&amp;&quot;, &quot;&amp; CHAR(34)&amp;[Hoja1.D520]&amp; CHAR(34)&amp;&quot;, &quot;&amp; CHAR(34)&amp;[Hoja1.E520]&amp; CHAR(34)&amp;&quot;], correcta:  &quot;&amp;[Hoja1.F520]-1&amp; &quot;, observaciones: &quot; &amp; CHAR(34)&amp;[Hoja1.G520]&amp; CHAR(34) &amp; &quot; },&quot;" office:value-type="string" office:string-value=" { id: 519, enunciado: &quot;&quot;, opciones: [&quot;&quot;, &quot;&quot;, &quot;&quot;, &quot;&quot;], correcta:  -1, observaciones: &quot;&quot; },">
            <text:p><text:s/>{ id: 519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21]&amp; CHAR(34) &amp; &quot;, opciones: [&quot;&amp; CHAR(34)&amp;[Hoja1.B521]&amp; CHAR(34)&amp;&quot;, &quot;&amp; CHAR(34)&amp;[Hoja1.C521]&amp; CHAR(34)&amp;&quot;, &quot;&amp; CHAR(34)&amp;[Hoja1.D521]&amp; CHAR(34)&amp;&quot;, &quot;&amp; CHAR(34)&amp;[Hoja1.E521]&amp; CHAR(34)&amp;&quot;], correcta:  &quot;&amp;[Hoja1.F521]-1&amp; &quot;, observaciones: &quot; &amp; CHAR(34)&amp;[Hoja1.G521]&amp; CHAR(34) &amp; &quot; },&quot;" office:value-type="string" office:string-value=" { id: 520, enunciado: &quot;&quot;, opciones: [&quot;&quot;, &quot;&quot;, &quot;&quot;, &quot;&quot;], correcta:  -1, observaciones: &quot;&quot; },">
            <text:p><text:s/>{ id: 520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22]&amp; CHAR(34) &amp; &quot;, opciones: [&quot;&amp; CHAR(34)&amp;[Hoja1.B522]&amp; CHAR(34)&amp;&quot;, &quot;&amp; CHAR(34)&amp;[Hoja1.C522]&amp; CHAR(34)&amp;&quot;, &quot;&amp; CHAR(34)&amp;[Hoja1.D522]&amp; CHAR(34)&amp;&quot;, &quot;&amp; CHAR(34)&amp;[Hoja1.E522]&amp; CHAR(34)&amp;&quot;], correcta:  &quot;&amp;[Hoja1.F522]-1&amp; &quot;, observaciones: &quot; &amp; CHAR(34)&amp;[Hoja1.G522]&amp; CHAR(34) &amp; &quot; },&quot;" office:value-type="string" office:string-value=" { id: 521, enunciado: &quot;&quot;, opciones: [&quot;&quot;, &quot;&quot;, &quot;&quot;, &quot;&quot;], correcta:  -1, observaciones: &quot;&quot; },">
            <text:p><text:s/>{ id: 521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23]&amp; CHAR(34) &amp; &quot;, opciones: [&quot;&amp; CHAR(34)&amp;[Hoja1.B523]&amp; CHAR(34)&amp;&quot;, &quot;&amp; CHAR(34)&amp;[Hoja1.C523]&amp; CHAR(34)&amp;&quot;, &quot;&amp; CHAR(34)&amp;[Hoja1.D523]&amp; CHAR(34)&amp;&quot;, &quot;&amp; CHAR(34)&amp;[Hoja1.E523]&amp; CHAR(34)&amp;&quot;], correcta:  &quot;&amp;[Hoja1.F523]-1&amp; &quot;, observaciones: &quot; &amp; CHAR(34)&amp;[Hoja1.G523]&amp; CHAR(34) &amp; &quot; },&quot;" office:value-type="string" office:string-value=" { id: 522, enunciado: &quot;&quot;, opciones: [&quot;&quot;, &quot;&quot;, &quot;&quot;, &quot;&quot;], correcta:  -1, observaciones: &quot;&quot; },">
            <text:p><text:s/>{ id: 522, enunciado: "", opciones: ["", "", "", ""], correcta: <text:s/>-1, observaciones: "" },</text:p>
          </table:table-cell>
          <table:table-cell table:number-columns-repeated="1023"/>
        </table:table-row>
        <table:table-row table:style-name="ro3">
          <table:table-cell table:formula="of:=&quot; { id: &quot;&amp;ROW()-1&amp;&quot;, enunciado: &quot; &amp; CHAR(34)&amp;[Hoja1.A524]&amp; CHAR(34) &amp; &quot;, opciones: [&quot;&amp; CHAR(34)&amp;[Hoja1.B524]&amp; CHAR(34)&amp;&quot;, &quot;&amp; CHAR(34)&amp;[Hoja1.C524]&amp; CHAR(34)&amp;&quot;, &quot;&amp; CHAR(34)&amp;[Hoja1.D524]&amp; CHAR(34)&amp;&quot;, &quot;&amp; CHAR(34)&amp;[Hoja1.E524]&amp; CHAR(34)&amp;&quot;], correcta:  &quot;&amp;[Hoja1.F524]-1&amp; &quot;, observaciones: &quot; &amp; CHAR(34)&amp;[Hoja1.G524]&amp; CHAR(34) &amp; &quot; },&quot;" office:value-type="string" office:string-value=" { id: 523, enunciado: &quot;&quot;, opciones: [&quot;&quot;, &quot;&quot;, &quot;&quot;, &quot;&quot;], correcta:  -1, observaciones: &quot;&quot; },">
            <text:p><text:s/>{ id: 523, enunciado: "", opciones: ["", "", "", ""], correcta: <text:s/>-1, observaciones: "" },</text:p>
          </table:table-cell>
          <table:table-cell table:number-columns-repeated="1023"/>
        </table:table-row>
        <table:table-row table:style-name="ro3" table:number-rows-repeated="1048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2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Enunciado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árbol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es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uadern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ochil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ventan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avion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leyend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roblem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an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olegi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dibuj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estrell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hambr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miset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lápiz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ochil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ap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habitacion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tart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juguet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nub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sofá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ot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uadern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árbol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es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uadern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ochil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ventan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lápiz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agu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sofá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roblem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an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estrell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mión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herman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reloj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otell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sol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ap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las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teléfon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hambr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nub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dí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ncion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olegi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antalón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lech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juguet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uert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ájar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luz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zapat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iudad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ec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fot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amig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miset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olígraf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anzan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arqu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ratón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rreter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uadr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tijer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adr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avión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úsic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estuch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llav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lanet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isl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uñ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osqu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elícul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guant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rofesor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gaf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alón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hormig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ques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m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helad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flor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ordenador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err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alet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ols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uent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niñ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rí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iciclet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examen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iedr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ar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ot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min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estrell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radi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uebl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rt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inviern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lluvi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reloj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nariz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olsill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as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niñ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niev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barc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adre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ájar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ontañ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las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cielo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gafa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amig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viaje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ventan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pueblos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fiesta"</text:p>
          </table:table-cell>
          <table:table-cell table:number-columns-repeated="1023"/>
        </table:table-row>
        <table:table-row table:style-name="ro1">
          <table:table-cell office:value-type="string">
            <text:p>Busca el determinante adecuado para la palabra "mied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árbol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es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uadern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ochi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entan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ápiz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gu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ofá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roblem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n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rel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mi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erman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eloj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tel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ol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p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las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eléfon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ambr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ub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í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ncion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legi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ntal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ech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uguet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uer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ájar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uz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zapat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iudad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c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ot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mig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mise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lígraf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nzan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rqu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at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rreter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uadr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ijer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dr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vi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úsic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uch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lav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lane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is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uñ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squ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lícu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uant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rofeso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af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l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ormig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ques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m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elad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lor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ordenador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rr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le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ls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uent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ñ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í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icicle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xame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edr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r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min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rel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adi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uebl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r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inviern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luvi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eloj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ariz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lsill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s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ñ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ev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rc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dr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ájar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ontañ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las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iel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af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mig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iaj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enta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uebl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ies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ied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squ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uch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zar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rofesor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lumn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ochi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jercici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ti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las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lon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ibre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ápic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mig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legi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regun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xcursi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utobú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rrete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ontañ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ev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quí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rí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uant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brig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ufand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uebl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ll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ent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laz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uent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lom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rqu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árbol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oj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uel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nc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ñ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lo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ueg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rr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rre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at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ech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lat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gu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ájar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d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am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ol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í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ña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ard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och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rel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u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iel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ub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luvi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ragu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harc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rr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min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s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uer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lav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al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ofá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elevisi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lícu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ci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es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il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mid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lat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as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gu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ru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nza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látan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abitaci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m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lmohad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ában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rmari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ntalon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mise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lcetin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zapat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ñ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uch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oal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epill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ient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ab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pej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ucha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enedor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as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erville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uadr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red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ntur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ncel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lor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oj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ijer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gament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eg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acapun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ochi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las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lum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ibr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uent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istori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p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lane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rel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ol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u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het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stronau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vion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s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le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iaj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illet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re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í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aci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sajer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eloj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iemp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inut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egund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o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í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eman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ñ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acion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rimave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lor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eran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lor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lay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re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r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o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c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rc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otoñ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ient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oj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rqu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stañ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inviern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rí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ev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ontañ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quí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uant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ufand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orr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nimal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elv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e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igr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lefant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iraf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on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ájar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d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uev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ranj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ac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ball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ovej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erd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allin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ollit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rr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a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sco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mid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gu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uguet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lo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ues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amili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dr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erma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buel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rim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í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obri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iet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umpleañ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egal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ies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e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ar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lob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úsic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il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ot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íde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ecuerd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rson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rqu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ueg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ris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iversi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eriend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zum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alle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ru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ques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am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erville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as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ebid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iel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ed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gu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tel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ochi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ibr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uch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olígraf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ápic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om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pel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ibuj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ntu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ncel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es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il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las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enta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zar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iz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rofesor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olegi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ti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eport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l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nast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gol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quip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ictori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fuerz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e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rre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ist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zapatil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uch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oal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abón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ein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pej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no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alud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édic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astil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jarab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ueñ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m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noch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estrel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un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manecer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sol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luz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calor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plane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ventur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p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tesor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is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mar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o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barc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e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ient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destino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viaje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final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gui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guilas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ul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alm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acha"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ca el determinante adecuado para la palabra "hachas"</text:p>
          </table:table-cell>
          <table:table-cell table:number-columns-repeated="1023"/>
        </table:table-row>
        <table:table-row table:style-name="ro1" table:number-rows-repeated="10480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do" table:style-name="ta3">
        <table:table-column table:style-name="co7" table:default-cell-style-name="ce1"/>
        <table:table-column table:style-name="co8" table:number-columns-repeated="1023" table:default-cell-style-name="ce1"/>
        <table:table-row table:style-name="ro1">
          <table:table-cell/>
          <table:table-cell office:value-type="string">
            <text:p>Genero</text:p>
          </table:table-cell>
          <table:table-cell office:value-type="string">
            <text:p>Número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aque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[.B2]&amp;[.C2]" office:value-type="string" office:string-value="MS">
            <text:p>MS</text:p>
          </table:table-cell>
          <table:table-cell table:number-columns-repeated="1020"/>
        </table:table-row>
        <table:table-row table:style-name="ro1">
          <table:table-cell office:value-type="string">
            <text:p>aquel coche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[.B3]&amp;[.C3]" office:value-type="string" office:string-value="MS">
            <text:p>MS</text:p>
          </table:table-cell>
          <table:table-cell table:number-columns-repeated="1020"/>
        </table:table-row>
        <table:table-row table:style-name="ro1">
          <table:table-cell office:value-type="string">
            <text:p>Aquella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table:formula="of:=[.B4]&amp;[.C4]" office:value-type="string" office:string-value="FS">
            <text:p>FS</text:p>
          </table:table-cell>
          <table:table-cell table:number-columns-repeated="1020"/>
        </table:table-row>
        <table:table-row table:style-name="ro1">
          <table:table-cell office:value-type="string">
            <text:p>Aquellas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 table:formula="of:=[.B5]&amp;[.C5]" office:value-type="string" office:string-value="FP">
            <text:p>FP</text:p>
          </table:table-cell>
          <table:table-cell table:number-columns-repeated="1020"/>
        </table:table-row>
        <table:table-row table:style-name="ro1">
          <table:table-cell office:value-type="string">
            <text:p>aquell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formula="of:=[.B6]&amp;[.C6]" office:value-type="string" office:string-value="NS">
            <text:p>NS</text:p>
          </table:table-cell>
          <table:table-cell table:number-columns-repeated="1020"/>
        </table:table-row>
        <table:table-row table:style-name="ro1">
          <table:table-cell office:value-type="string">
            <text:p>Aquellos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table:formula="of:=[.B7]&amp;[.C7]" office:value-type="string" office:string-value="MP">
            <text:p>MP</text:p>
          </table:table-cell>
          <table:table-cell table:number-columns-repeated="1020"/>
        </table:table-row>
        <table:table-row table:style-name="ro1">
          <table:table-cell office:value-type="string">
            <text:p>esa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table:formula="of:=[.B8]&amp;[.C8]" office:value-type="string" office:string-value="FS">
            <text:p>FS</text:p>
          </table:table-cell>
          <table:table-cell table:number-columns-repeated="1020"/>
        </table:table-row>
        <table:table-row table:style-name="ro1">
          <table:table-cell office:value-type="string">
            <text:p>Esas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 table:formula="of:=[.B9]&amp;[.C9]" office:value-type="string" office:string-value="FP">
            <text:p>FP</text:p>
          </table:table-cell>
          <table:table-cell table:number-columns-repeated="1020"/>
        </table:table-row>
        <table:table-row table:style-name="ro1">
          <table:table-cell office:value-type="string">
            <text:p>Ese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[.B10]&amp;[.C10]" office:value-type="string" office:string-value="MS">
            <text:p>MS</text:p>
          </table:table-cell>
          <table:table-cell table:number-columns-repeated="1020"/>
        </table:table-row>
        <table:table-row table:style-name="ro1">
          <table:table-cell office:value-type="string">
            <text:p>ese cuaderno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[.B11]&amp;[.C11]" office:value-type="string" office:string-value="MS">
            <text:p>MS</text:p>
          </table:table-cell>
          <table:table-cell table:number-columns-repeated="1020"/>
        </table:table-row>
        <table:table-row table:style-name="ro1">
          <table:table-cell office:value-type="string">
            <text:p>es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formula="of:=[.B12]&amp;[.C12]" office:value-type="string" office:string-value="NS">
            <text:p>NS</text:p>
          </table:table-cell>
          <table:table-cell table:number-columns-repeated="1020"/>
        </table:table-row>
        <table:table-row table:style-name="ro1">
          <table:table-cell office:value-type="string">
            <text:p>esos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table:formula="of:=[.B13]&amp;[.C13]" office:value-type="string" office:string-value="MP">
            <text:p>MP</text:p>
          </table:table-cell>
          <table:table-cell table:number-columns-repeated="1020"/>
        </table:table-row>
        <table:table-row table:style-name="ro1">
          <table:table-cell office:value-type="string">
            <text:p>Esta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table:formula="of:=[.B14]&amp;[.C14]" office:value-type="string" office:string-value="FS">
            <text:p>FS</text:p>
          </table:table-cell>
          <table:table-cell table:number-columns-repeated="1020"/>
        </table:table-row>
        <table:table-row table:style-name="ro1">
          <table:table-cell office:value-type="string">
            <text:p>Estas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 table:formula="of:=[.B15]&amp;[.C15]" office:value-type="string" office:string-value="FP">
            <text:p>FP</text:p>
          </table:table-cell>
          <table:table-cell table:number-columns-repeated="1020"/>
        </table:table-row>
        <table:table-row table:style-name="ro1">
          <table:table-cell office:value-type="string">
            <text:p>este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[.B16]&amp;[.C16]" office:value-type="string" office:string-value="MS">
            <text:p>MS</text:p>
          </table:table-cell>
          <table:table-cell table:number-columns-repeated="1020"/>
        </table:table-row>
        <table:table-row table:style-name="ro1">
          <table:table-cell office:value-type="string">
            <text:p>este lápiz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[.B17]&amp;[.C17]" office:value-type="string" office:string-value="MS">
            <text:p>MS</text:p>
          </table:table-cell>
          <table:table-cell table:number-columns-repeated="1020"/>
        </table:table-row>
        <table:table-row table:style-name="ro1">
          <table:table-cell office:value-type="string">
            <text:p>Est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formula="of:=[.B18]&amp;[.C18]" office:value-type="string" office:string-value="NS">
            <text:p>NS</text:p>
          </table:table-cell>
          <table:table-cell table:number-columns-repeated="1020"/>
        </table:table-row>
        <table:table-row table:style-name="ro1">
          <table:table-cell office:value-type="string">
            <text:p>Estos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table:formula="of:=[.B19]&amp;[.C19]" office:value-type="string" office:string-value="MP">
            <text:p>MP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3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9" table:default-cell-style-name="ce1"/>
        <table:table-column table:style-name="co8" table:number-columns-repeated="1003" table:default-cell-style-name="ce1"/>
        <table:table-row table:style-name="ro1">
          <table:table-cell table:number-columns-repeated="4"/>
          <table:table-cell office:value-type="string">
            <text:p>Contar</text:p>
          </table:table-cell>
          <table:table-cell office:value-type="string">
            <text:p>Cuenta de Conta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Correcto</text:p>
          </table:table-cell>
          <table:table-cell office:value-type="string">
            <text:p>Cuenta de Correct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aquel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table:number-columns-repeated="1018"/>
        </table:table-row>
        <table:table-row table:style-name="ro1">
          <table:table-cell office:value-type="string">
            <text:p>aquel coch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quella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(en blanco)</text:p>
          </table:table-cell>
          <table:table-cell table:number-columns-repeated="1019"/>
        </table:table-row>
        <table:table-row table:style-name="ro1">
          <table:table-cell office:value-type="string">
            <text:p>Aquellas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Total general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office:value-type="string">
            <text:p>aquello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string">
            <text:p>Aquellos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office:value-type="string">
            <text:p>esa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office:value-type="string">
            <text:p>Esas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Ese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ese cuaderno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eso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string">
            <text:p>esos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Esta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office:value-type="string">
            <text:p>Estas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este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este lápi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Esto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Estos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(en blanco)</text:p>
          </table:table-cell>
          <table:table-cell table:number-columns-repeated="1023"/>
        </table:table-row>
        <table:table-row table:style-name="ro1">
          <table:table-cell office:value-type="string">
            <text:p>Total general</text:p>
          </table:table-cell>
          <table:table-cell office:value-type="float" office:value="250">
            <text:p>250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4" table:style-name="ta3">
        <table:table-column table:style-name="co8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Hoja1.A2:Hoja1.AMJ40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TablaDinámica1" table:application-data="" table:target-range-address="Hoja2.A3:Hoja2.B23" table:buttons="Hoja2.A3" table:show-filter-button="false">
          <table:source-cell-range table:cell-range-address="Hoja1.H1:Hoja1.H1048576"/>
          <table:data-pilot-field table:source-field-name="Correcto" table:orientation="row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o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TablaDinámica2" table:application-data="" table:target-range-address="Hoja2.E1:Hoja2.F7" table:buttons="Hoja2.E1" table:show-filter-button="false">
          <table:source-cell-range table:cell-range-address="Hoja1.O1:Hoja1.O1048576"/>
          <table:data-pilot-field table:source-field-name="Contar" table:orientation="row" table:function="none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7">27/06/2026</text:date>, <text:time>22:53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title/>
    <dc:description/>
    <dc:subject/>
    <meta:initial-creator/>
    <dc:creator>PSBR R</dc:creator>
    <meta:creation-date>2026-03-19T09:29:12Z</meta:creation-date>
    <dc:date>2026-06-27T22:53:55</dc:date>
    <meta:editing-cycles>21</meta:editing-cycles>
    <meta:editing-duration>PT2H41M51S</meta:editing-duration>
    <meta:document-statistic meta:table-count="6" meta:cell-count="6951" meta:object-count="0"/>
  </office:meta>
</office:document-meta>
</file>